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 text:style-name="BookTitle">THE MANAGER'S HANDBOOK</text:p>
      <text:p text:style-name="BookSubtitle">Volume I – Philosophy &amp; Tactical Blueprint</text:p>
      <text:p text:style-name="Body"/>
      <text:p text:style-name="H1">Style Guide (Delete this section once the template is configured)</text:p>
      <text:p text:style-name="Body">Each paragraph below demonstrates one custom style.</text:p>
      <text:p text:style-name="BookTitle">BookTitle - The Manager's Handbook</text:p>
      <text:p text:style-name="BookSubtitle">BookSubtitle - Volume I</text:p>
      <text:p text:style-name="H1">H1 - Chapter Title</text:p>
      <text:p text:style-name="H2">H2 - Main Section</text:p>
      <text:p text:style-name="H3">H3 - Subsection</text:p>
      <text:p text:style-name="H4">H4 - Minor Heading</text:p>
      <text:p text:style-name="Body">Body - Standard paragraph text. This is the default writing style for the handbook.</text:p>
      <text:p text:style-name="Quote">Quote - 'A tactic should solve a problem, not create one.'</text:p>
      <text:p text:style-name="FMBehaviour">FM Behaviour - Explain how the Football Manager match engine interprets an instruction.</text:p>
      <text:p text:style-name="TacticalPrinciple">Tactical Principle - Explain the football coaching principle.</text:p>
      <text:p text:style-name="ManagersJournal">✍ Manager's Journal - Handwritten notes and tactical observations.</text:p>
      <text:p text:style-name="Warning">⚠ Warning - Common pitfalls or tactical risks.</text:p>
      <text:p text:style-name="MatchTip">💡 Match Tip - Practical advice for match day.</text:p>
      <text:p text:style-name="RevisionNote">Revision Note - Added after version 1.1.</text:p>
      <text:p text:style-name="Caption">Figure 1.1 - Example diagram caption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BookTitle" style:family="paragraph" style:display-name="BookTitle">
      <style:text-properties fo:font-family="Tahoma" fo:font-size="26pt" fo:font-weight="bold" fo:color="#7A1F1F"/>
    </style:style>
    <style:style style:name="BookSubtitle" style:family="paragraph" style:display-name="BookSubtitle">
      <style:text-properties fo:font-family="Tahoma" fo:font-size="18pt" fo:color="#7A1F1F"/>
    </style:style>
    <style:style style:name="H1" style:family="paragraph" style:display-name="H1">
      <style:text-properties fo:font-family="Tahoma" fo:font-size="20pt" fo:font-weight="bold" fo:color="#7A1F1F"/>
    </style:style>
    <style:style style:name="H2" style:family="paragraph" style:display-name="H2">
      <style:text-properties fo:font-family="Tahoma" fo:font-size="20pt" fo:color="#7A1F1F"/>
    </style:style>
    <style:style style:name="H3" style:family="paragraph" style:display-name="H3">
      <style:text-properties fo:font-family="Tahoma" fo:font-size="16pt" fo:font-weight="bold" fo:color="#7A1F1F"/>
    </style:style>
    <style:style style:name="H4" style:family="paragraph" style:display-name="H4">
      <style:text-properties fo:font-family="Tahoma" fo:font-size="16pt" fo:color="#7A1F1F"/>
    </style:style>
    <style:style style:name="Body" style:family="paragraph" style:display-name="Body">
      <style:text-properties fo:font-family="Calibri" fo:font-size="11pt"/>
    </style:style>
    <style:style style:name="Quote" style:family="paragraph" style:display-name="Quote">
      <style:text-properties fo:font-family="Calibri" fo:font-size="11pt" fo:font-style="italic" fo:color="#555555"/>
    </style:style>
    <style:style style:name="FMBehaviour" style:family="paragraph" style:display-name="FMBehaviour">
      <style:text-properties fo:font-family="Calibri" fo:font-size="11pt" fo:font-weight="bold" fo:color="#1565C0"/>
    </style:style>
    <style:style style:name="TacticalPrinciple" style:family="paragraph" style:display-name="TacticalPrinciple">
      <style:text-properties fo:font-family="Calibri" fo:font-size="11pt" fo:font-weight="bold" fo:color="#2E7D32"/>
    </style:style>
    <style:style style:name="ManagersJournal" style:family="paragraph" style:display-name="ManagersJournal">
      <style:text-properties fo:font-family="Calibri" fo:font-size="11pt" fo:font-style="italic" fo:color="#C62828"/>
    </style:style>
    <style:style style:name="Warning" style:family="paragraph" style:display-name="Warning">
      <style:text-properties fo:font-family="Calibri" fo:font-size="11pt" fo:font-weight="bold" fo:color="#666666"/>
    </style:style>
    <style:style style:name="MatchTip" style:family="paragraph" style:display-name="MatchTip">
      <style:text-properties fo:font-family="Calibri" fo:font-size="11pt" fo:font-weight="bold" fo:color="#8A6D00"/>
    </style:style>
    <style:style style:name="RevisionNote" style:family="paragraph" style:display-name="RevisionNote">
      <style:text-properties fo:font-family="Calibri" fo:font-size="10pt" fo:font-style="italic" fo:color="#C62828"/>
    </style:style>
    <style:style style:name="Caption" style:family="paragraph" style:display-name="Caption">
      <style:text-properties fo:font-family="Calibri" fo:font-size="9pt" fo:font-style="italic" fo:color="#666666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