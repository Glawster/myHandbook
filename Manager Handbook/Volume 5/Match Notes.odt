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atrick Hand" svg:font-family="'Patrick Hand'" style:font-adornments="Regular" style:font-pitch="variable"/>
    <style:font-face style:name="Tahoma" svg:font-family="Tahoma" style:font-adornments="Bold" style:font-family-generic="swiss"/>
  </office:font-face-decls>
  <office:automatic-styles>
    <style:style style:name="P1" style:family="paragraph" style:parent-style-name="Game_20_Caed_20_Body_20_Text">
      <style:text-properties officeooo:rsid="000d96d3" officeooo:paragraph-rsid="000d96d3"/>
    </style:style>
    <style:style style:name="P2" style:family="paragraph" style:parent-style-name="Game_20_Caed_20_Body_20_Text" style:list-style-name="L1">
      <style:text-properties officeooo:paragraph-rsid="000d96d3"/>
    </style:style>
    <style:style style:name="P3" style:family="paragraph" style:parent-style-name="Game_20_Caed_20_Body_20_Text" style:list-style-name="L2">
      <style:text-properties officeooo:paragraph-rsid="000d96d3"/>
    </style:style>
    <style:style style:name="P4" style:family="paragraph" style:parent-style-name="Game_20_Card_20_Heading">
      <style:text-properties officeooo:paragraph-rsid="000d96d3"/>
    </style:style>
    <style:style style:name="P5" style:family="paragraph" style:parent-style-name="Game_20_Card_20_Sub_20_heading">
      <style:text-properties officeooo:paragraph-rsid="000d96d3"/>
    </style:style>
    <style:style style:name="T1" style:family="text">
      <style:text-properties officeooo:rsid="000d96d3"/>
    </style:style>
    <style:style style:name="T2" style:family="text">
      <style:text-properties officeooo:rsid="000fe0ac"/>
    </style:style>
    <style:style style:name="fr1" style:family="graphic" style:parent-style-name="Game_20_Card">
      <style:graphic-properties loext:rel-width-rel="paragraph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cm" svg:y="0cm" svg:width="17cm" style:rel-width="100%" draw:z-index="0">
        <draw:text-box fo:min-height="8.269cm">
          <text:p text:style-name="P4">Match 03</text:p>
          <text:p text:style-name="Game_20_Card_20_Sub_20_heading"><text:span text:style-name="T1">Opponent: </text:span>Luton <text:span text:style-name="T2">[Sky Bet League One]</text:span></text:p>
          <text:p text:style-name="Game_20_Card_20_Sub_20_heading">Result: 3-3</text:p>
          <text:p text:style-name="P5">Problem…</text:p>
          <text:list xml:id="list1574457603" text:style-name="L2">
            <text:list-item>
              <text:p text:style-name="Game_20_Card_20_Body_20_Text">Left side not as advanced as the right side.</text:p>
            </text:list-item>
          </text:list>
          <text:p text:style-name="P5">Changes…</text:p>
          <text:list xml:id="list3621957446" text:style-name="L1">
            <text:list-item>
              <text:p text:style-name="Game_20_Card_20_Body_20_Text">Both AWB modified<text:line-break/>Cross From → Standard (was Byline)</text:p>
            </text:list-item>
          </text:list>
          <text:p text:style-name="P4">Post Match Review</text:p>
        </draw:text-box>
      </draw:frame>
      <text:p text:style-name="Game_20_Card_20_Heading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atrick Hand" svg:font-family="'Patrick Hand'" style:font-adornments="Regular" style:font-pitch="variable"/>
    <style:font-face style:name="Tahoma" svg:font-family="Tahoma" style:font-adornments="Bold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ame_20_Card_20_Heading" style:display-name="Game Card Heading" style:family="paragraph" style:parent-style-name="Standard">
      <loext:graphic-properties draw:fill="none" draw:fill-color="#ffe994"/>
      <style:paragraph-properties fo:margin-left="0cm" fo:margin-right="0cm" fo:margin-top="0.101cm" fo:margin-bottom="0.101cm" style:contextual-spacing="false" fo:text-indent="0cm" style:auto-text-indent="false" fo:background-color="transparent" fo:padding="0.049cm" fo:border="none"/>
      <style:text-properties fo:color="#b47804" loext:opacity="100%" style:font-name="Tahoma" fo:font-family="Tahoma" style:font-style-name="Bold" style:font-family-generic="swiss" fo:font-size="14pt" fo:font-weight="bold"/>
    </style:style>
    <style:style style:name="Game_20_Card_20_Sub_20_heading" style:display-name="Game Card Sub heading" style:family="paragraph" style:parent-style-name="Game_20_Card_20_Heading" style:next-style-name="Game_20_Card_20_Body_20_Text">
      <style:text-properties fo:font-weight="normal"/>
    </style:style>
    <style:style style:name="Game_20_Card_20_Body_20_Text" style:display-name="Game Card Body Text" style:family="paragraph" style:parent-style-name="Game_20_Card_20_Sub_20_heading">
      <style:paragraph-properties fo:margin-left="0.3cm" fo:margin-right="0cm" fo:margin-top="0cm" fo:margin-bottom="0.101cm" style:contextual-spacing="false" fo:text-indent="0cm" style:auto-text-indent="false"/>
      <style:text-properties fo:font-size="11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ame_20_Card" style:display-name="Game Card" style:family="graphic" style:auto-update="true">
      <style:graphic-properties svg:width="17cm" fo:min-width="100%" fo:min-height="0.139cm" text:anchor-type="page" svg:x="0cm" svg:y="0cm" fo:margin-left="0.199cm" fo:margin-right="0.199cm" fo:margin-top="0.199cm" fo:margin-bottom="0.199cm" style:wrap="none" style:vertical-pos="from-top" style:vertical-rel="page-content" style:horizontal-pos="from-left" style:horizontal-rel="page-content" fo:background-color="#ffe994" draw:fill="solid" draw:fill-color="#ffe994" fo:padding="0.25cm" fo:border="0.06pt solid #b47804" draw:wrap-influence-on-position="once-concurrent" loext:allow-overlap="true" loext:rel-width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3T14:50:25.149549305</meta:creation-date>
    <dc:date>2026-07-03T15:19:52.552055967</dc:date>
    <meta:editing-duration>PT8M1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35" meta:character-count="186" meta:non-whitespace-character-count="161"/>
  </office:meta>
</office:document-meta>
</file>