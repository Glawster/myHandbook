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1">THE MANAGER'S HANDBOOK</text:h>
      <text:p text:style-name="Body">Volume I – Philosophy &amp; Tactical Blueprint</text:p>
      <text:p text:style-name="Body">Revision 1.0</text:p>
      <text:p text:style-name="Body"/>
      <text:h text:outline-level="2" text:style-name="H2">Table of Contents</text:h>
      <text:list>
        <text:list-item>
          <text:p text:style-name="Body">Foreword</text:p>
        </text:list-item>
        <text:list-item>
          <text:p text:style-name="Body">Chapter 1 – Football Before Formations</text:p>
        </text:list-item>
        <text:list-item>
          <text:p text:style-name="Body">Chapter 2 – Understanding the Match Engine</text:p>
        </text:list-item>
        <text:list-item>
          <text:p text:style-name="Body">Chapter 3 – Tactical Blueprint</text:p>
        </text:list-item>
        <text:list-item>
          <text:p text:style-name="Body">Chapter 4 – Team Instructions</text:p>
        </text:list-item>
        <text:list-item>
          <text:p text:style-name="Body">Chapter 5 – Roles</text:p>
        </text:list-item>
        <text:list-item>
          <text:p text:style-name="Body">Chapter 6 – Match Management</text:p>
        </text:list-item>
        <text:list-item>
          <text:p text:style-name="Body">Chapter 7 – Analysis</text:p>
        </text:list-item>
        <text:list-item>
          <text:p text:style-name="Body">Appendix</text:p>
        </text:list-item>
      </text:list>
      <text:h text:outline-level="1" text:style-name="H1">Foreword</text:h>
      <text:p text:style-name="Body">[Content to be written]</text:p>
      <text:p text:style-name="Body">• Purpose</text:p>
      <text:p text:style-name="Body">• How to use the handbook</text:p>
      <text:p text:style-name="Body">• Revision history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1 – Football Before Formations</text:h>
      <text:p text:style-name="Body">[Content to be written]</text:p>
      <text:p text:style-name="Body">• Philosophy</text:p>
      <text:p text:style-name="Body">• Creating space</text:p>
      <text:p text:style-name="Body">• Principles</text:p>
      <text:p text:style-name="Body">• Manager's Notes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2 – Understanding the Match Engine</text:h>
      <text:p text:style-name="Body">[Content to be written]</text:p>
      <text:p text:style-name="Body">• Mentality</text:p>
      <text:p text:style-name="Body">• Roles</text:p>
      <text:p text:style-name="Body">• Duties</text:p>
      <text:p text:style-name="Body">• Attributes</text:p>
      <text:p text:style-name="Body">• Instructions</text:p>
      <text:p text:style-name="Body">• Interactions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3 – Tactical Blueprint</text:h>
      <text:p text:style-name="Body">[Content to be written]</text:p>
      <text:p text:style-name="Body">• In Possession</text:p>
      <text:p text:style-name="Body">• Out of Possession</text:p>
      <text:p text:style-name="Body">• Transitions</text:p>
      <text:p text:style-name="Body">• Rest Defence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4 – Team Instructions</text:h>
      <text:p text:style-name="Body">[Content to be written]</text:p>
      <text:p text:style-name="Body">• Instruction</text:p>
      <text:p text:style-name="Body">• Football Principle</text:p>
      <text:p text:style-name="Body">• FM Behaviour</text:p>
      <text:p text:style-name="Body">• Why I chose it</text:p>
      <text:p text:style-name="Body">• Data Hub Evidence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5 – Roles</text:h>
      <text:p text:style-name="Body">[Content to be written]</text:p>
      <text:p text:style-name="Body">• Role</text:p>
      <text:p text:style-name="Body">• Responsibilities</text:p>
      <text:p text:style-name="Body">• Attributes</text:p>
      <text:p text:style-name="Body">• PPMs</text:p>
      <text:p text:style-name="Body">• Recruitment</text:p>
      <text:p text:style-name="Body">• Training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6 – Match Management</text:h>
      <text:p text:style-name="Body">[Content to be written]</text:p>
      <text:p text:style-name="Body">• Pre-match</text:p>
      <text:p text:style-name="Body">• During Match</text:p>
      <text:p text:style-name="Body">• Half Time</text:p>
      <text:p text:style-name="Body">• Protect Lead</text:p>
      <text:p text:style-name="Body">• Chase Game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Chapter 7 – Analysis</text:h>
      <text:p text:style-name="Body">[Content to be written]</text:p>
      <text:p text:style-name="Body">• Average Positions</text:p>
      <text:p text:style-name="Body">• Defensive Actions</text:p>
      <text:p text:style-name="Body">• Dribbles</text:p>
      <text:p text:style-name="Body">• Crosses</text:p>
      <text:p text:style-name="Body">• xG</text:p>
      <text:p text:style-name="Body">• Case Study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  <text:h text:outline-level="1" text:style-name="H1">Appendix</text:h>
      <text:p text:style-name="Body">[Content to be written]</text:p>
      <text:p text:style-name="Body">• Revision Log</text:p>
      <text:p text:style-name="Body">• Manager's Journal</text:p>
      <text:p text:style-name="Body">• Future Experiments</text:p>
      <text:p text:style-name="Body"/>
      <text:p text:style-name="Body">✍ Manager's Journal</text:p>
      <text:p text:style-name="Body">____________________________________________</text:p>
      <text:p text:style-name="Body">____________________________________________</text:p>
      <text:p text:style-name="Body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1" style:family="paragraph" style:display-name="H1">
      <style:text-properties fo:font-size="20pt" fo:font-weight="bold"/>
    </style:style>
    <style:style style:name="H2" style:family="paragraph" style:display-name="H2">
      <style:text-properties fo:font-size="15pt" fo:font-weight="bold"/>
    </style:style>
    <style:style style:name="Body" style:family="paragraph" style:display-name="Body"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