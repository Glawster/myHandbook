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adornments="Bold" style:font-family-generic="swiss"/>
    <style:font-face style:name="Calibri2" svg:font-family="Calibri" style:font-adornments="Regular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atrick Hand" svg:font-family="'Patrick Hand'" style:font-adornments="Bold Italic" style:font-pitch="variable"/>
    <style:font-face style:name="Tahoma" svg:font-family="Tahoma"/>
    <style:font-face style:name="Tahoma1" svg:font-family="Tahoma" style:font-adornments="Regular" style:font-family-generic="swiss"/>
  </office:font-face-decls>
  <office:automatic-styles>
    <style:style style:name="P1" style:family="paragraph" style:parent-style-name="Body_20_Text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Preformatted_20_Text">
      <style:paragraph-properties fo:margin-top="0cm" fo:margin-bottom="0.499cm" style:contextual-spacing="false" fo:text-align="center" style:justify-single-word="false"/>
    </style:style>
    <style:style style:name="P4" style:family="paragraph" style:parent-style-name="Body_20_Text">
      <style:paragraph-properties fo:text-align="end" style:justify-single-word="false"/>
    </style:style>
    <style:style style:name="P5" style:family="paragraph" style:parent-style-name="Body_20_Text">
      <style:text-properties officeooo:rsid="0006db54" officeooo:paragraph-rsid="0006db54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Body_20_Text">
      <style:text-properties officeooo:paragraph-rsid="0038adb5"/>
    </style:style>
    <style:style style:name="P10" style:family="paragraph" style:parent-style-name="Evidence">
      <style:text-properties officeooo:paragraph-rsid="0038adb5"/>
    </style:style>
    <style:style style:name="P11" style:family="paragraph" style:parent-style-name="FM_20_Behaviour">
      <style:text-properties officeooo:paragraph-rsid="0038adb5"/>
    </style:style>
    <style:style style:name="P12" style:family="paragraph" style:parent-style-name="Match_20_Tip">
      <style:text-properties officeooo:paragraph-rsid="0038adb5"/>
    </style:style>
    <style:style style:name="P13" style:family="paragraph" style:parent-style-name="Tactical_20_Principle">
      <style:text-properties officeooo:paragraph-rsid="0038adb5"/>
    </style:style>
    <style:style style:name="P14" style:family="paragraph" style:parent-style-name="Evidence">
      <style:text-properties officeooo:paragraph-rsid="003ae2a1"/>
    </style:style>
    <style:style style:name="P15" style:family="paragraph" style:parent-style-name="Body_20_Text" style:list-style-name="L1"/>
    <style:style style:name="P16" style:family="paragraph" style:parent-style-name="Body_20_Text" style:list-style-name="L2"/>
    <style:style style:name="P17" style:family="paragraph" style:parent-style-name="Body_20_Text" style:list-style-name="L3"/>
    <style:style style:name="P18" style:family="paragraph" style:parent-style-name="Body_20_Text" style:list-style-name="L4"/>
    <style:style style:name="P19" style:family="paragraph" style:parent-style-name="Body_20_Text" style:list-style-name="L5"/>
    <style:style style:name="P20" style:family="paragraph" style:parent-style-name="Body_20_Text">
      <style:text-properties fo:font-style="italic" style:font-style-asian="italic" style:font-style-complex="italic"/>
    </style:style>
    <style:style style:name="P21" style:family="paragraph" style:parent-style-name="Body_20_Text" style:list-style-name="L6"/>
    <style:style style:name="P22" style:family="paragraph" style:parent-style-name="Body_20_Text" style:list-style-name="L7"/>
    <style:style style:name="P23" style:family="paragraph" style:parent-style-name="Body_20_Text" style:list-style-name="L8"/>
    <style:style style:name="P24" style:family="paragraph" style:parent-style-name="Body_20_Text" style:list-style-name="L9"/>
    <style:style style:name="P25" style:family="paragraph" style:parent-style-name="Chapter_20_Title">
      <style:text-properties officeooo:paragraph-rsid="0029a016"/>
    </style:style>
    <style:style style:name="P26" style:family="paragraph" style:parent-style-name="Chapter_20_Title" style:list-style-name="">
      <style:paragraph-properties fo:text-align="start" style:justify-single-word="false">
        <style:tab-stops>
          <style:tab-stop style:position="1.111cm"/>
        </style:tab-stops>
      </style:paragraph-properties>
    </style:style>
    <style:style style:name="P27" style:family="paragraph" style:parent-style-name="Chapter_20_Title" style:master-page-name="appendix">
      <style:paragraph-properties style:page-number="auto"/>
    </style:style>
    <style:style style:name="P28" style:family="paragraph" style:parent-style-name="FM_20_Behaviour">
      <style:text-properties fo:font-weight="bold" style:font-weight-asian="bold" style:font-weight-complex="bold"/>
    </style:style>
    <style:style style:name="P29" style:family="paragraph" style:parent-style-name="MJ_20_Text">
      <style:text-properties officeooo:paragraph-rsid="003edef6"/>
    </style:style>
    <style:style style:name="P30" style:family="paragraph" style:parent-style-name="Match_20_Tip">
      <style:text-properties fo:font-weight="bold" style:font-weight-asian="bold" style:font-weight-complex="bold"/>
    </style:style>
    <style:style style:name="P31" style:family="paragraph" style:parent-style-name="Part_20_Title" style:master-page-name="chapter">
      <style:paragraph-properties style:page-number="auto"/>
    </style:style>
    <style:style style:name="P32" style:family="paragraph" style:parent-style-name="Part_20_Title" style:master-page-name="chapter">
      <style:paragraph-properties style:page-number="auto"/>
      <style:text-properties officeooo:paragraph-rsid="0029a016"/>
    </style:style>
    <style:style style:name="P33" style:family="paragraph" style:parent-style-name="Part_20_Title" style:master-page-name="chapter">
      <style:paragraph-properties style:page-number="auto"/>
      <style:text-properties officeooo:paragraph-rsid="002a2237"/>
    </style:style>
    <style:style style:name="P34" style:family="paragraph" style:parent-style-name="Part_20_Title">
      <style:text-properties officeooo:paragraph-rsid="002a2237"/>
    </style:style>
    <style:style style:name="P35" style:family="paragraph" style:parent-style-name="Section_20_Title">
      <style:text-properties officeooo:paragraph-rsid="003edef6"/>
    </style:style>
    <style:style style:name="P36" style:family="paragraph" style:parent-style-name="Tactical_20_Principle">
      <style:text-properties officeooo:paragraph-rsid="003fe4f6"/>
    </style:style>
    <style:style style:name="T1" style:family="text">
      <style:text-properties officeooo:rsid="0011e173"/>
    </style:style>
    <style:style style:name="T2" style:family="text">
      <style:text-properties officeooo:rsid="00148293"/>
    </style:style>
    <style:style style:name="T3" style:family="text">
      <style:text-properties officeooo:rsid="002d8be8"/>
    </style:style>
    <style:style style:name="T4" style:family="text">
      <style:text-properties officeooo:rsid="0031826a"/>
    </style:style>
    <style:style style:name="T5" style:family="text">
      <style:text-properties officeooo:rsid="00331a96"/>
    </style:style>
    <style:style style:name="T6" style:family="text">
      <style:text-properties officeooo:rsid="0038910e"/>
    </style:style>
    <style:style style:name="T7" style:family="text">
      <style:text-properties officeooo:rsid="003ae2a1"/>
    </style:style>
    <style:style style:name="T8" style:family="text">
      <style:text-properties officeooo:rsid="0040999f"/>
    </style:style>
    <style:style style:name="fr1" style:family="graphic" style:parent-style-name="Post_20_It">
      <style:graphic-properties style:vertical-pos="top" style:vertical-rel="paragraph-content" style:horizontal-pos="outside" style:horizontal-rel="page-end-margin"/>
    </style:style>
    <style:style style:name="fr2" style:family="graphic" style:parent-style-name="Post_20_It">
      <style:graphic-properties style:vertical-pos="top" style:vertical-rel="paragraph-content" style:horizontal-pos="outside" style:horizontal-rel="page-end-margin"/>
    </style:style>
    <style:style style:name="fr3" style:family="graphic" style:parent-style-name="Post_20_It">
      <style:graphic-properties style:run-through="foreground" style:wrap="parallel" style:number-wrapped-paragraphs="no-limit" style:vertical-pos="top" style:vertical-rel="paragraph-content" style:horizontal-pos="outside" style:horizontal-rel="paragraph-content" fo:padding="0.199cm" fo:border="1.5pt solid #cccccc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ok_20_Title"><text:title>The Manager's Handbook</text:title></text:p>
      <text:p text:style-name="Book_20_Subtitle">Volume <text:user-defined style:data-style-name="N0" text:name="Volume">1</text:user-defined></text:p>
      <text:p text:style-name="Book_20_Subtitle"><text:subject>Philosophy and Tactical Blueprint</text:subject></text:p>
      <text:p text:style-name="Book_20_Subtitle"><text:user-defined style:data-style-name="N0" text:name="Author">Andy Wilson</text:user-defined></text:p>
      <text:p text:style-name="Book_20_Subtitle"><text:user-defined style:data-style-name="N0" text:name="FMVersion">Football Manager 2026 Edition</text:user-defined></text:p>
      <text:p text:style-name="Book_20_Subtitle">Version <text:user-defined style:data-style-name="N0" text:name="Version">0.1.0</text:user-defined></text:p>
      <text:p text:style-name="Book_20_Subtitle"/>
      <text:p text:style-name="Book_20_Subtitle"/>
      <text:table-of-content text:style-name="Sect1" text:protected="true" text:name="Table of Contents1">
        <text:table-of-content-source text:outline-level="4">
          <text:index-title-template text:style-name="Chapter_20_Title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Chapter_20_Title" text:outline-level="2">Table of Contents</text:h>
          </text:index-title>
          <text:p text:style-name="P6"><text:a xlink:type="simple" xlink:href="#__RefHeading___Toc956_3226105849" text:style-name="Index_20_Link" text:visited-style-name="Index_20_Link">Part I - Foundations<text:tab/>4</text:a></text:p>
          <text:p text:style-name="P7"><text:a xlink:type="simple" xlink:href="#__RefHeading___Toc306_3226105849" text:style-name="Index_20_Link" text:visited-style-name="Index_20_Link">Football Before Formations<text:tab/>4</text:a></text:p>
          <text:p text:style-name="P8"><text:a xlink:type="simple" xlink:href="#__RefHeading___Toc308_3226105849" text:style-name="Index_20_Link" text:visited-style-name="Index_20_Link">Why this handbook exists<text:tab/>4</text:a></text:p>
          <text:p text:style-name="P8"><text:a xlink:type="simple" xlink:href="#__RefHeading___Toc310_3226105849" text:style-name="Index_20_Link" text:visited-style-name="Index_20_Link">Football is about solving problems<text:tab/>4</text:a></text:p>
          <text:p text:style-name="P8"><text:a xlink:type="simple" xlink:href="#__RefHeading___Toc312_3226105849" text:style-name="Index_20_Link" text:visited-style-name="Index_20_Link">Principles before systems<text:tab/>4</text:a></text:p>
          <text:p text:style-name="P8"><text:a xlink:type="simple" xlink:href="#__RefHeading___Toc314_3226105849" text:style-name="Index_20_Link" text:visited-style-name="Index_20_Link">The manager's cycle<text:tab/>4</text:a></text:p>
          <text:p text:style-name="P8"><text:a xlink:type="simple" xlink:href="#__RefHeading___Toc316_3226105849" text:style-name="Index_20_Link" text:visited-style-name="Index_20_Link">How to use this handbook<text:tab/>4</text:a></text:p>
          <text:p text:style-name="P7"><text:a xlink:type="simple" xlink:href="#__RefHeading___Toc318_3226105849" text:style-name="Index_20_Link" text:visited-style-name="Index_20_Link">Understanding the Match Engine<text:tab/>4</text:a></text:p>
          <text:p text:style-name="P8"><text:a xlink:type="simple" xlink:href="#__RefHeading___Toc320_3226105849" text:style-name="Index_20_Link" text:visited-style-name="Index_20_Link">What FM actually simulates<text:tab/>4</text:a></text:p>
          <text:p text:style-name="P8"><text:a xlink:type="simple" xlink:href="#__RefHeading___Toc322_3226105849" text:style-name="Index_20_Link" text:visited-style-name="Index_20_Link">Decision making<text:tab/>4</text:a></text:p>
          <text:p text:style-name="P8"><text:a xlink:type="simple" xlink:href="#__RefHeading___Toc324_3226105849" text:style-name="Index_20_Link" text:visited-style-name="Index_20_Link">Attributes<text:tab/>4</text:a></text:p>
          <text:p text:style-name="P8"><text:a xlink:type="simple" xlink:href="#__RefHeading___Toc326_3226105849" text:style-name="Index_20_Link" text:visited-style-name="Index_20_Link">Roles<text:tab/>4</text:a></text:p>
          <text:p text:style-name="P8"><text:a xlink:type="simple" xlink:href="#__RefHeading___Toc328_3226105849" text:style-name="Index_20_Link" text:visited-style-name="Index_20_Link">Team Instructions<text:tab/>4</text:a></text:p>
          <text:p text:style-name="P8"><text:a xlink:type="simple" xlink:href="#__RefHeading___Toc330_3226105849" text:style-name="Index_20_Link" text:visited-style-name="Index_20_Link">Hidden interactions<text:tab/>4</text:a></text:p>
          <text:p text:style-name="P8"><text:a xlink:type="simple" xlink:href="#__RefHeading___Toc332_3226105849" text:style-name="Index_20_Link" text:visited-style-name="Index_20_Link">Match Engine vs Reality<text:tab/>4</text:a></text:p>
          <text:p text:style-name="P7"><text:a xlink:type="simple" xlink:href="#__RefHeading___Toc334_3226105849" text:style-name="Index_20_Link" text:visited-style-name="Index_20_Link">Building a Tactical Identity<text:tab/>5</text:a></text:p>
          <text:p text:style-name="P8"><text:a xlink:type="simple" xlink:href="#__RefHeading___Toc336_3226105849" text:style-name="Index_20_Link" text:visited-style-name="Index_20_Link">How do you want your team to play?<text:tab/>5</text:a></text:p>
          <text:p text:style-name="P8"><text:a xlink:type="simple" xlink:href="#__RefHeading___Toc338_3226105849" text:style-name="Index_20_Link" text:visited-style-name="Index_20_Link">Core principles<text:tab/>5</text:a></text:p>
          <text:p text:style-name="P8"><text:a xlink:type="simple" xlink:href="#__RefHeading___Toc340_3226105849" text:style-name="Index_20_Link" text:visited-style-name="Index_20_Link">Defensive identity<text:tab/>5</text:a></text:p>
          <text:p text:style-name="P8"><text:a xlink:type="simple" xlink:href="#__RefHeading___Toc342_3226105849" text:style-name="Index_20_Link" text:visited-style-name="Index_20_Link">Attacking identity<text:tab/>5</text:a></text:p>
          <text:p text:style-name="P8"><text:soft-page-break/><text:a xlink:type="simple" xlink:href="#__RefHeading___Toc344_3226105849" text:style-name="Index_20_Link" text:visited-style-name="Index_20_Link">Transition identity<text:tab/>5</text:a></text:p>
          <text:p text:style-name="P6"><text:a xlink:type="simple" xlink:href="#__RefHeading___Toc958_3226105849" text:style-name="Index_20_Link" text:visited-style-name="Index_20_Link">Part II - Tactical Blueprint<text:tab/>6</text:a></text:p>
          <text:p text:style-name="P7"><text:a xlink:type="simple" xlink:href="#__RefHeading___Toc346_3226105849" text:style-name="Index_20_Link" text:visited-style-name="Index_20_Link">Space<text:tab/>6</text:a></text:p>
          <text:p text:style-name="P8"><text:a xlink:type="simple" xlink:href="#__RefHeading___Toc348_3226105849" text:style-name="Index_20_Link" text:visited-style-name="Index_20_Link">Width<text:tab/>6</text:a></text:p>
          <text:p text:style-name="P8"><text:a xlink:type="simple" xlink:href="#__RefHeading___Toc350_3226105849" text:style-name="Index_20_Link" text:visited-style-name="Index_20_Link">Depth<text:tab/>6</text:a></text:p>
          <text:p text:style-name="P8"><text:a xlink:type="simple" xlink:href="#__RefHeading___Toc352_3226105849" text:style-name="Index_20_Link" text:visited-style-name="Index_20_Link">Half-spaces<text:tab/>6</text:a></text:p>
          <text:p text:style-name="P8"><text:a xlink:type="simple" xlink:href="#__RefHeading___Toc354_3226105849" text:style-name="Index_20_Link" text:visited-style-name="Index_20_Link">Central overloads<text:tab/>6</text:a></text:p>
          <text:p text:style-name="P8"><text:a xlink:type="simple" xlink:href="#__RefHeading___Toc356_3226105849" text:style-name="Index_20_Link" text:visited-style-name="Index_20_Link">Numerical superiority<text:tab/>6</text:a></text:p>
          <text:p text:style-name="P7"><text:a xlink:type="simple" xlink:href="#__RefHeading___Toc358_3226105849" text:style-name="Index_20_Link" text:visited-style-name="Index_20_Link">Team Shape<text:tab/>6</text:a></text:p>
          <text:p text:style-name="P8"><text:a xlink:type="simple" xlink:href="#__RefHeading___Toc360_3226105849" text:style-name="Index_20_Link" text:visited-style-name="Index_20_Link">Formations<text:tab/>6</text:a></text:p>
          <text:p text:style-name="P8"><text:a xlink:type="simple" xlink:href="#__RefHeading___Toc362_3226105849" text:style-name="Index_20_Link" text:visited-style-name="Index_20_Link">Rest defence<text:tab/>6</text:a></text:p>
          <text:p text:style-name="P8"><text:a xlink:type="simple" xlink:href="#__RefHeading___Toc364_3226105849" text:style-name="Index_20_Link" text:visited-style-name="Index_20_Link">Defensive shape<text:tab/>6</text:a></text:p>
          <text:p text:style-name="P8"><text:a xlink:type="simple" xlink:href="#__RefHeading___Toc366_3226105849" text:style-name="Index_20_Link" text:visited-style-name="Index_20_Link">Attacking shape<text:tab/>6</text:a></text:p>
          <text:p text:style-name="P8"><text:a xlink:type="simple" xlink:href="#__RefHeading___Toc368_3226105849" text:style-name="Index_20_Link" text:visited-style-name="Index_20_Link">Fluidity<text:tab/>6</text:a></text:p>
          <text:p text:style-name="P7"><text:a xlink:type="simple" xlink:href="#__RefHeading___Toc370_3226105849" text:style-name="Index_20_Link" text:visited-style-name="Index_20_Link">Mentality<text:tab/>6</text:a></text:p>
          <text:p text:style-name="P8"><text:a xlink:type="simple" xlink:href="#__RefHeading___Toc372_3226105849" text:style-name="Index_20_Link" text:visited-style-name="Index_20_Link">What mentality actually changes<text:tab/>6</text:a></text:p>
          <text:p text:style-name="P8"><text:a xlink:type="simple" xlink:href="#__RefHeading___Toc374_3226105849" text:style-name="Index_20_Link" text:visited-style-name="Index_20_Link">Team mentality vs player mentality<text:tab/>6</text:a></text:p>
          <text:p text:style-name="P8"><text:a xlink:type="simple" xlink:href="#__RefHeading___Toc376_3226105849" text:style-name="Index_20_Link" text:visited-style-name="Index_20_Link">Risk<text:tab/>7</text:a></text:p>
          <text:p text:style-name="P8"><text:a xlink:type="simple" xlink:href="#__RefHeading___Toc378_3226105849" text:style-name="Index_20_Link" text:visited-style-name="Index_20_Link">Tempo<text:tab/>7</text:a></text:p>
          <text:p text:style-name="P8"><text:a xlink:type="simple" xlink:href="#__RefHeading___Toc380_3226105849" text:style-name="Index_20_Link" text:visited-style-name="Index_20_Link">Pressing<text:tab/>7</text:a></text:p>
          <text:p text:style-name="P7"><text:a xlink:type="simple" xlink:href="#__RefHeading___Toc382_3226105849" text:style-name="Index_20_Link" text:visited-style-name="Index_20_Link">Team Instructions<text:tab/>7</text:a></text:p>
          <text:p text:style-name="P8"><text:a xlink:type="simple" xlink:href="#__RefHeading___Toc384_3226105849" text:style-name="Index_20_Link" text:visited-style-name="Index_20_Link">In Possession<text:tab/>7</text:a></text:p>
          <text:p text:style-name="P8"><text:a xlink:type="simple" xlink:href="#__RefHeading___Toc386_3226105849" text:style-name="Index_20_Link" text:visited-style-name="Index_20_Link">In Transition<text:tab/>7</text:a></text:p>
          <text:p text:style-name="P8"><text:a xlink:type="simple" xlink:href="#__RefHeading___Toc388_3226105849" text:style-name="Index_20_Link" text:visited-style-name="Index_20_Link">Out of Possession<text:tab/>7</text:a></text:p>
          <text:p text:style-name="P6"><text:a xlink:type="simple" xlink:href="#__RefHeading___Toc960_3226105849" text:style-name="Index_20_Link" text:visited-style-name="Index_20_Link">Part III - The Players<text:tab/>8</text:a></text:p>
          <text:p text:style-name="P7"><text:a xlink:type="simple" xlink:href="#__RefHeading___Toc390_3226105849" text:style-name="Index_20_Link" text:visited-style-name="Index_20_Link">Player Roles &amp; Duties<text:tab/>8</text:a></text:p>
          <text:p text:style-name="P8"><text:a xlink:type="simple" xlink:href="#__RefHeading___Toc392_3226105849" text:style-name="Index_20_Link" text:visited-style-name="Index_20_Link">Roles explained<text:tab/>8</text:a></text:p>
          <text:p text:style-name="P8"><text:a xlink:type="simple" xlink:href="#__RefHeading___Toc394_3226105849" text:style-name="Index_20_Link" text:visited-style-name="Index_20_Link">Duties<text:tab/>8</text:a></text:p>
          <text:p text:style-name="P8"><text:a xlink:type="simple" xlink:href="#__RefHeading___Toc396_3226105849" text:style-name="Index_20_Link" text:visited-style-name="Index_20_Link">Partnerships<text:tab/>8</text:a></text:p>
          <text:p text:style-name="P8"><text:a xlink:type="simple" xlink:href="#__RefHeading___Toc398_3226105849" text:style-name="Index_20_Link" text:visited-style-name="Index_20_Link">Complementary roles<text:tab/>8</text:a></text:p>
          <text:p text:style-name="P7"><text:a xlink:type="simple" xlink:href="#__RefHeading___Toc400_3226105849" text:style-name="Index_20_Link" text:visited-style-name="Index_20_Link">Player Instructions<text:tab/>8</text:a></text:p>
          <text:p text:style-name="P8"><text:a xlink:type="simple" xlink:href="#__RefHeading___Toc402_3226105849" text:style-name="Index_20_Link" text:visited-style-name="Index_20_Link">When to override a role<text:tab/>8</text:a></text:p>
          <text:p text:style-name="P8"><text:a xlink:type="simple" xlink:href="#__RefHeading___Toc404_3226105849" text:style-name="Index_20_Link" text:visited-style-name="Index_20_Link">Simplicity<text:tab/>8</text:a></text:p>
          <text:p text:style-name="P8"><text:soft-page-break/><text:a xlink:type="simple" xlink:href="#__RefHeading___Toc406_3226105849" text:style-name="Index_20_Link" text:visited-style-name="Index_20_Link">Common mistakes<text:tab/>8</text:a></text:p>
          <text:p text:style-name="P6"><text:a xlink:type="simple" xlink:href="#__RefHeading___Toc962_3226105849" text:style-name="Index_20_Link" text:visited-style-name="Index_20_Link">Part IV - Match Management<text:tab/>ix</text:a></text:p>
          <text:p text:style-name="P7"><text:a xlink:type="simple" xlink:href="#__RefHeading___Toc408_3226105849" text:style-name="Index_20_Link" text:visited-style-name="Index_20_Link">Opposition Analysis<text:tab/>ix</text:a></text:p>
          <text:p text:style-name="P8"><text:a xlink:type="simple" xlink:href="#__RefHeading___Toc410_3226105849" text:style-name="Index_20_Link" text:visited-style-name="Index_20_Link">Scouting<text:tab/>ix</text:a></text:p>
          <text:p text:style-name="P8"><text:a xlink:type="simple" xlink:href="#__RefHeading___Toc412_3226105849" text:style-name="Index_20_Link" text:visited-style-name="Index_20_Link">Opposition reports<text:tab/>ix</text:a></text:p>
          <text:p text:style-name="P8"><text:a xlink:type="simple" xlink:href="#__RefHeading___Toc414_3226105849" text:style-name="Index_20_Link" text:visited-style-name="Index_20_Link">Identifying weaknesses<text:tab/>ix</text:a></text:p>
          <text:p text:style-name="P7"><text:a xlink:type="simple" xlink:href="#__RefHeading___Toc416_3226105849" text:style-name="Index_20_Link" text:visited-style-name="Index_20_Link">Match Day<text:tab/>ix</text:a></text:p>
          <text:p text:style-name="P8"><text:a xlink:type="simple" xlink:href="#__RefHeading___Toc418_3226105849" text:style-name="Index_20_Link" text:visited-style-name="Index_20_Link">Reading the match<text:tab/>ix</text:a></text:p>
          <text:p text:style-name="P8"><text:a xlink:type="simple" xlink:href="#__RefHeading___Toc420_3226105849" text:style-name="Index_20_Link" text:visited-style-name="Index_20_Link">Tactical tweaks<text:tab/>ix</text:a></text:p>
          <text:p text:style-name="P8"><text:a xlink:type="simple" xlink:href="#__RefHeading___Toc422_3226105849" text:style-name="Index_20_Link" text:visited-style-name="Index_20_Link">Shouts<text:tab/>ix</text:a></text:p>
          <text:p text:style-name="P8"><text:a xlink:type="simple" xlink:href="#__RefHeading___Toc424_3226105849" text:style-name="Index_20_Link" text:visited-style-name="Index_20_Link">Substitutions<text:tab/>ix</text:a></text:p>
          <text:p text:style-name="P7"><text:a xlink:type="simple" xlink:href="#__RefHeading___Toc426_3226105849" text:style-name="Index_20_Link" text:visited-style-name="Index_20_Link">Performance Analysis<text:tab/>ix</text:a></text:p>
          <text:p text:style-name="P8"><text:a xlink:type="simple" xlink:href="#__RefHeading___Toc428_3226105849" text:style-name="Index_20_Link" text:visited-style-name="Index_20_Link">xG<text:tab/>ix</text:a></text:p>
          <text:p text:style-name="P8"><text:a xlink:type="simple" xlink:href="#__RefHeading___Toc430_3226105849" text:style-name="Index_20_Link" text:visited-style-name="Index_20_Link">Data Hub<text:tab/>ix</text:a></text:p>
          <text:p text:style-name="P8"><text:a xlink:type="simple" xlink:href="#__RefHeading___Toc432_3226105849" text:style-name="Index_20_Link" text:visited-style-name="Index_20_Link">Momentum<text:tab/>ix</text:a></text:p>
          <text:p text:style-name="P8"><text:a xlink:type="simple" xlink:href="#__RefHeading___Toc434_3226105849" text:style-name="Index_20_Link" text:visited-style-name="Index_20_Link">Player ratings<text:tab/>ix</text:a></text:p>
          <text:p text:style-name="P8"><text:a xlink:type="simple" xlink:href="#__RefHeading___Toc436_3226105849" text:style-name="Index_20_Link" text:visited-style-name="Index_20_Link">Learning from matches<text:tab/>ix</text:a></text:p>
          <text:p text:style-name="P7"><text:a xlink:type="simple" xlink:href="#__RefHeading___Toc274_874366845" text:style-name="Index_20_Link" text:visited-style-name="Index_20_Link">Appendix – Revision History<text:tab/>11</text:a></text:p>
        </text:index-body>
      </text:table-of-content>
      <text:p text:style-name="Body_20_Text"/>
      <text:h text:style-name="P31" text:outline-level="1"><text:bookmark-start text:name="__RefHeading___Toc956_3226105849"/>Part <text:span text:style-name="T3">I - </text:span>Foundations<text:bookmark-end text:name="__RefHeading___Toc956_3226105849"/></text:h>
      <text:h text:style-name="Chapter_20_Title" text:outline-level="2">Introduction</text:h>
      <text:p text:style-name="Body_20_Text">When I first started playing Football Manager <text:span text:style-name="T6">the game I didn’t know where to start. I turned to YouTube to see what helpful videos were out there in the search </text:span>for the perfect tactic.</text:p>
      <text:p text:style-name="Body_20_Text">Like many managers, I believed success could be downloaded, copied or recreated by choosing the right formation, selecting the best player roles and adjusting a handful of tactical instructions. <text:span text:style-name="T6">I</text:span>t worked for a while <text:span text:style-name="T6">but when it didn’t I didn’t know how t diagnose what was wrong and how to fix it.</text:span></text:p>
      <text:p text:style-name="Body_20_Text">Eventually I realised I was solving the wrong problem.</text:p>
      <text:p text:style-name="Body_20_Text">Football Manager is not won by finding a perfect tactic. It is won by making consistently better decisions than the opposition over the course of a season. Every match presents new challenges, every squad has different strengths and weaknesses, and every tactical decision involves compromise.</text:p>
      <text:p text:style-name="Body_20_Text">This handbook is the result of that realisation.</text:p>
      <text:p text:style-name="Body_20_Text">It is not intended to be a collection of "best tactics" or a guide to exploiting the match engine. Instead, it explains the way I <text:span text:style-name="T6">want to </text:span>approach Football Manager. The ideas within these pages are based on football principles, but they are always applied with one purpose in mind: <text:span text:style-name="T6">making things work like reality in </text:span>Football Manager <text:span text:style-name="T6">the game.</text:span></text:p>
      <text:p text:style-name="Body_20_Text">Throughout this handbook I will explain why I make tactical decisions before explaining how I implement them in the game. Whenever possible, I will use Football Manager's own tools—such as the Tactics screen, Match Analysis, Average Positions, Pass Maps and the Data Hub—to gather evidence and evaluate whether my decisions are working.</text:p>
      <text:p text:style-name="Body_20_Text">I do not expect every manager to reach the same conclusions that I do. Football Manager is one of the few games that rewards different approaches. A possession-based side, a direct counter-attacking team and a disciplined defensive unit can all be successful if they are built on clear ideas and managed consistently.</text:p>
      <text:p text:style-name="Body_20_Text">If, after reading this handbook, I find myself asking better questions, making more informed decisions and understanding why my team succeeds or fails, then this handbook has achieved its purpose.</text:p>
      <text:h text:style-name="P25" text:outline-level="2"><text:bookmark-start text:name="__RefHeading___Toc306_3226105849"/><text:soft-page-break/><text:span text:style-name="T6">F</text:span>ootball Before Formations<text:bookmark-end text:name="__RefHeading___Toc306_3226105849"/></text:h>
      <text:h text:style-name="Section_20_Title" text:outline-level="3"><text:bookmark-start text:name="__RefHeading___Toc308_3226105849"/>Why <text:span text:style-name="T5">T</text:span>his <text:span text:style-name="T5">H</text:span>andbook <text:span text:style-name="T5">E</text:span>xists <text:bookmark-end text:name="__RefHeading___Toc308_3226105849"/></text:h>
      <text:p text:style-name="Body_20_Text">When I first started playing Football Manager I didn't know where to begin. Like many managers, I searched YouTube and downloaded tactics that promised instant success.</text:p>
      <text:p text:style-name="Body_20_Text">Sometimes they worked.</text:p>
      <text:p text:style-name="Body_20_Text">Most of the time they didn't.</text:p>
      <text:p text:style-name="Body_20_Text">The biggest problem wasn't that the tactics were bad. It was that I didn't understand <text:span text:style-name="Strong_20_Emphasis">why</text:span> they worked, or why they eventually stopped working.</text:p>
      <text:p text:style-name="Body_20_Text">Over time I realised I wasn't learning Football Manager. I was copying someone else's decisions.</text:p>
      <text:p text:style-name="Body_20_Text">This handbook is my attempt to fix that.</text:p>
      <text:p text:style-name="Body_20_Text">It isn't about finding the perfect tactic.</text:p>
      <text:p text:style-name="Body_20_Text">It's about understanding the decisions that create a successful tactic and learning how to recognise when those decisions need to change.</text:p>
      <text:p text:style-name="Body_20_Text">Football provides the principles.</text:p>
      <text:p text:style-name="Body_20_Text"><draw:frame draw:style-name="fr3" draw:name="Frame2" text:anchor-type="paragraph" svg:width="6.001cm" draw:z-index="0"><draw:text-box fo:min-height="2.972cm"><text:p text:style-name="P29">Don’t copy decisions…</text:p><text:p text:style-name="P29">Understand why the decision was made.</text:p><text:p text:style-name="MJ_20_Text"/></draw:text-box></draw:frame>Football Manager provides the tools to test those principles.</text:p>
      <text:h text:style-name="Section_20_Title" text:outline-level="3"><text:bookmark-start text:name="__RefHeading___Toc310_3226105849"/>Football is <text:span text:style-name="T5">A</text:span>bout <text:span text:style-name="T5">S</text:span>olving <text:span text:style-name="T5">P</text:span>roblems <text:bookmark-end text:name="__RefHeading___Toc310_3226105849"/></text:h>
      <text:p text:style-name="Body_20_Text">Every tactical change should solve a problem.</text:p>
      <text:p text:style-name="Body_20_Text">Examples include:</text:p>
      <text:list xml:id="list2092115916" text:style-name="L1">
        <text:list-item>
          <text:p text:style-name="P15">My striker is isolated. </text:p>
        </text:list-item>
        <text:list-item>
          <text:p text:style-name="P15">We aren't creating enough chances. </text:p>
        </text:list-item>
        <text:list-item>
          <text:p text:style-name="P15">We're conceding too many crosses. </text:p>
        </text:list-item>
        <text:list-item>
          <text:p text:style-name="P15">The midfield can't progress the ball. </text:p>
        </text:list-item>
        <text:list-item>
          <text:p text:style-name="P15">The opposition always has a spare player. </text:p>
        </text:list-item>
        <text:list-item>
          <text:p text:style-name="P15">We lose possession too easily. </text:p>
        </text:list-item>
      </text:list>
      <text:p text:style-name="Body_20_Text">The first job isn't changing the tactic.</text:p>
      <text:p text:style-name="Body_20_Text">The first job is identifying the problem.</text:p>
      <text:p text:style-name="Body_20_Text">Only then can I decide what needs to change.</text:p>
      <text:p text:style-name="Body_20_Text">Football Manager provides plenty of evidence through Match Stats, Average Positions, Pass Maps, xG, the Data Hub and match replays.</text:p>
      <text:p text:style-name="Body_20_Text">The difficult part isn't finding information.</text:p>
      <text:p text:style-name="Body_20_Text">It's deciding which information matters.</text:p>
      <text:p text:style-name="P10"><text:soft-page-break/><text:span text:style-name="Strong_20_Emphasis">Question</text:span></text:p>
      <text:p text:style-name="Evidence">What problem am I trying to solve?</text:p>
      <text:p text:style-name="P14"><text:span text:style-name="Strong_20_Emphasis">Useful FM Screens</text:span></text:p>
      <text:p text:style-name="P14"><text:span text:style-name="Strong_20_Emphasis">- </text:span>Match Stats </text:p>
      <text:p text:style-name="Evidence">- Average Positions </text:p>
      <text:p text:style-name="Evidence">- Pass Map </text:p>
      <text:p text:style-name="Evidence">- Shot Map </text:p>
      <text:p text:style-name="Evidence">- Data Hub </text:p>
      <text:p text:style-name="Evidence">- Match Replay</text:p>
      <text:p text:style-name="Body_20_Text"/>
      <text:p text:style-name="P12"><text:span text:style-name="T7">I</text:span>f I can't explain why I'm changing an instruction, I probably shouldn't change it</text:p>
      <text:h text:style-name="Section_20_Title" text:outline-level="3"><text:bookmark-start text:name="__RefHeading___Toc312_3226105849"/>Principles <text:span text:style-name="T5">B</text:span>efore <text:span text:style-name="T5">S</text:span>ystems <text:bookmark-end text:name="__RefHeading___Toc312_3226105849"/></text:h>
      <text:p text:style-name="Body_20_Text">I no longer start with a formation.</text:p>
      <text:p text:style-name="Body_20_Text">I start with a set of principles.</text:p>
      <text:p text:style-name="Body_20_Text">For example:</text:p>
      <text:list xml:id="list1200488475" text:style-name="L2">
        <text:list-item>
          <text:p text:style-name="P16">I want to control possession. </text:p>
        </text:list-item>
        <text:list-item>
          <text:p text:style-name="P16">I want to press aggressively. </text:p>
        </text:list-item>
        <text:list-item>
          <text:p text:style-name="P16">I want to attack quickly after winning the ball. </text:p>
        </text:list-item>
        <text:list-item>
          <text:p text:style-name="P16">I want to defend compactly. </text:p>
        </text:list-item>
        <text:list-item>
          <text:p text:style-name="P16">I want to overload central areas. </text:p>
        </text:list-item>
      </text:list>
      <text:p text:style-name="Body_20_Text">Once I know <text:span text:style-name="Strong_20_Emphasis">how</text:span> I want to play, I can decide which formation, roles and instructions best support those ideas.</text:p>
      <text:p text:style-name="Body_20_Text">A formation should support my principles.</text:p>
      <text:p text:style-name="Body_20_Text">It should never define them.</text:p>
      <text:p text:style-name="P13">A formation is only the starting position.</text:p>
      <text:p text:style-name="Tactical_20_Principle">The football begins when the players start moving.</text:p>
      <text:p text:style-name="P11">Two managers can use exactly the same formation and produce completely different football.</text:p>
      <text:p text:style-name="FM_20_Behaviour">The difference comes from:</text:p>
      <text:p text:style-name="FM_20_Behaviour">- player roles</text:p>
      <text:p text:style-name="FM_20_Behaviour">- duties</text:p>
      <text:p text:style-name="FM_20_Behaviour"><text:soft-page-break/>- team instructions</text:p>
      <text:p text:style-name="FM_20_Behaviour">- player attributes</text:p>
      <text:p text:style-name="FM_20_Behaviour">- player traits</text:p>
      <text:p text:style-name="FM_20_Behaviour">- mentality</text:p>
      <text:p text:style-name="FM_20_Behaviour">The formation stays the same.</text:p>
      <text:p text:style-name="FM_20_Behaviour">The behaviour changes.</text:p>
      <text:p text:style-name="Body_20_Text"/>
      <text:h text:style-name="P35" text:outline-level="3">The <text:span text:style-name="T5">M</text:span>anager's <text:span text:style-name="T5">C</text:span>ycle </text:h>
      <text:p text:style-name="Body_20_Text">Every match follows the same process.</text:p>
      <text:section text:style-name="Sect2" text:name="code-block-viewer">
        <text:p text:style-name="P2"><text:span text:style-name="Source_20_Text">Observe</text:span></text:p>
        <text:p text:style-name="P2"><text:span text:style-name="Source_20_Text">↓</text:span></text:p>
        <text:p text:style-name="P2"><text:span text:style-name="Source_20_Text">Identify the problem</text:span></text:p>
        <text:p text:style-name="P2"><text:span text:style-name="Source_20_Text">↓</text:span></text:p>
        <text:p text:style-name="P2"><text:span text:style-name="Source_20_Text">Gather evidence</text:span></text:p>
        <text:p text:style-name="P2"><text:span text:style-name="Source_20_Text">↓</text:span></text:p>
        <text:p text:style-name="P2"><text:span text:style-name="Source_20_Text">Decide why it happened</text:span></text:p>
        <text:p text:style-name="P2"><text:span text:style-name="Source_20_Text">↓</text:span></text:p>
        <text:p text:style-name="P2"><text:span text:style-name="Source_20_Text">Make the smallest change possible</text:span></text:p>
        <text:p text:style-name="P2"><text:span text:style-name="Source_20_Text">↓</text:span></text:p>
        <text:p text:style-name="P3"><text:span text:style-name="Source_20_Text">Observe again</text:span></text:p>
      </text:section>
      <text:p text:style-name="Body_20_Text">I try to avoid making several tactical changes at once.</text:p>
      <text:p text:style-name="Body_20_Text">If I change four things and my team improves, I have no idea which change solved the problem.</text:p>
      <text:p text:style-name="Body_20_Text">Small changes are easier to evaluate.</text:p>
      <text:h text:style-name="Section_20_Title" text:outline-level="3"><text:bookmark-start text:name="__RefHeading___Toc316_3226105849"/>How to <text:span text:style-name="T5">U</text:span>se <text:span text:style-name="T5">T</text:span>his <text:span text:style-name="T5">H</text:span>andbook <text:bookmark-end text:name="__RefHeading___Toc316_3226105849"/></text:h>
      <text:p text:style-name="Body_20_Text">This handbook is written in the same order that I build a tactic.</text:p>
      <text:p text:style-name="Body_20_Text">I begin by deciding how I want my team to play.</text:p>
      <text:p text:style-name="Body_20_Text">I then translate those ideas into formations, roles and instructions.</text:p>
      <text:p text:style-name="Body_20_Text">Finally, I use Football Manager's analysis tools to decide whether my ideas are working.</text:p>
      <text:p text:style-name="Body_20_Text">Each chapter builds on the previous one.</text:p>
      <text:p text:style-name="Body_20_Text">Whenever possible I explain:</text:p>
      <text:list xml:id="list1647984943" text:style-name="L3">
        <text:list-item>
          <text:p text:style-name="P17">the football principle </text:p>
        </text:list-item>
        <text:list-item>
          <text:p text:style-name="P17">how Football Manager models it </text:p>
        </text:list-item>
        <text:list-item>
          <text:p text:style-name="P17">where I look for evidence </text:p>
        </text:list-item>
        <text:list-item>
          <text:p text:style-name="P17">how I decide what to change </text:p>
        </text:list-item>
      </text:list>
      <text:p text:style-name="P9">My aim isn't to build the best tactic.</text:p>
      <text:p text:style-name="P9"><text:soft-page-break/>My aim is to build a tactic that I understand.</text:p>
      <text:p text:style-name="P9">If I understand why it works, I have a much better chance of fixing it when it doesn't.</text:p>
      <text:h text:style-name="Section_20_Title" text:outline-level="3">Chapter Summary</text:h>
      <text:p text:style-name="Body_20_Text">Before changing a tactic, I ask myself four questions.</text:p>
      <text:list xml:id="list1206333087" text:style-name="L4">
        <text:list-item>
          <text:p text:style-name="P18">What problem am I trying to solve? </text:p>
        </text:list-item>
        <text:list-item>
          <text:p text:style-name="P18">What evidence supports that conclusion? </text:p>
        </text:list-item>
        <text:list-item>
          <text:p text:style-name="P18">What is the smallest change I can make? </text:p>
        </text:list-item>
        <text:list-item>
          <text:p text:style-name="P18">How will I know if it worked? </text:p>
        </text:list-item>
      </text:list>
      <text:p text:style-name="Body_20_Text">These four questions form the foundation of everything that follows.</text:p>
      <text:h text:style-name="Chapter_20_Title" text:outline-level="2"><text:bookmark-start text:name="__RefHeading___Toc318_3226105849"/><text:span text:style-name="Strong_20_Emphasis">Understanding the Match Engine</text:span><text:bookmark-end text:name="__RefHeading___Toc318_3226105849"/></text:h>
      <text:h text:style-name="Section_20_Title" text:outline-level="3">What FM Actually Simulates</text:h>
      <text:p text:style-name="Body_20_Text"/>
      <text:p text:style-name="Body_20_Text">Football Manager doesn't simulate every kick of a football.</text:p>
      <text:p text:style-name="Body_20_Text">It simulates thousands of decisions.</text:p>
      <text:p text:style-name="Body_20_Text">Every player is constantly making choices based on the information available to them.</text:p>
      <text:p text:style-name="Body_20_Text">Questions like:</text:p>
      <text:list xml:id="list2586600390" text:style-name="L5">
        <text:list-item>
          <text:p text:style-name="P19">Should I pass or dribble?</text:p>
        </text:list-item>
        <text:list-item>
          <text:p text:style-name="P19">Do I press or hold my position?</text:p>
        </text:list-item>
        <text:list-item>
          <text:p text:style-name="P19">Should I cross or recycle possession?</text:p>
        </text:list-item>
        <text:list-item>
          <text:p text:style-name="P19">Can I reach the ball first?</text:p>
        </text:list-item>
        <text:list-item>
          <text:p text:style-name="P19">Is there space behind the defence?</text:p>
        </text:list-item>
      </text:list>
      <text:p text:style-name="Body_20_Text">The match engine evaluates these decisions using the player's attributes, tactical instructions, role, mentality and the situation on the pitch.</text:p>
      <text:p text:style-name="Body_20_Text">The result is a football match that feels realistic because the decisions are realistic.</text:p>
      <text:p text:style-name="Body_20_Text">Understanding this changes how I think about tactics.</text:p>
      <text:p text:style-name="Body_20_Text">Instead of asking,</text:p>
      <text:p text:style-name="P20">"What instruction should I use?"</text:p>
      <text:p text:style-name="Body_20_Text">I ask,</text:p>
      <text:p text:style-name="P20">"What decisions am I asking my players to make?"</text:p>
      <text:p text:style-name="Tactical_20_Principle">Players don't follow scripts.</text:p>
      <text:p text:style-name="P36">They solve problems using the abilities they possess.</text:p>
      <text:p text:style-name="P36"><text:soft-page-break/>Football Manager attempts to model those decisions.</text:p>
      <text:p text:style-name="Body_20_Text"/>
      <text:p text:style-name="Body_20_Text"><draw:frame draw:style-name="fr2" draw:name="Frame1" text:anchor-type="paragraph" svg:width="6.001cm" draw:z-index="1"><draw:text-box fo:min-height="0.55cm"><text:p text:style-name="MJ_20_Text">Every instruction changes the decisions my players are likely to make.</text:p></draw:text-box></draw:frame></text:p>
      <text:p text:style-name="Body_20_Text"/>
      <text:h text:style-name="Section_20_Title" text:outline-level="3">Decision Making</text:h>
      <text:p text:style-name="Body_20_Text">Every player is trying to solve the same problem.</text:p>
      <text:p text:style-name="P20">What is the best action right now?</text:p>
      <text:p text:style-name="Body_20_Text">Some players consistently make good decisions.</text:p>
      <text:p text:style-name="Body_20_Text">Others don't.</text:p>
      <text:p text:style-name="Body_20_Text">Decision making isn't controlled by a single attribute.</text:p>
      <text:p text:style-name="Body_20_Text">It is influenced by several attributes working together.</text:p>
      <text:p text:style-name="Body_20_Text">For example:</text:p>
      <text:list xml:id="list1408910451" text:style-name="L6">
        <text:list-item>
          <text:p text:style-name="P21">Vision helps a player see passing options.</text:p>
        </text:list-item>
        <text:list-item>
          <text:p text:style-name="P21">Decisions influences the action they choose.</text:p>
        </text:list-item>
        <text:list-item>
          <text:p text:style-name="P21">Composure affects how they react under pressure.</text:p>
        </text:list-item>
        <text:list-item>
          <text:p text:style-name="P21">Technique determines whether they can execute the action successfully.</text:p>
        </text:list-item>
      </text:list>
      <text:p text:style-name="Body_20_Text">A player may recognise the perfect pass but lack the technique to play it.</text:p>
      <text:p text:style-name="Body_20_Text">Another may have the technique but never recognise the opportunity.</text:p>
      <text:p text:style-name="Body_20_Text">Good footballers combine both.</text:p>
      <text:p text:style-name="P28">FM Behaviour</text:p>
      <text:p text:style-name="FM_20_Behaviour">Improving a player's options doesn't guarantee they will choose the best one.</text:p>
      <text:p text:style-name="FM_20_Behaviour">Likewise, choosing the correct tactic won't help if the players can't execute it.</text:p>
      <text:p text:style-name="P30">Match Tip</text:p>
      <text:p text:style-name="Match_20_Tip">When a player repeatedly makes poor decisions, consider whether the tactic is asking too much of them.</text:p>
      <text:p text:style-name="Body_20_Text"/>
      <text:h text:style-name="Section_20_Title" text:outline-level="3">Attributes</text:h>
      <text:p text:style-name="Body_20_Text">Attributes describe what a player is capable of doing.</text:p>
      <text:p text:style-name="Body_20_Text">They do not guarantee success.</text:p>
      <text:p text:style-name="Body_20_Text">High Passing doesn't mean every pass will be accurate.</text:p>
      <text:p text:style-name="Body_20_Text">High Finishing doesn't mean every shot will score.</text:p>
      <text:p text:style-name="Body_20_Text"><text:soft-page-break/>Instead, attributes influence the likelihood of success over hundreds of actions.</text:p>
      <text:p text:style-name="Body_20_Text">This is why Football Manager should always be judged over a series of matches rather than a single result.</text:p>
      <text:p text:style-name="Body_20_Text">Even excellent decisions sometimes fail.</text:p>
      <text:p text:style-name="Evidence">When assessing a player's performance, don't focus on one mistake.</text:p>
      <text:p text:style-name="Evidence">Look for repeated patterns over multiple matches.</text:p>
      <text:h text:style-name="Section_20_Title" text:outline-level="3">Roles</text:h>
      <text:p text:style-name="Body_20_Text">Roles describe how I want a player to contribute to the team.</text:p>
      <text:p text:style-name="Body_20_Text">They are not positions.</text:p>
      <text:p text:style-name="Body_20_Text">A Complete Forward and an Advanced Forward may both play as a striker, but they solve different problems.</text:p>
      <text:p text:style-name="Body_20_Text">Likewise, two Central Midfielders can perform very different functions depending on their role and duty.</text:p>
      <text:p text:style-name="Body_20_Text">Roles should support my tactical principles.</text:p>
      <text:p text:style-name="Body_20_Text">I choose the role because it helps the team achieve something.</text:p>
      <text:p text:style-name="Body_20_Text">I don't choose it because it looks interesting.</text:p>
      <text:p text:style-name="Tactical_20_Principle">Every role should have a purpose.</text:p>
      <text:p text:style-name="Tactical_20_Principle">If I can't explain why a player has a particular role, I should probably reconsider it.</text:p>
      <text:h text:style-name="Section_20_Title" text:outline-level="3">Team Instructions</text:h>
      <text:p text:style-name="Body_20_Text">T<text:span text:style-name="T8">e</text:span>am Instructions influence the behaviour of the entire team.</text:p>
      <text:p text:style-name="Body_20_Text">Rather than controlling individual players, they create a shared approach.</text:p>
      <text:p text:style-name="Body_20_Text">For example:</text:p>
      <text:list xml:id="list792739376" text:style-name="L7">
        <text:list-item>
          <text:p text:style-name="P22">Higher Tempo encourages quicker decisions.</text:p>
        </text:list-item>
        <text:list-item>
          <text:p text:style-name="P22">Shorter Passing encourages safer passing options.</text:p>
        </text:list-item>
        <text:list-item>
          <text:p text:style-name="P22">Higher Defensive Line changes where the team defends.</text:p>
        </text:list-item>
        <text:list-item>
          <text:p text:style-name="P22">Counter-Press changes behaviour immediately after losing possession.</text:p>
        </text:list-item>
      </text:list>
      <text:p text:style-name="Body_20_Text">Each instruction affects several parts of the game.</text:p>
      <text:p text:style-name="Body_20_Text">Very few instructions operate in isolation.</text:p>
      <text:p text:style-name="Warning">Adding more instructions doesn't automatically improve a tactic.</text:p>
      <text:p text:style-name="Warning">Every instruction introduces another compromise.</text:p>
      <text:p text:style-name="Warning"><text:soft-page-break/></text:p>
      <text:h text:style-name="Section_20_Title" text:outline-level="3">Hidden Interactions</text:h>
      <text:p text:style-name="Body_20_Text">One of the biggest mistakes I made was treating every instruction as independent.</text:p>
      <text:p text:style-name="Body_20_Text">They're not.</text:p>
      <text:p text:style-name="Body_20_Text"><draw:frame draw:style-name="fr1" draw:name="Frame3" text:anchor-type="paragraph" svg:width="6.001cm" draw:z-index="2"><draw:text-box fo:min-height="0.55cm"><text:p text:style-name="MJ_20_Text">Every tactical instruction has a cost.</text:p><text:p text:style-name="MJ_20_Text">My job is deciding whether the benefit is worth paying for.</text:p></draw:text-box></draw:frame>Changing one instruction often changes the effectiveness of another.</text:p>
      <text:p text:style-name="Body_20_Text">For example:</text:p>
      <text:list xml:id="list3918758326" text:style-name="L8">
        <text:list-item>
          <text:p text:style-name="P23">Increasing Tempo reduces the time available to make decisions.</text:p>
        </text:list-item>
        <text:list-item>
          <text:p text:style-name="P23">A Higher Defensive Line increases the space behind the defence.</text:p>
        </text:list-item>
        <text:list-item>
          <text:p text:style-name="P23">A Narrow Attack naturally creates more space on the wings.</text:p>
        </text:list-item>
      </text:list>
      <text:p text:style-name="Body_20_Text">The match engine is evaluating all of these together.</text:p>
      <text:p text:style-name="Body_20_Text">Because of this, I prefer making one tactical change at a time.</text:p>
      <text:p text:style-name="Body_20_Text">It becomes much easier to understand what actually caused the improvement.</text:p>
      <text:h text:style-name="Section_20_Title" text:outline-level="3">Match Engine vs Reality</text:h>
      <text:p text:style-name="Body_20_Text">Football Manager is a simulation.</text:p>
      <text:p text:style-name="Body_20_Text">Like every simulation, it simplifies reality.</text:p>
      <text:p text:style-name="Body_20_Text">Real football contains thousands of variables that cannot be modelled completely.</text:p>
      <text:p text:style-name="Body_20_Text">Weather.</text:p>
      <text:p text:style-name="Body_20_Text">Communication.</text:p>
      <text:p text:style-name="Body_20_Text">Confidence.</text:p>
      <text:p text:style-name="Body_20_Text">Luck.</text:p>
      <text:p text:style-name="Body_20_Text">Individual moments of brilliance.</text:p>
      <text:p text:style-name="Body_20_Text">The match engine captures many of these ideas, but never perfectly.</text:p>
      <text:p text:style-name="Body_20_Text">That isn't a weakness.</text:p>
      <text:p text:style-name="Body_20_Text">It's simply the nature of a simulation.</text:p>
      <text:p text:style-name="Body_20_Text">The goal isn't to recreate football exactly.</text:p>
      <text:p text:style-name="Body_20_Text">The goal is to create a believable environment where football principles generally produce believable results.</text:p>
      <text:p text:style-name="Body_20_Text">Understanding this helps me avoid chasing exploits.</text:p>
      <text:p text:style-name="Body_20_Text">Instead, I try to build tactics that make footballing sense.</text:p>
      <text:p text:style-name="Body_20_Text">Those tactics tend to remain effective across multiple versions of Football Manager.</text:p>
      <text:h text:style-name="Section_20_Title" text:outline-level="3"><text:soft-page-break/>Chapter Summary</text:h>
      <text:p text:style-name="Body_20_Text">The match engine isn't trying to simulate football.</text:p>
      <text:p text:style-name="Body_20_Text">It's trying to simulate footballers making decisions.</text:p>
      <text:p text:style-name="Body_20_Text">Those decisions are influenced by:</text:p>
      <text:list xml:id="list1017124915" text:style-name="L9">
        <text:list-item>
          <text:p text:style-name="P24">attributes</text:p>
        </text:list-item>
        <text:list-item>
          <text:p text:style-name="P24">roles</text:p>
        </text:list-item>
        <text:list-item>
          <text:p text:style-name="P24">duties</text:p>
        </text:list-item>
        <text:list-item>
          <text:p text:style-name="P24">team instructions</text:p>
        </text:list-item>
        <text:list-item>
          <text:p text:style-name="P24">mentality</text:p>
        </text:list-item>
        <text:list-item>
          <text:p text:style-name="P24">the situation on the pitch</text:p>
        </text:list-item>
      </text:list>
      <text:p text:style-name="Body_20_Text">The better I understand those interactions, the easier it becomes to understand why my tactic succeeds or fails.</text:p>
      <text:h text:style-name="Chapter_20_Title" text:outline-level="2"><text:bookmark-start text:name="__RefHeading___Toc334_3226105849"/><text:span text:style-name="Strong_20_Emphasis">Building a Tactical Identity</text:span><text:bookmark-end text:name="__RefHeading___Toc334_3226105849"/></text:h>
      <text:h text:style-name="Section_20_Title" text:outline-level="3"><text:bookmark-start text:name="__RefHeading___Toc336_3226105849"/>How <text:span text:style-name="T5">D</text:span>o <text:span text:style-name="T5">Y</text:span>ou <text:span text:style-name="T5">W</text:span>ant <text:span text:style-name="T5">Y</text:span>our <text:span text:style-name="T5">T</text:span>eam to <text:span text:style-name="T5">P</text:span>lay? <text:bookmark-end text:name="__RefHeading___Toc336_3226105849"/></text:h>
      <text:h text:style-name="Section_20_Title" text:outline-level="3"><text:bookmark-start text:name="__RefHeading___Toc338_3226105849"/>Core <text:span text:style-name="T5">P</text:span>rinciples <text:bookmark-end text:name="__RefHeading___Toc338_3226105849"/></text:h>
      <text:h text:style-name="Section_20_Title" text:outline-level="3"><text:bookmark-start text:name="__RefHeading___Toc340_3226105849"/>Defensive <text:span text:style-name="T5">I</text:span>dentity <text:bookmark-end text:name="__RefHeading___Toc340_3226105849"/></text:h>
      <text:h text:style-name="Section_20_Title" text:outline-level="3"><text:bookmark-start text:name="__RefHeading___Toc342_3226105849"/>Attacking <text:span text:style-name="T5">I</text:span>dentity <text:bookmark-end text:name="__RefHeading___Toc342_3226105849"/></text:h>
      <text:h text:style-name="Section_20_Title" text:outline-level="3"><text:bookmark-start text:name="__RefHeading___Toc344_3226105849"/>Transition <text:span text:style-name="T5">I</text:span>dentity <text:bookmark-end text:name="__RefHeading___Toc344_3226105849"/></text:h>
      <text:h text:style-name="P32" text:outline-level="1"><text:bookmark-start text:name="__RefHeading___Toc958_3226105849"/>Part <text:span text:style-name="T3">II - </text:span>Tactical Blueprint<text:bookmark-end text:name="__RefHeading___Toc958_3226105849"/></text:h>
      <text:h text:style-name="Chapter_20_Title" text:outline-level="2"><text:bookmark-start text:name="__RefHeading___Toc346_3226105849"/><text:soft-page-break/><text:span text:style-name="Strong_20_Emphasis">Space</text:span><text:bookmark-end text:name="__RefHeading___Toc346_3226105849"/></text:h>
      <text:h text:style-name="Section_20_Title" text:outline-level="3"><text:bookmark-start text:name="__RefHeading___Toc348_3226105849"/>Width <text:bookmark-end text:name="__RefHeading___Toc348_3226105849"/></text:h>
      <text:h text:style-name="Section_20_Title" text:outline-level="3"><text:bookmark-start text:name="__RefHeading___Toc350_3226105849"/>Depth <text:bookmark-end text:name="__RefHeading___Toc350_3226105849"/></text:h>
      <text:h text:style-name="Section_20_Title" text:outline-level="3"><text:bookmark-start text:name="__RefHeading___Toc352_3226105849"/>Half-<text:span text:style-name="T5">S</text:span>paces <text:bookmark-end text:name="__RefHeading___Toc352_3226105849"/></text:h>
      <text:h text:style-name="Section_20_Title" text:outline-level="3"><text:bookmark-start text:name="__RefHeading___Toc354_3226105849"/>Central <text:span text:style-name="T5">O</text:span>verloads <text:bookmark-end text:name="__RefHeading___Toc354_3226105849"/></text:h>
      <text:h text:style-name="Section_20_Title" text:outline-level="3"><text:bookmark-start text:name="__RefHeading___Toc356_3226105849"/>Numerical <text:span text:style-name="T5">S</text:span>uperiority<text:bookmark-end text:name="__RefHeading___Toc356_3226105849"/></text:h>
      <text:h text:style-name="Chapter_20_Title" text:outline-level="2"><text:bookmark-start text:name="__RefHeading___Toc358_3226105849"/><text:span text:style-name="Strong_20_Emphasis">Team Shape</text:span><text:bookmark-end text:name="__RefHeading___Toc358_3226105849"/></text:h>
      <text:h text:style-name="Section_20_Title" text:outline-level="3"><text:bookmark-start text:name="__RefHeading___Toc360_3226105849"/>Formations <text:bookmark-end text:name="__RefHeading___Toc360_3226105849"/></text:h>
      <text:h text:style-name="Section_20_Title" text:outline-level="3"><text:bookmark-start text:name="__RefHeading___Toc362_3226105849"/>Rest <text:span text:style-name="T5">D</text:span>efence <text:bookmark-end text:name="__RefHeading___Toc362_3226105849"/></text:h>
      <text:h text:style-name="Section_20_Title" text:outline-level="3"><text:bookmark-start text:name="__RefHeading___Toc364_3226105849"/>Defensive <text:span text:style-name="T5">S</text:span>hape <text:bookmark-end text:name="__RefHeading___Toc364_3226105849"/></text:h>
      <text:h text:style-name="Section_20_Title" text:outline-level="3"><text:bookmark-start text:name="__RefHeading___Toc366_3226105849"/>Attacking <text:span text:style-name="T5">S</text:span>hape <text:bookmark-end text:name="__RefHeading___Toc366_3226105849"/></text:h>
      <text:h text:style-name="Section_20_Title" text:outline-level="3"><text:bookmark-start text:name="__RefHeading___Toc368_3226105849"/>Fluidity <text:bookmark-end text:name="__RefHeading___Toc368_3226105849"/></text:h>
      <text:h text:style-name="Chapter_20_Title" text:outline-level="2"><text:bookmark-start text:name="__RefHeading___Toc370_3226105849"/><text:soft-page-break/><text:span text:style-name="Strong_20_Emphasis">Mentality</text:span><text:bookmark-end text:name="__RefHeading___Toc370_3226105849"/></text:h>
      <text:h text:style-name="Section_20_Title" text:outline-level="3"><text:bookmark-start text:name="__RefHeading___Toc372_3226105849"/>What <text:span text:style-name="T5">M</text:span>entality <text:span text:style-name="T5">A</text:span>ctually <text:span text:style-name="T5">C</text:span>hanges <text:bookmark-end text:name="__RefHeading___Toc372_3226105849"/></text:h>
      <text:h text:style-name="Section_20_Title" text:outline-level="3"><text:bookmark-start text:name="__RefHeading___Toc374_3226105849"/>Team <text:span text:style-name="T5">M</text:span>entality vs <text:span text:style-name="T5">P</text:span>layer <text:span text:style-name="T5">M</text:span>entality <text:bookmark-end text:name="__RefHeading___Toc374_3226105849"/></text:h>
      <text:h text:style-name="Section_20_Title" text:outline-level="3"><text:bookmark-start text:name="__RefHeading___Toc376_3226105849"/>Risk <text:bookmark-end text:name="__RefHeading___Toc376_3226105849"/></text:h>
      <text:h text:style-name="Section_20_Title" text:outline-level="3"><text:bookmark-start text:name="__RefHeading___Toc378_3226105849"/>Tempo <text:bookmark-end text:name="__RefHeading___Toc378_3226105849"/></text:h>
      <text:h text:style-name="Section_20_Title" text:outline-level="3"><text:bookmark-start text:name="__RefHeading___Toc380_3226105849"/>Pressing <text:bookmark-end text:name="__RefHeading___Toc380_3226105849"/></text:h>
      <text:h text:style-name="Chapter_20_Title" text:outline-level="2"><text:bookmark-start text:name="__RefHeading___Toc382_3226105849"/><text:span text:style-name="Strong_20_Emphasis">Team Instructions</text:span><text:bookmark-end text:name="__RefHeading___Toc382_3226105849"/></text:h>
      <text:h text:style-name="Section_20_Title" text:outline-level="3"><text:bookmark-start text:name="__RefHeading___Toc384_3226105849"/>In Possession <text:bookmark-end text:name="__RefHeading___Toc384_3226105849"/></text:h>
      <text:h text:style-name="Section_20_Title" text:outline-level="3"><text:bookmark-start text:name="__RefHeading___Toc386_3226105849"/>In Transition <text:bookmark-end text:name="__RefHeading___Toc386_3226105849"/></text:h>
      <text:h text:style-name="Section_20_Title" text:outline-level="3"><text:bookmark-start text:name="__RefHeading___Toc388_3226105849"/>Out of Possession <text:bookmark-end text:name="__RefHeading___Toc388_3226105849"/></text:h>
      <text:h text:style-name="P33" text:outline-level="1"><text:bookmark-start text:name="__RefHeading___Toc960_3226105849"/>Part <text:span text:style-name="T3">III - </text:span>The Players<text:bookmark-end text:name="__RefHeading___Toc960_3226105849"/></text:h>
      <text:h text:style-name="Chapter_20_Title" text:outline-level="2"><text:bookmark-start text:name="__RefHeading___Toc390_3226105849"/><text:span text:style-name="Strong_20_Emphasis">Player Roles &amp; Duties</text:span><text:bookmark-end text:name="__RefHeading___Toc390_3226105849"/></text:h>
      <text:h text:style-name="Section_20_Title" text:outline-level="3"><text:bookmark-start text:name="__RefHeading___Toc392_3226105849"/>Roles <text:span text:style-name="T4">E</text:span>xplained <text:bookmark-end text:name="__RefHeading___Toc392_3226105849"/></text:h>
      <text:h text:style-name="Section_20_Title" text:outline-level="3"><text:bookmark-start text:name="__RefHeading___Toc394_3226105849"/>Duties <text:bookmark-end text:name="__RefHeading___Toc394_3226105849"/></text:h>
      <text:h text:style-name="Section_20_Title" text:outline-level="3"><text:bookmark-start text:name="__RefHeading___Toc396_3226105849"/>Partnerships <text:bookmark-end text:name="__RefHeading___Toc396_3226105849"/></text:h>
      <text:h text:style-name="Section_20_Title" text:outline-level="3"><text:bookmark-start text:name="__RefHeading___Toc398_3226105849"/>Complementary <text:span text:style-name="T4">R</text:span>oles <text:bookmark-end text:name="__RefHeading___Toc398_3226105849"/></text:h>
      <text:h text:style-name="Chapter_20_Title" text:outline-level="2"><text:bookmark-start text:name="__RefHeading___Toc400_3226105849"/><text:span text:style-name="Strong_20_Emphasis">Player Instructions</text:span><text:bookmark-end text:name="__RefHeading___Toc400_3226105849"/></text:h>
      <text:h text:style-name="Section_20_Title" text:outline-level="3"><text:bookmark-start text:name="__RefHeading___Toc402_3226105849"/>When to <text:span text:style-name="T4">O</text:span>verride a <text:span text:style-name="T4">R</text:span>ole <text:bookmark-end text:name="__RefHeading___Toc402_3226105849"/></text:h>
      <text:h text:style-name="Section_20_Title" text:outline-level="3"><text:bookmark-start text:name="__RefHeading___Toc404_3226105849"/>Simplicity <text:bookmark-end text:name="__RefHeading___Toc404_3226105849"/></text:h>
      <text:h text:style-name="Section_20_Title" text:outline-level="3"><text:bookmark-start text:name="__RefHeading___Toc406_3226105849"/>Common <text:span text:style-name="T4">M</text:span>istakes <text:bookmark-end text:name="__RefHeading___Toc406_3226105849"/></text:h>
      <text:h text:style-name="P34" text:outline-level="1"><text:bookmark-start text:name="__RefHeading___Toc962_3226105849"/>Part <text:span text:style-name="T3">IV - </text:span>Match Management<text:bookmark-end text:name="__RefHeading___Toc962_3226105849"/></text:h>
      <text:h text:style-name="Chapter_20_Title" text:outline-level="2"><text:bookmark-start text:name="__RefHeading___Toc408_3226105849"/><text:span text:style-name="Strong_20_Emphasis">Opposition Analysis</text:span><text:bookmark-end text:name="__RefHeading___Toc408_3226105849"/></text:h>
      <text:h text:style-name="Section_20_Title" text:outline-level="3"><text:bookmark-start text:name="__RefHeading___Toc410_3226105849"/>Scouting <text:bookmark-end text:name="__RefHeading___Toc410_3226105849"/></text:h>
      <text:h text:style-name="Section_20_Title" text:outline-level="3"><text:bookmark-start text:name="__RefHeading___Toc412_3226105849"/>Opposition reports <text:bookmark-end text:name="__RefHeading___Toc412_3226105849"/></text:h>
      <text:h text:style-name="Section_20_Title" text:outline-level="3"><text:bookmark-start text:name="__RefHeading___Toc414_3226105849"/>Identifying weaknesses <text:bookmark-end text:name="__RefHeading___Toc414_3226105849"/></text:h>
      <text:h text:style-name="Chapter_20_Title" text:outline-level="2"><text:bookmark-start text:name="__RefHeading___Toc416_3226105849"/><text:span text:style-name="Strong_20_Emphasis">Match Day</text:span><text:bookmark-end text:name="__RefHeading___Toc416_3226105849"/></text:h>
      <text:h text:style-name="Section_20_Title" text:outline-level="3"><text:bookmark-start text:name="__RefHeading___Toc418_3226105849"/>Reading the match <text:bookmark-end text:name="__RefHeading___Toc418_3226105849"/></text:h>
      <text:h text:style-name="Section_20_Title" text:outline-level="3"><text:bookmark-start text:name="__RefHeading___Toc420_3226105849"/>Tactical tweaks <text:bookmark-end text:name="__RefHeading___Toc420_3226105849"/></text:h>
      <text:h text:style-name="Section_20_Title" text:outline-level="3"><text:bookmark-start text:name="__RefHeading___Toc422_3226105849"/>Shouts <text:bookmark-end text:name="__RefHeading___Toc422_3226105849"/></text:h>
      <text:h text:style-name="Section_20_Title" text:outline-level="3"><text:bookmark-start text:name="__RefHeading___Toc424_3226105849"/>Substitutions <text:bookmark-end text:name="__RefHeading___Toc424_3226105849"/></text:h>
      <text:h text:style-name="Chapter_20_Title" text:outline-level="2"><text:bookmark-start text:name="__RefHeading___Toc426_3226105849"/><text:span text:style-name="Strong_20_Emphasis">Performance Analysis</text:span><text:bookmark-end text:name="__RefHeading___Toc426_3226105849"/></text:h>
      <text:h text:style-name="Section_20_Title" text:outline-level="3"><text:bookmark-start text:name="__RefHeading___Toc428_3226105849"/>xG <text:bookmark-end text:name="__RefHeading___Toc428_3226105849"/></text:h>
      <text:h text:style-name="Section_20_Title" text:outline-level="3"><text:bookmark-start text:name="__RefHeading___Toc430_3226105849"/>Data Hub <text:bookmark-end text:name="__RefHeading___Toc430_3226105849"/></text:h>
      <text:h text:style-name="Section_20_Title" text:outline-level="3"><text:bookmark-start text:name="__RefHeading___Toc432_3226105849"/>Momentum <text:bookmark-end text:name="__RefHeading___Toc432_3226105849"/></text:h>
      <text:h text:style-name="Section_20_Title" text:outline-level="3"><text:bookmark-start text:name="__RefHeading___Toc434_3226105849"/>Player ratings <text:bookmark-end text:name="__RefHeading___Toc434_3226105849"/></text:h>
      <text:h text:style-name="Section_20_Title" text:outline-level="3"><text:bookmark-start text:name="__RefHeading___Toc436_3226105849"/>Learning from matches<text:bookmark-end text:name="__RefHeading___Toc436_3226105849"/></text:h>
      <text:p text:style-name="Body_20_Text"/>
      <text:h text:style-name="P26" text:outline-level="2"><text:soft-page-break/></text:h>
      <text:h text:style-name="P27" text:outline-level="2"><text:bookmark-start text:name="__RefHeading___Toc274_874366845"/>Appendix – Revision History<text:bookmark-end text:name="__RefHeading___Toc274_874366845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adornments="Bold" style:font-family-generic="swiss"/>
    <style:font-face style:name="Calibri2" svg:font-family="Calibri" style:font-adornments="Regular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atrick Hand" svg:font-family="'Patrick Hand'" style:font-adornments="Bold Italic" style:font-pitch="variable"/>
    <style:font-face style:name="Tahoma" svg:font-family="Tahoma"/>
    <style:font-face style:name="Tahoma1" svg:font-family="Tahoma" style:font-adornments="Regular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loext:hidden="true" style:hidden="true" style:class="text"/>
    <style:style style:name="Book_20_Title" style:display-name="Book Title" style:family="paragraph" style:master-page-name="cover">
      <style:paragraph-properties fo:margin-left="0cm" fo:margin-right="0cm" fo:margin-top="0cm" fo:margin-bottom="0.6cm" style:contextual-spacing="false" fo:text-align="center" style:justify-single-word="false" fo:text-indent="0cm" style:auto-text-indent="false" style:page-number="auto" fo:break-before="auto" fo:break-after="auto" fo:keep-with-next="always"/>
      <style:text-properties fo:color="#729fcf" loext:opacity="100%" style:font-name="Tahoma" fo:font-family="Tahoma" fo:font-size="22pt" fo:font-weight="bold"/>
    </style:style>
    <style:style style:name="Book_20_Subtitle" style:display-name="Book Subtitle" style:family="paragraph" style:parent-style-name="Book_20_Title" style:master-page-name="">
      <style:paragraph-properties fo:margin-left="0cm" fo:margin-right="0cm" fo:margin-top="0cm" fo:margin-bottom="0.4cm" style:contextual-spacing="false" fo:text-indent="0cm" style:auto-text-indent="false" style:page-number="auto" fo:break-before="auto" fo:break-after="auto" fo:keep-with-next="auto"/>
      <style:text-properties fo:color="#729fcf" loext:opacity="100%" style:font-name="Tahoma" fo:font-family="Tahoma" fo:font-size="18pt" fo:font-weight="normal"/>
    </style:style>
    <style:style style:name="Chapter_20_Title" style:display-name="Chapter Title" style:family="paragraph" style:next-style-name="Body_20_Text" style:auto-update="true" style:default-outline-level="2" style:master-page-name="">
      <style:paragraph-properties fo:margin-left="0cm" fo:margin-right="0cm" fo:margin-top="0.3cm" fo:margin-bottom="0.6cm" style:contextual-spacing="true" fo:text-align="start" style:justify-single-word="false" fo:text-indent="0cm" style:auto-text-indent="false" style:page-number="auto" fo:break-before="auto" fo:break-after="auto" fo:keep-with-next="always">
        <style:tab-stops>
          <style:tab-stop style:position="1.111cm"/>
        </style:tab-stops>
      </style:paragraph-properties>
      <style:text-properties fo:color="#7a1f1f" loext:opacity="100%" style:font-name="Tahoma" fo:font-family="Tahoma" fo:font-size="16pt" fo:font-weight="bold"/>
    </style:style>
    <style:style style:name="Section_20_Title" style:display-name="Section Title" style:family="paragraph" style:parent-style-name="Chapter_20_Title" style:next-style-name="Body_20_Text" style:auto-update="true" style:default-outline-level="3" style:master-page-name="">
      <style:paragraph-properties fo:margin-left="0cm" fo:margin-right="0cm" fo:margin-top="0.3cm" fo:margin-bottom="0.3cm" style:contextual-spacing="false" fo:text-indent="0cm" style:auto-text-indent="false" style:page-number="auto" fo:break-before="auto" fo:break-after="auto"/>
      <style:text-properties fo:color="#7a1f1f" loext:opacity="100%" style:font-name="Tahoma" fo:font-family="Tahoma" fo:font-size="14pt" fo:font-weight="normal"/>
    </style:style>
    <style:style style:name="Subsection_20_Title" style:display-name="Subsection Title" style:family="paragraph" style:parent-style-name="Section_20_Title" style:next-style-name="Body_20_Text" style:auto-update="true" style:default-outline-level="4">
      <style:paragraph-properties fo:margin-left="0cm" fo:margin-right="0cm" fo:margin-top="0cm" fo:margin-bottom="0.4cm" style:contextual-spacing="false" fo:text-indent="0cm" style:auto-text-indent="false"/>
      <style:text-properties fo:color="#7a1f1f" loext:opacity="100%" style:font-name="Tahoma" fo:font-family="Tahoma" fo:font-size="12pt" fo:font-weight="normal" style:font-size-asian="16pt" style:font-weight-asian="normal" style:font-size-complex="16pt" style:font-weight-complex="normal"/>
    </style:style>
    <style:style style:name="Minor_20_Heading" style:display-name="Minor Heading" style:family="paragraph" style:parent-style-name="Subsection_20_Title" style:auto-update="true" style:default-outline-level="5">
      <style:paragraph-properties fo:margin-top="0cm" fo:margin-bottom="0.3cm" style:contextual-spacing="false"/>
      <style:text-properties fo:color="#7a1f1f" loext:opacity="100%" style:font-name="Tahoma" fo:font-family="Tahoma" fo:font-size="11pt" style:font-size-asian="16pt" style:font-size-complex="16pt"/>
    </style:style>
    <style:style style:name="Body_20_Text" style:display-name="Body Text" style:family="paragraph">
      <style:paragraph-properties fo:margin-left="0cm" fo:margin-right="0cm" fo:margin-top="0.101cm" fo:margin-bottom="0.101cm" style:contextual-spacing="false" fo:text-indent="0cm" style:auto-text-indent="false"/>
      <style:text-properties style:font-name="Calibri" fo:font-family="Calibri" fo:font-size="11pt"/>
    </style:style>
    <style:style style:name="Quote" style:family="paragraph" style:parent-style-name="Body_20_Text">
      <style:paragraph-properties fo:text-align="center" style:justify-single-word="false"/>
      <style:text-properties fo:color="#555555" loext:opacity="100%" style:font-name="Calibri" fo:font-family="Calibri" fo:font-size="11pt" fo:font-style="italic"/>
    </style:style>
    <style:style style:name="FM_20_Behaviour" style:display-name="FM Behaviour" style:family="paragraph" style:parent-style-name="Panel_20_Heading" style:master-page-name="">
      <loext:graphic-properties draw:fill="solid" draw:fill-color="#b4c7dc"/>
      <style:paragraph-properties fo:margin-left="0.3cm" fo:margin-right="0.3cm" fo:margin-top="0.101cm" fo:margin-bottom="0.101cm" style:contextual-spacing="false" fo:text-indent="0cm" style:auto-text-indent="false" style:page-number="auto" fo:background-color="#b4c7dc" fo:padding-left="0.3cm" fo:padding-right="0.3cm" fo:padding-top="0.15cm" fo:padding-bottom="0.15cm" fo:border="1.5pt solid #5983b0" style:join-border="true">
        <style:tab-stops/>
      </style:paragraph-properties>
      <style:text-properties fo:color="#1565c0" loext:opacity="100%" style:font-name="Calibri" fo:font-family="Calibri" fo:font-size="11pt" fo:font-weight="normal"/>
    </style:style>
    <style:style style:name="Tactical_20_Principle" style:display-name="Tactical Principle" style:family="paragraph" style:parent-style-name="Panel_20_Heading" style:master-page-name="">
      <loext:graphic-properties draw:fill="solid" draw:fill-color="#81aca6"/>
      <style:paragraph-properties fo:keep-together="auto" style:page-number="auto" fo:background-color="#81aca6" fo:padding-left="0.3cm" fo:padding-right="0.3cm" fo:padding-top="0.199cm" fo:padding-bottom="0.15cm" fo:border="1.5pt solid #168253" fo:keep-with-next="always"/>
      <style:text-properties fo:color="#2e7d32" loext:opacity="100%" style:font-name="Calibri" fo:font-family="Calibri" fo:font-size="11pt" fo:font-weight="normal"/>
    </style:style>
    <style:style style:name="Managers_20_Journal" style:display-name="Managers Journal" style:family="paragraph" style:parent-style-name="Panel_20_Heading">
      <loext:graphic-properties draw:fill="solid" draw:fill-color="#ffde59"/>
      <style:paragraph-properties fo:margin-left="0.3cm" fo:margin-right="0.3cm" fo:margin-top="0cm" fo:margin-bottom="0cm" style:contextual-spacing="false" fo:text-indent="0cm" style:auto-text-indent="false" fo:background-color="#ffde59" fo:padding="0.3cm" fo:border="none" style:shadow="none"/>
      <style:text-properties fo:color="#2a6099" loext:opacity="100%" style:font-name="Patrick Hand" fo:font-family="'Patrick Hand'" style:font-style-name="Bold Italic" style:font-pitch="variable" fo:font-size="14pt" fo:font-style="normal" fo:font-weight="normal"/>
    </style:style>
    <style:style style:name="Warning" style:family="paragraph" style:parent-style-name="Panel_20_Heading">
      <loext:graphic-properties draw:fill="solid" draw:fill-color="#cccccc"/>
      <style:paragraph-properties fo:margin-top="0.199cm" fo:margin-bottom="0.199cm" style:contextual-spacing="false" fo:background-color="#cccccc" fo:padding-left="0.3cm" fo:padding-right="0.3cm" fo:padding-top="0.15cm" fo:padding-bottom="0.15cm" fo:border="1.5pt solid #666666"/>
      <style:text-properties fo:color="#666666" loext:opacity="100%" style:font-name="Calibri" fo:font-family="Calibri" fo:font-size="11pt" fo:font-weight="normal"/>
    </style:style>
    <style:style style:name="Match_20_Tip" style:display-name="Match Tip" style:family="paragraph" style:parent-style-name="Panel_20_Heading">
      <loext:graphic-properties draw:fill="solid" draw:fill-color="#ffe994"/>
      <style:paragraph-properties fo:margin-top="0.199cm" fo:margin-bottom="0.199cm" style:contextual-spacing="false" fo:background-color="#ffe994" fo:padding-left="0.3cm" fo:padding-right="0.3cm" fo:padding-top="0.199cm" fo:padding-bottom="0.15cm" fo:border="1.5pt solid #8a6d00"/>
      <style:text-properties fo:color="#8a6d00" loext:opacity="100%" style:font-name="Calibri" fo:font-family="Calibri" fo:font-size="11pt" fo:font-weight="normal"/>
    </style:style>
    <style:style style:name="RevisionNote" style:family="paragraph" style:parent-style-name="Body_20_Text">
      <style:paragraph-properties fo:margin-top="0.199cm" fo:margin-bottom="0cm" style:contextual-spacing="false"/>
      <style:text-properties fo:color="#c62828" loext:opacity="100%" style:font-name="Calibri" fo:font-family="Calibri" fo:font-size="10pt" fo:font-style="italic"/>
    </style:style>
    <style:style style:name="Caption" style:family="paragraph" style:parent-style-name="Body_20_Text" style:class="extra">
      <style:paragraph-properties fo:margin-top="0.199cm" fo:margin-bottom="0.199cm" style:contextual-spacing="false"/>
      <style:text-properties fo:color="#666666" loext:opacity="100%" style:font-name="Calibri" fo:font-family="Calibri" fo:font-size="9pt" fo:font-style="italic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Calibri1" fo:font-family="Calibri" style:font-style-name="Bold" style:font-family-generic="swiss" fo:font-size="12pt" fo:font-weight="normal" style:font-size-asian="16pt" style:font-weight-asian="bold" style:font-size-complex="16pt" style:font-weight-complex="600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style:font-name="Calibri1" fo:font-family="Calibri" style:font-style-name="Bold" style:font-family-generic="swiss" fo:font-size="14pt" fo:font-weight="bold" style:font-size-asian="16pt" style:font-weight-asian="bold" style:font-size-complex="16pt" style:font-weight-complex="600"/>
    </style:style>
    <style:style style:name="Index" style:family="paragraph" style:parent-style-name="Standard" style:class="index">
      <style:paragraph-properties text:number-lines="false" text:line-number="0"/>
      <style:text-properties style:font-name="Calibri2" fo:font-family="Calibri" style:font-style-name="Regular" style:font-family-generic="swiss" fo:font-size="11pt"/>
    </style:style>
    <style:style style:name="Contents_20_1" style:display-name="Contents 1" style:family="paragraph" style:class="index">
      <style:paragraph-properties fo:margin-left="0cm" fo:margin-right="0cm" fo:margin-top="0.6cm" fo:margin-bottom="0.199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ahoma1" fo:font-family="Tahoma" style:font-style-name="Regular" style:font-family-generic="swiss" fo:font-size="14pt" fo:font-weight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2" style:display-name="Contents 2" style:family="paragraph" style:parent-style-name="Contents_20_1" style:class="index">
      <style:paragraph-properties fo:margin-left="0.499cm" fo:margin-right="0cm" fo:margin-top="0.199cm" fo:margin-bottom="0.101cm" style:contextual-spacing="false" fo:text-indent="0cm" style:auto-text-indent="false">
        <style:tab-stops>
          <style:tab-stop style:position="17cm" style:type="right"/>
        </style:tab-stops>
      </style:paragraph-properties>
      <style:text-properties fo:font-size="12pt"/>
    </style:style>
    <style:style style:name="Contents_20_3" style:display-name="Contents 3" style:family="paragraph" style:parent-style-name="Contents_20_2" style:class="index">
      <style:paragraph-properties fo:margin-left="1cm" fo:margin-right="0cm" fo:margin-top="0.101cm" fo:margin-bottom="0.101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1pt" fo:font-weight="normal"/>
    </style:style>
    <style:style style:name="Contents_20_4" style:display-name="Contents 4" style:family="paragraph" style:parent-style-name="Contents_20_3" style:class="index">
      <style:paragraph-properties fo:margin-left="1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nel_20_Heading" style:display-name="Panel Heading" style:family="paragraph" style:auto-update="true">
      <loext:graphic-properties draw:fill="solid" draw:fill-color="#729fcf"/>
      <style:paragraph-properties fo:margin-left="0.4cm" fo:margin-right="0.3cm" fo:margin-top="0.101cm" fo:margin-bottom="0.101cm" style:contextual-spacing="false" fo:text-indent="0cm" style:auto-text-indent="false" fo:background-color="#729fcf" fo:padding-left="0.199cm" fo:padding-right="0.199cm" fo:padding-top="0.15cm" fo:padding-bottom="0.15cm" fo:border="1.5pt solid #000000"/>
      <style:text-properties style:font-name="Tahoma1" fo:font-family="Tahoma" style:font-style-name="Regular" style:font-family-generic="swiss" fo:font-size="11pt" fo:font-weight="normal"/>
    </style:style>
    <style:style style:name="Evidence" style:family="paragraph" style:parent-style-name="Panel_20_Heading">
      <loext:graphic-properties draw:fill="solid" draw:fill-color="#e0c2cd"/>
      <style:paragraph-properties fo:margin-left="0.3cm" fo:margin-right="0.3cm" fo:margin-top="0.101cm" fo:margin-bottom="0.101cm" style:contextual-spacing="false" fo:text-indent="0cm" style:auto-text-indent="false" fo:background-color="#e0c2cd" fo:padding-left="0.3cm" fo:padding-right="0.3cm" fo:padding-top="0.199cm" fo:padding-bottom="0.15cm" fo:border="1.5pt solid #8d1d75"/>
      <style:text-properties fo:color="#8d1d75" loext:opacity="100%" fo:font-weight="normal"/>
    </style:style>
    <style:style style:name="Example" style:family="paragraph" style:parent-style-name="Panel_20_Heading">
      <loext:graphic-properties draw:fill="solid" draw:fill-color="#e8f2a1"/>
      <style:paragraph-properties fo:margin-top="0.101cm" fo:margin-bottom="0.101cm" style:contextual-spacing="false" fo:background-color="#e8f2a1" fo:padding-left="0.3cm" fo:padding-right="0.3cm" fo:padding-top="0.199cm" fo:padding-bottom="0.15cm" fo:border="1.5pt solid #468a1a"/>
      <style:text-properties fo:color="#468a1a" loext:opacity="100%" fo:font-weight="normal"/>
    </style:style>
    <style:style style:name="Part_20_Title" style:display-name="Part Title" style:family="paragraph" style:parent-style-name="Book_20_Title" style:default-outline-level="1" style:master-page-name="frontMatter">
      <style:paragraph-properties fo:margin-top="2cm" fo:margin-bottom="1cm" style:contextual-spacing="false" style:page-number="auto" fo:break-before="auto" fo:break-after="auto" text:number-lines="false" text:line-number="0"/>
      <style:text-properties fo:font-size="24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art_20_Subtitle" style:display-name="Part Subtitle" style:family="paragraph" style:parent-style-name="Part_20_Title" style:default-outline-level="" style:list-style-name="" style:master-page-name="">
      <style:paragraph-properties fo:margin-top="0cm" fo:margin-bottom="1cm" style:contextual-spacing="false" style:page-number="auto" fo:break-before="auto" fo:break-after="auto"/>
      <style:text-properties fo:color="#999999" loext:opacity="100%" fo:font-size="18pt" fo:font-weight="normal"/>
    </style:style>
    <style:style style:name="Contents_20_5" style:display-name="Contents 5" style:family="paragraph" style:parent-style-name="Contents_20_4" style:class="index">
      <style:paragraph-properties fo:margin-left="2.499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arking_20_Lot" style:display-name="Parking Lot" style:family="paragraph" style:parent-style-name="Panel_20_Heading">
      <loext:graphic-properties draw:fill="solid" draw:fill-color="#ffb66c"/>
      <style:paragraph-properties fo:background-color="#ffb66c" fo:padding-left="0.199cm" fo:padding-right="0.199cm" fo:padding-top="0.15cm" fo:padding-bottom="0.15cm" fo:border="1.5pt solid #ea7500"/>
      <style:text-properties fo:color="#ea7500" loext:opacity="100%"/>
    </style:style>
    <style:style style:name="Frame_20_contents" style:display-name="Frame contents" style:family="paragraph" style:parent-style-name="Standard" style:class="extra"/>
    <style:style style:name="MJ_20_Title" style:display-name="MJ Title" style:family="paragraph" style:parent-style-name="Managers_20_Journal">
      <loext:graphic-properties draw:fill="none" draw:fill-color="#729fcf"/>
      <style:paragraph-properties fo:margin-left="0cm" fo:margin-right="0cm" fo:margin-top="0cm" fo:margin-bottom="0cm" style:contextual-spacing="true" fo:text-indent="0cm" style:auto-text-indent="false" fo:background-color="transparent" fo:padding="0.3cm" fo:border="none" style:join-border="true"/>
      <style:text-properties fo:font-weight="bold"/>
    </style:style>
    <style:style style:name="MJ_20_Text" style:display-name="MJ Text" style:family="paragraph" style:parent-style-name="MJ_20_Title" style:auto-update="true" style:master-page-name="">
      <loext:graphic-properties draw:fill="none" draw:fill-color="#729fcf"/>
      <style:paragraph-properties fo:margin-top="0.101cm" fo:margin-bottom="0.101cm" style:contextual-spacing="true" fo:line-height="0.42cm" style:register-true="false" style:page-number="auto" fo:background-color="transparent">
        <style:tab-stops/>
      </style:paragraph-properties>
      <style:text-properties fo:font-weight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Post_20_It" style:display-name="Post It" style:family="graphic" style:parent-style-name="Frame">
      <style:graphic-properties svg:width="6.001cm" fo:min-height="0.55cm" text:anchor-type="paragraph" svg:x="0cm" fo:margin-top="0.101cm" fo:margin-bottom="0.101cm" style:wrap="dynamic" style:number-wrapped-paragraphs="no-limit" style:wrap-contour="false" style:horizontal-pos="outside" style:horizontal-rel="page-end-margin" fo:background-color="#ffe994" style:background-transparency="0%" draw:fill="solid" draw:fill-color="#ffe994" draw:opacity="100%" fo:padding="0.199cm" fo:border="none" style:shadow="#80808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cm" fo:break-before="page" table:align="margins"/>
    </style:style>
    <style:style style:name="Table4.A" style:family="table-column">
      <style:table-column-properties style:column-width="5.667cm" style:rel-column-width="21844*"/>
    </style:style>
    <style:style style:name="Table4.B" style:family="table-column">
      <style:table-column-properties style:column-width="5.667cm" style:rel-column-width="21846*"/>
    </style:style>
    <style:style style:name="Table4.C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="none"/>
    </style:style>
    <style:style style:name="MP1" style:family="paragraph" style:parent-style-name="Body_20_Text">
      <style:paragraph-properties fo:text-align="center" style:justify-single-word="false"/>
    </style:style>
    <style:style style:name="MP2" style:family="paragraph" style:parent-style-name="Body_20_Text">
      <style:paragraph-properties fo:text-align="end" style:justify-single-word="false"/>
    </style:style>
    <style:style style:name="MP3" style:family="paragraph" style:parent-style-name="Body_20_Text">
      <style:text-properties officeooo:rsid="0006db54" officeooo:paragraph-rsid="0006db54"/>
    </style:style>
    <style:style style:name="MT1" style:family="text">
      <style:text-properties officeooo:rsid="0011e173"/>
    </style:style>
    <style:style style:name="MT2" style:family="text">
      <style:text-properties officeooo:rsid="0014829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loext:hidden="true" style:hidden="true" style:display-name="First Page" style:page-layout-name="Mpm1" draw:style-name="Mdp1" style:next-style-name="Standard"/>
    <style:master-page style:name="cover" style:page-layout-name="Mpm1" draw:style-name="Mdp1" style:next-style-name="frontMatter"/>
    <style:master-page style:name="Left_20_Page" loext:hidden="true" style:hidden="true" style:display-name="Left Page" style:page-layout-name="Mpm2" draw:style-name="Mdp1" style:next-style-name="Right_20_Page"/>
    <style:master-page style:name="Right_20_Page" loext:hidden="true" style:hidden="true" style:display-name="Right Page" style:page-layout-name="Mpm3" draw:style-name="Mdp1" style:next-style-name="Left_20_Page"/>
    <style:master-page style:name="Envelope" loext:hidden="true" style:hidden="true" style:page-layout-name="Mpm4" draw:style-name="Mdp1"/>
    <style:master-page style:name="Index" loext:hidden="true" style:hidden="true" style:page-layout-name="Mpm1" draw:style-name="Mdp1"/>
    <style:master-page style:name="HTML" loext:hidden="true" style:hidden="true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loext:hidden="true" style:hidden="true" style:page-layout-name="Mpm7" draw:style-name="Mdp1"/>
    <style:master-page style:name="frontMatter" style:page-layout-name="Mpm8" draw:style-name="Mdp1">
      <style:footer>
        <table:table table:name="Table5" table:style-name="Table5">
          <table:table-column table:style-name="Table5.A" table:number-columns-repeated="3"/>
          <table:table-row>
            <table:table-cell table:style-name="Table5.A1" office:value-type="string">
              <text:p text:style-name="Body_20_Text">Version <text:user-defined style:data-style-name="N0" text:name="Version">0.1.0</text:user-defined></text:p>
            </table:table-cell>
            <table:table-cell table:style-name="Table5.A1" office:value-type="string">
              <text:p text:style-name="MP1">Draft</text:p>
            </table:table-cell>
            <table:table-cell table:style-name="Table5.A1" office:value-type="string">
              <text:p text:style-name="MP2"><text:page-number text:select-page="current">xix</text:page-number></text:p>
            </table:table-cell>
          </table:table-row>
        </table:table>
        <text:p text:style-name="Footer"/>
      </style:footer>
    </style:master-page>
    <style:master-page style:name="chapter" style:page-layout-name="Mpm9" draw:style-name="Mdp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3"><text:title>The Manager's Handbook</text:title></text:p>
            </table:table-cell>
            <table:table-cell table:style-name="Table1.A1" office:value-type="string">
              <text:p text:style-name="MP2"><text:subject>Philosophy and Tactical Blueprint</text:subject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Body_20_Text">Version <text:user-defined style:data-style-name="N0" text:name="Version">0.1.0</text:user-defined></text:p>
            </table:table-cell>
            <table:table-cell table:style-name="Table2.A1" office:value-type="string">
              <text:p text:style-name="MP1">Draft</text:p>
            </table:table-cell>
            <table:table-cell table:style-name="Table2.A1" office:value-type="string">
              <text:p text:style-name="MP2"><text:page-number text:select-page="current">17</text:page-number><text:s/><text:span text:style-name="MT1">of </text:span><text:span text:style-name="MT1"><text:page-count>19</text:page-count></text:span></text:p>
            </table:table-cell>
          </table:table-row>
        </table:table>
        <text:p text:style-name="Footer"/>
      </style:footer>
    </style:master-page>
    <style:master-page style:name="appendix" style:page-layout-name="Mpm9" draw:style-name="Mdp1">
      <style:head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Body_20_Text"><text:title>The Manager's Handbook</text:title></text:p>
            </table:table-cell>
            <table:table-cell table:style-name="Table3.A1" office:value-type="string">
              <text:p text:style-name="MP2"><text:subject>Philosophy and Tactical Blueprint</text:subject></text:p>
            </table:table-cell>
          </table:table-row>
        </table:table>
        <text:p text:style-name="Footer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Body_20_Text">Version <text:user-defined style:data-style-name="N0" text:name="Version">0.1.0</text:user-defined></text:p>
            </table:table-cell>
            <table:table-cell table:style-name="Table4.A1" office:value-type="string">
              <text:p text:style-name="MP1">Draft</text:p>
            </table:table-cell>
            <table:table-cell table:style-name="Table4.A1" office:value-type="string">
              <text:p text:style-name="MP1"><text:span text:style-name="MT2"><text:page-number text:select-page="current">20</text:page-number></text:span><text:span text:style-name="MT2"><text:s/>of </text:span><text:span text:style-name="MT2"><text:page-count>19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editing-duration>PT4H51M23S</meta:editing-duration>
    <meta:editing-cycles>19</meta:editing-cycles>
    <meta:keyword>Football Manager</meta:keyword>
    <meta:keyword>Tactice</meta:keyword>
    <meta:keyword>Coaching</meta:keyword>
    <meta:keyword>Recruitment</meta:keyword>
    <dc:subject>Philosophy and Tactical Blueprint</dc:subject>
    <dc:title>The Manager's Handbook</dc:title>
    <meta:creation-date>2026-06-29T09:51:10.719993666</meta:creation-date>
    <dc:date>2026-07-02T12:32:34.975172303</dc:date>
    <meta:document-statistic meta:table-count="5" meta:image-count="0" meta:object-count="0" meta:page-count="19" meta:paragraph-count="373" meta:word-count="2284" meta:character-count="13879" meta:non-whitespace-character-count="11940"/>
    <meta:user-defined meta:name="Author">Andy Wilson</meta:user-defined>
    <meta:user-defined meta:name="Comments">My living tactical handbook</meta:user-defined>
    <meta:user-defined meta:name="FMVersion">Football Manager 2026 Edition</meta:user-defined>
    <meta:user-defined meta:name="Status">Draft</meta:user-defined>
    <meta:user-defined meta:name="Template Version" meta:value-type="string">0.5.0</meta:user-defined>
    <meta:user-defined meta:name="Version" meta:value-type="string">0.1.0</meta:user-defined>
    <meta:user-defined meta:name="Volume" meta:value-type="string">1</meta:user-defined>
    <meta:template xlink:type="simple" xlink:actuate="onRequest" xlink:title="myManagerHandbook-StyleTemplate" xlink:href="../../../../../.config/libreoffice/4/user/template/myManagerHandbook-StyleTemplate.ott" meta:date="2026-06-29T09:51:10.288544054"/>
  </office:meta>
</office:document-meta>
</file>