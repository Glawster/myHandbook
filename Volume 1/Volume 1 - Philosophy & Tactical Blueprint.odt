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automatic-styles>
    <style:style style:name="P1" style:family="paragraph" style:parent-style-name="Body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4" style:family="paragraph" style:parent-style-name="Body_20_Text">
      <style:paragraph-properties fo:text-align="end" style:justify-single-word="false"/>
    </style:style>
    <style:style style:name="P5" style:family="paragraph" style:parent-style-name="Body_20_Text">
      <style:text-properties officeooo:rsid="0006db54" officeooo:paragraph-rsid="0006db5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Body_20_Text">
      <style:text-properties officeooo:paragraph-rsid="0038adb5"/>
    </style:style>
    <style:style style:name="P10" style:family="paragraph" style:parent-style-name="FM_20_Behaviour">
      <style:text-properties officeooo:paragraph-rsid="0038adb5"/>
    </style:style>
    <style:style style:name="P11" style:family="paragraph" style:parent-style-name="Match_20_Tip">
      <style:text-properties officeooo:paragraph-rsid="0038adb5"/>
    </style:style>
    <style:style style:name="P12" style:family="paragraph" style:parent-style-name="Tactical_20_Principle">
      <style:text-properties officeooo:paragraph-rsid="0038adb5"/>
    </style:style>
    <style:style style:name="P13" style:family="paragraph" style:parent-style-name="Evidence">
      <style:text-properties officeooo:paragraph-rsid="003ae2a1"/>
    </style:style>
    <style:style style:name="P14" style:family="paragraph" style:parent-style-name="Body_20_Text">
      <style:text-properties fo:font-style="italic" style:font-style-asian="italic" style:font-style-complex="italic"/>
    </style:style>
    <style:style style:name="P15" style:family="paragraph" style:parent-style-name="MJ_20_Text">
      <style:text-properties officeooo:paragraph-rsid="003edef6"/>
    </style:style>
    <style:style style:name="P16" style:family="paragraph" style:parent-style-name="Tactical_20_Principle">
      <style:text-properties officeooo:paragraph-rsid="003fe4f6"/>
    </style:style>
    <style:style style:name="P17" style:family="paragraph" style:parent-style-name="Body_20_Text">
      <style:text-properties fo:font-weight="bold" style:font-weight-asian="bold" style:font-weight-complex="bold"/>
    </style:style>
    <style:style style:name="P18" style:family="paragraph" style:parent-style-name="Evidence">
      <style:text-properties fo:font-weight="bold" style:font-weight-asian="bold" style:font-weight-complex="bold"/>
    </style:style>
    <style:style style:name="P19" style:family="paragraph" style:parent-style-name="Evidence">
      <style:text-properties fo:font-weight="bold" officeooo:paragraph-rsid="00455ebb" style:font-weight-asian="bold" style:font-weight-complex="bold"/>
    </style:style>
    <style:style style:name="P20" style:family="paragraph" style:parent-style-name="Evidence">
      <style:text-properties officeooo:paragraph-rsid="00455ebb"/>
    </style:style>
    <style:style style:name="P21" style:family="paragraph" style:parent-style-name="Parking_20_Lot">
      <style:text-properties officeooo:rsid="003127a9" officeooo:paragraph-rsid="004284c3"/>
    </style:style>
    <style:style style:name="P22" style:family="paragraph" style:parent-style-name="Body_20_Text" style:list-style-name="L1"/>
    <style:style style:name="P23" style:family="paragraph" style:parent-style-name="Body_20_Text" style:list-style-name="L2"/>
    <style:style style:name="P24" style:family="paragraph" style:parent-style-name="Body_20_Text" style:list-style-name="L3"/>
    <style:style style:name="P25" style:family="paragraph" style:parent-style-name="Body_20_Text" style:list-style-name="L4"/>
    <style:style style:name="P26" style:family="paragraph" style:parent-style-name="Body_20_Text" style:list-style-name="L5"/>
    <style:style style:name="P27" style:family="paragraph" style:parent-style-name="Body_20_Text" style:list-style-name="L6"/>
    <style:style style:name="P28" style:family="paragraph" style:parent-style-name="Body_20_Text" style:list-style-name="L7"/>
    <style:style style:name="P29" style:family="paragraph" style:parent-style-name="Body_20_Text" style:list-style-name="L8"/>
    <style:style style:name="P30" style:family="paragraph" style:parent-style-name="Body_20_Text" style:list-style-name="L9"/>
    <style:style style:name="P31" style:family="paragraph" style:parent-style-name="Body_20_Text" style:list-style-name="L10"/>
    <style:style style:name="P32" style:family="paragraph" style:parent-style-name="Body_20_Text" style:list-style-name="L11"/>
    <style:style style:name="P33" style:family="paragraph" style:parent-style-name="Body_20_Text" style:list-style-name="L11">
      <style:text-properties officeooo:paragraph-rsid="004284c3"/>
    </style:style>
    <style:style style:name="P34" style:family="paragraph" style:parent-style-name="Body_20_Text" style:list-style-name="L12"/>
    <style:style style:name="P35" style:family="paragraph" style:parent-style-name="Body_20_Text" style:list-style-name="L13"/>
    <style:style style:name="P36" style:family="paragraph" style:parent-style-name="Body_20_Text" style:list-style-name="L14"/>
    <style:style style:name="P37" style:family="paragraph" style:parent-style-name="Body_20_Text" style:list-style-name="L15"/>
    <style:style style:name="P38" style:family="paragraph" style:parent-style-name="Body_20_Text" style:list-style-name="L16"/>
    <style:style style:name="P39" style:family="paragraph" style:parent-style-name="Body_20_Text" style:list-style-name="L17"/>
    <style:style style:name="P40" style:family="paragraph" style:parent-style-name="Body_20_Text" style:list-style-name="L18"/>
    <style:style style:name="P41" style:family="paragraph" style:parent-style-name="Body_20_Text" style:list-style-name="L19"/>
    <style:style style:name="P42" style:family="paragraph" style:parent-style-name="Body_20_Text" style:list-style-name="L20"/>
    <style:style style:name="P43" style:family="paragraph" style:parent-style-name="Body_20_Text" style:list-style-name="L21"/>
    <style:style style:name="P44" style:family="paragraph" style:parent-style-name="Body_20_Text" style:list-style-name="L22"/>
    <style:style style:name="P45" style:family="paragraph" style:parent-style-name="Body_20_Text" style:list-style-name="L23"/>
    <style:style style:name="P46" style:family="paragraph" style:parent-style-name="Body_20_Text" style:list-style-name="L24"/>
    <style:style style:name="P47" style:family="paragraph" style:parent-style-name="Body_20_Text" style:list-style-name="L25"/>
    <style:style style:name="P48" style:family="paragraph" style:parent-style-name="Body_20_Text" style:list-style-name="L26"/>
    <style:style style:name="P49" style:family="paragraph" style:parent-style-name="Body_20_Text" style:list-style-name="L29"/>
    <style:style style:name="P50" style:family="paragraph" style:parent-style-name="Chapter_20_Title">
      <style:text-properties officeooo:paragraph-rsid="0029a016"/>
    </style:style>
    <style:style style:name="P51" style:family="paragraph" style:parent-style-name="Chapter_20_Title" style:list-style-name="">
      <style:paragraph-properties fo:text-align="start" style:justify-single-word="false">
        <style:tab-stops>
          <style:tab-stop style:position="1.111cm"/>
        </style:tab-stops>
      </style:paragraph-properties>
    </style:style>
    <style:style style:name="P52" style:family="paragraph" style:parent-style-name="Chapter_20_Title" style:master-page-name="appendix">
      <style:paragraph-properties style:page-number="auto"/>
    </style:style>
    <style:style style:name="P53" style:family="paragraph" style:parent-style-name="Part_20_Title" style:master-page-name="chapter">
      <style:paragraph-properties style:page-number="auto"/>
    </style:style>
    <style:style style:name="P54" style:family="paragraph" style:parent-style-name="Part_20_Title" style:master-page-name="chapter">
      <style:paragraph-properties style:page-number="auto"/>
      <style:text-properties officeooo:paragraph-rsid="0029a016"/>
    </style:style>
    <style:style style:name="P55" style:family="paragraph" style:parent-style-name="Part_20_Title" style:master-page-name="chapter">
      <style:paragraph-properties style:page-number="auto"/>
      <style:text-properties officeooo:paragraph-rsid="002a2237"/>
    </style:style>
    <style:style style:name="P56" style:family="paragraph" style:parent-style-name="Part_20_Title">
      <style:text-properties officeooo:paragraph-rsid="002a2237"/>
    </style:style>
    <style:style style:name="P57" style:family="paragraph" style:parent-style-name="Section_20_Title">
      <style:text-properties officeooo:paragraph-rsid="003edef6"/>
    </style:style>
    <style:style style:name="P58" style:family="paragraph" style:parent-style-name="Section_20_Title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size="14pt"/>
    </style:style>
    <style:style style:name="P59" style:family="paragraph" style:parent-style-name="Subsection_20_Title">
      <style:text-properties officeooo:paragraph-rsid="00428a60"/>
    </style:style>
    <style:style style:name="P60" style:family="paragraph" style:parent-style-name="Text_20_body" style:list-style-name="L27"/>
    <style:style style:name="P61" style:family="paragraph" style:parent-style-name="Text_20_body" style:list-style-name="L27">
      <style:paragraph-properties fo:margin-top="0cm" fo:margin-bottom="0cm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 style:list-style-name="L28">
      <style:paragraph-properties fo:margin-top="0cm" fo:margin-bottom="0cm" style:contextual-spacing="false"/>
    </style:style>
    <style:style style:name="T1" style:family="text">
      <style:text-properties officeooo:rsid="0011e173"/>
    </style:style>
    <style:style style:name="T2" style:family="text">
      <style:text-properties officeooo:rsid="00148293"/>
    </style:style>
    <style:style style:name="T3" style:family="text">
      <style:text-properties officeooo:rsid="002d8be8"/>
    </style:style>
    <style:style style:name="T4" style:family="text">
      <style:text-properties officeooo:rsid="0031826a"/>
    </style:style>
    <style:style style:name="T5" style:family="text">
      <style:text-properties officeooo:rsid="00331a96"/>
    </style:style>
    <style:style style:name="T6" style:family="text">
      <style:text-properties officeooo:rsid="0038910e"/>
    </style:style>
    <style:style style:name="T7" style:family="text">
      <style:text-properties officeooo:rsid="003ae2a1"/>
    </style:style>
    <style:style style:name="T8" style:family="text">
      <style:text-properties officeooo:rsid="0040999f"/>
    </style:style>
    <style:style style:name="T9" style:family="text">
      <style:text-properties officeooo:rsid="00428a60"/>
    </style:style>
    <style:style style:name="T10" style:family="text">
      <style:text-properties officeooo:rsid="00455ebb"/>
    </style:style>
    <style:style style:name="fr1" style:family="graphic" style:parent-style-name="Post_20_It">
      <style:graphic-properties style:vertical-pos="from-top" style:vertical-rel="paragraph" style:horizontal-pos="from-left" style:horizontal-rel="paragraph"/>
    </style:style>
    <style:style style:name="fr2" style:family="graphic" style:parent-style-name="Post_20_It">
      <style:graphic-properties style:vertical-pos="top" style:vertical-rel="paragraph-content" style:horizontal-pos="right" style:horizontal-rel="page-end-margin"/>
    </style:style>
    <style:style style:name="fr3" style:family="graphic" style:parent-style-name="Post_20_It">
      <style:graphic-properties style:run-through="foreground" style:wrap="parallel" style:number-wrapped-paragraphs="no-limit" style:vertical-pos="top" style:vertical-rel="paragraph-content" style:horizontal-pos="outside" style:horizontal-rel="paragraph-content" fo:padding="0.199cm" fo:border="1.5pt solid #ccccc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ok_20_Title"><text:title>The Manager's Handbook</text:title></text:p>
      <text:p text:style-name="Book_20_Subtitle">Volume <text:user-defined style:data-style-name="N0" text:name="Volume">1</text:user-defined></text:p>
      <text:p text:style-name="Book_20_Subtitle"><text:subject>Philosophy and Tactical Blueprint</text:subject></text:p>
      <text:p text:style-name="Book_20_Subtitle"><text:user-defined style:data-style-name="N0" text:name="Author">Andy Wilson</text:user-defined></text:p>
      <text:p text:style-name="Book_20_Subtitle"><text:user-defined style:data-style-name="N0" text:name="FMVersion">Football Manager 2026 Edition</text:user-defined></text:p>
      <text:p text:style-name="Book_20_Subtitle">Version <text:user-defined style:data-style-name="N0" text:name="Version">0.1.0</text:user-defined></text:p>
      <text:p text:style-name="Book_20_Subtitle"/>
      <text:p text:style-name="Book_20_Subtitle"/>
      <text:table-of-content text:style-name="Sect1" text:protected="true" text:name="Table of Contents1">
        <text:table-of-content-source text:outline-level="4">
          <text:index-title-template text:style-name="Chapter_20_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hapter_20_Title" text:outline-level="2">Table of Contents</text:h>
          </text:index-title>
          <text:p text:style-name="P6"><text:a xlink:type="simple" xlink:href="#__RefHeading___Toc956_3226105849" text:style-name="Index_20_Link" text:visited-style-name="Index_20_Link">Part I - Foundations<text:tab/>4</text:a></text:p>
          <text:p text:style-name="P7"><text:a xlink:type="simple" xlink:href="#__RefHeading___Toc306_3226105849" text:style-name="Index_20_Link" text:visited-style-name="Index_20_Link">Football Before Formations<text:tab/>4</text:a></text:p>
          <text:p text:style-name="P8"><text:a xlink:type="simple" xlink:href="#__RefHeading___Toc308_3226105849" text:style-name="Index_20_Link" text:visited-style-name="Index_20_Link">Why this handbook exists<text:tab/>4</text:a></text:p>
          <text:p text:style-name="P8"><text:a xlink:type="simple" xlink:href="#__RefHeading___Toc310_3226105849" text:style-name="Index_20_Link" text:visited-style-name="Index_20_Link">Football is about solving problems<text:tab/>4</text:a></text:p>
          <text:p text:style-name="P8"><text:a xlink:type="simple" xlink:href="#__RefHeading___Toc312_3226105849" text:style-name="Index_20_Link" text:visited-style-name="Index_20_Link">Principles before systems<text:tab/>4</text:a></text:p>
          <text:p text:style-name="P8"><text:a xlink:type="simple" xlink:href="#__RefHeading___Toc314_3226105849" text:style-name="Index_20_Link" text:visited-style-name="Index_20_Link">The manager's cycle<text:tab/>4</text:a></text:p>
          <text:p text:style-name="P8"><text:a xlink:type="simple" xlink:href="#__RefHeading___Toc316_3226105849" text:style-name="Index_20_Link" text:visited-style-name="Index_20_Link">How to use this handbook<text:tab/>4</text:a></text:p>
          <text:p text:style-name="P7"><text:a xlink:type="simple" xlink:href="#__RefHeading___Toc318_3226105849" text:style-name="Index_20_Link" text:visited-style-name="Index_20_Link">Understanding the Match Engine<text:tab/>4</text:a></text:p>
          <text:p text:style-name="P8"><text:a xlink:type="simple" xlink:href="#__RefHeading___Toc320_3226105849" text:style-name="Index_20_Link" text:visited-style-name="Index_20_Link">What FM actually simulates<text:tab/>4</text:a></text:p>
          <text:p text:style-name="P8"><text:a xlink:type="simple" xlink:href="#__RefHeading___Toc322_3226105849" text:style-name="Index_20_Link" text:visited-style-name="Index_20_Link">Decision making<text:tab/>4</text:a></text:p>
          <text:p text:style-name="P8"><text:a xlink:type="simple" xlink:href="#__RefHeading___Toc324_3226105849" text:style-name="Index_20_Link" text:visited-style-name="Index_20_Link">Attributes<text:tab/>4</text:a></text:p>
          <text:p text:style-name="P8"><text:a xlink:type="simple" xlink:href="#__RefHeading___Toc326_3226105849" text:style-name="Index_20_Link" text:visited-style-name="Index_20_Link">Roles<text:tab/>4</text:a></text:p>
          <text:p text:style-name="P8"><text:a xlink:type="simple" xlink:href="#__RefHeading___Toc328_3226105849" text:style-name="Index_20_Link" text:visited-style-name="Index_20_Link">Team Instructions<text:tab/>4</text:a></text:p>
          <text:p text:style-name="P8"><text:a xlink:type="simple" xlink:href="#__RefHeading___Toc330_3226105849" text:style-name="Index_20_Link" text:visited-style-name="Index_20_Link">Hidden interactions<text:tab/>4</text:a></text:p>
          <text:p text:style-name="P8"><text:a xlink:type="simple" xlink:href="#__RefHeading___Toc332_3226105849" text:style-name="Index_20_Link" text:visited-style-name="Index_20_Link">Match Engine vs Reality<text:tab/>4</text:a></text:p>
          <text:p text:style-name="P7"><text:a xlink:type="simple" xlink:href="#__RefHeading___Toc334_3226105849" text:style-name="Index_20_Link" text:visited-style-name="Index_20_Link">Building a Tactical Identity<text:tab/>5</text:a></text:p>
          <text:p text:style-name="P8"><text:a xlink:type="simple" xlink:href="#__RefHeading___Toc336_3226105849" text:style-name="Index_20_Link" text:visited-style-name="Index_20_Link">How do you want your team to play?<text:tab/>5</text:a></text:p>
          <text:p text:style-name="P8"><text:a xlink:type="simple" xlink:href="#__RefHeading___Toc338_3226105849" text:style-name="Index_20_Link" text:visited-style-name="Index_20_Link">Core principles<text:tab/>5</text:a></text:p>
          <text:p text:style-name="P8"><text:a xlink:type="simple" xlink:href="#__RefHeading___Toc340_3226105849" text:style-name="Index_20_Link" text:visited-style-name="Index_20_Link">Defensive identity<text:tab/>5</text:a></text:p>
          <text:p text:style-name="P8"><text:a xlink:type="simple" xlink:href="#__RefHeading___Toc342_3226105849" text:style-name="Index_20_Link" text:visited-style-name="Index_20_Link">Attacking identity<text:tab/>5</text:a></text:p>
          <text:p text:style-name="P8"><text:soft-page-break/><text:a xlink:type="simple" xlink:href="#__RefHeading___Toc344_3226105849" text:style-name="Index_20_Link" text:visited-style-name="Index_20_Link">Transition identity<text:tab/>5</text:a></text:p>
          <text:p text:style-name="P6"><text:a xlink:type="simple" xlink:href="#__RefHeading___Toc958_3226105849" text:style-name="Index_20_Link" text:visited-style-name="Index_20_Link">Part II - Tactical Blueprint<text:tab/>6</text:a></text:p>
          <text:p text:style-name="P7"><text:a xlink:type="simple" xlink:href="#__RefHeading___Toc346_3226105849" text:style-name="Index_20_Link" text:visited-style-name="Index_20_Link">Space<text:tab/>6</text:a></text:p>
          <text:p text:style-name="P8"><text:a xlink:type="simple" xlink:href="#__RefHeading___Toc348_3226105849" text:style-name="Index_20_Link" text:visited-style-name="Index_20_Link">Width<text:tab/>6</text:a></text:p>
          <text:p text:style-name="P8"><text:a xlink:type="simple" xlink:href="#__RefHeading___Toc350_3226105849" text:style-name="Index_20_Link" text:visited-style-name="Index_20_Link">Depth<text:tab/>6</text:a></text:p>
          <text:p text:style-name="P8"><text:a xlink:type="simple" xlink:href="#__RefHeading___Toc352_3226105849" text:style-name="Index_20_Link" text:visited-style-name="Index_20_Link">Half-spaces<text:tab/>6</text:a></text:p>
          <text:p text:style-name="P8"><text:a xlink:type="simple" xlink:href="#__RefHeading___Toc354_3226105849" text:style-name="Index_20_Link" text:visited-style-name="Index_20_Link">Central overloads<text:tab/>6</text:a></text:p>
          <text:p text:style-name="P8"><text:a xlink:type="simple" xlink:href="#__RefHeading___Toc356_3226105849" text:style-name="Index_20_Link" text:visited-style-name="Index_20_Link">Numerical superiority<text:tab/>6</text:a></text:p>
          <text:p text:style-name="P7"><text:a xlink:type="simple" xlink:href="#__RefHeading___Toc358_3226105849" text:style-name="Index_20_Link" text:visited-style-name="Index_20_Link">Team Shape<text:tab/>6</text:a></text:p>
          <text:p text:style-name="P8"><text:a xlink:type="simple" xlink:href="#__RefHeading___Toc360_3226105849" text:style-name="Index_20_Link" text:visited-style-name="Index_20_Link">Formations<text:tab/>6</text:a></text:p>
          <text:p text:style-name="P8"><text:a xlink:type="simple" xlink:href="#__RefHeading___Toc362_3226105849" text:style-name="Index_20_Link" text:visited-style-name="Index_20_Link">Rest defence<text:tab/>6</text:a></text:p>
          <text:p text:style-name="P8"><text:a xlink:type="simple" xlink:href="#__RefHeading___Toc364_3226105849" text:style-name="Index_20_Link" text:visited-style-name="Index_20_Link">Defensive shape<text:tab/>6</text:a></text:p>
          <text:p text:style-name="P8"><text:a xlink:type="simple" xlink:href="#__RefHeading___Toc366_3226105849" text:style-name="Index_20_Link" text:visited-style-name="Index_20_Link">Attacking shape<text:tab/>6</text:a></text:p>
          <text:p text:style-name="P8"><text:a xlink:type="simple" xlink:href="#__RefHeading___Toc368_3226105849" text:style-name="Index_20_Link" text:visited-style-name="Index_20_Link">Fluidity<text:tab/>6</text:a></text:p>
          <text:p text:style-name="P7"><text:a xlink:type="simple" xlink:href="#__RefHeading___Toc370_3226105849" text:style-name="Index_20_Link" text:visited-style-name="Index_20_Link">Mentality<text:tab/>6</text:a></text:p>
          <text:p text:style-name="P8"><text:a xlink:type="simple" xlink:href="#__RefHeading___Toc372_3226105849" text:style-name="Index_20_Link" text:visited-style-name="Index_20_Link">What mentality actually changes<text:tab/>6</text:a></text:p>
          <text:p text:style-name="P8"><text:a xlink:type="simple" xlink:href="#__RefHeading___Toc374_3226105849" text:style-name="Index_20_Link" text:visited-style-name="Index_20_Link">Team mentality vs player mentality<text:tab/>6</text:a></text:p>
          <text:p text:style-name="P8"><text:a xlink:type="simple" xlink:href="#__RefHeading___Toc376_3226105849" text:style-name="Index_20_Link" text:visited-style-name="Index_20_Link">Risk<text:tab/>7</text:a></text:p>
          <text:p text:style-name="P8"><text:a xlink:type="simple" xlink:href="#__RefHeading___Toc378_3226105849" text:style-name="Index_20_Link" text:visited-style-name="Index_20_Link">Tempo<text:tab/>7</text:a></text:p>
          <text:p text:style-name="P8"><text:a xlink:type="simple" xlink:href="#__RefHeading___Toc380_3226105849" text:style-name="Index_20_Link" text:visited-style-name="Index_20_Link">Pressing<text:tab/>7</text:a></text:p>
          <text:p text:style-name="P7"><text:a xlink:type="simple" xlink:href="#__RefHeading___Toc382_3226105849" text:style-name="Index_20_Link" text:visited-style-name="Index_20_Link">Team Instructions<text:tab/>7</text:a></text:p>
          <text:p text:style-name="P8"><text:a xlink:type="simple" xlink:href="#__RefHeading___Toc384_3226105849" text:style-name="Index_20_Link" text:visited-style-name="Index_20_Link">In Possession<text:tab/>7</text:a></text:p>
          <text:p text:style-name="P8"><text:a xlink:type="simple" xlink:href="#__RefHeading___Toc386_3226105849" text:style-name="Index_20_Link" text:visited-style-name="Index_20_Link">In Transition<text:tab/>7</text:a></text:p>
          <text:p text:style-name="P8"><text:a xlink:type="simple" xlink:href="#__RefHeading___Toc388_3226105849" text:style-name="Index_20_Link" text:visited-style-name="Index_20_Link">Out of Possession<text:tab/>7</text:a></text:p>
          <text:p text:style-name="P6"><text:a xlink:type="simple" xlink:href="#__RefHeading___Toc960_3226105849" text:style-name="Index_20_Link" text:visited-style-name="Index_20_Link">Part III - The Players<text:tab/>8</text:a></text:p>
          <text:p text:style-name="P7"><text:a xlink:type="simple" xlink:href="#__RefHeading___Toc390_3226105849" text:style-name="Index_20_Link" text:visited-style-name="Index_20_Link">Player Roles &amp; Duties<text:tab/>8</text:a></text:p>
          <text:p text:style-name="P8"><text:a xlink:type="simple" xlink:href="#__RefHeading___Toc392_3226105849" text:style-name="Index_20_Link" text:visited-style-name="Index_20_Link">Roles explained<text:tab/>8</text:a></text:p>
          <text:p text:style-name="P8"><text:a xlink:type="simple" xlink:href="#__RefHeading___Toc394_3226105849" text:style-name="Index_20_Link" text:visited-style-name="Index_20_Link">Duties<text:tab/>8</text:a></text:p>
          <text:p text:style-name="P8"><text:a xlink:type="simple" xlink:href="#__RefHeading___Toc396_3226105849" text:style-name="Index_20_Link" text:visited-style-name="Index_20_Link">Partnerships<text:tab/>8</text:a></text:p>
          <text:p text:style-name="P8"><text:a xlink:type="simple" xlink:href="#__RefHeading___Toc398_3226105849" text:style-name="Index_20_Link" text:visited-style-name="Index_20_Link">Complementary roles<text:tab/>8</text:a></text:p>
          <text:p text:style-name="P7"><text:a xlink:type="simple" xlink:href="#__RefHeading___Toc400_3226105849" text:style-name="Index_20_Link" text:visited-style-name="Index_20_Link">Player Instructions<text:tab/>8</text:a></text:p>
          <text:p text:style-name="P8"><text:a xlink:type="simple" xlink:href="#__RefHeading___Toc402_3226105849" text:style-name="Index_20_Link" text:visited-style-name="Index_20_Link">When to override a role<text:tab/>8</text:a></text:p>
          <text:p text:style-name="P8"><text:a xlink:type="simple" xlink:href="#__RefHeading___Toc404_3226105849" text:style-name="Index_20_Link" text:visited-style-name="Index_20_Link">Simplicity<text:tab/>8</text:a></text:p>
          <text:p text:style-name="P8"><text:soft-page-break/><text:a xlink:type="simple" xlink:href="#__RefHeading___Toc406_3226105849" text:style-name="Index_20_Link" text:visited-style-name="Index_20_Link">Common mistakes<text:tab/>8</text:a></text:p>
          <text:p text:style-name="P6"><text:a xlink:type="simple" xlink:href="#__RefHeading___Toc962_3226105849" text:style-name="Index_20_Link" text:visited-style-name="Index_20_Link">Part IV - Match Management<text:tab/>ix</text:a></text:p>
          <text:p text:style-name="P7"><text:a xlink:type="simple" xlink:href="#__RefHeading___Toc408_3226105849" text:style-name="Index_20_Link" text:visited-style-name="Index_20_Link">Opposition Analysis<text:tab/>ix</text:a></text:p>
          <text:p text:style-name="P8"><text:a xlink:type="simple" xlink:href="#__RefHeading___Toc410_3226105849" text:style-name="Index_20_Link" text:visited-style-name="Index_20_Link">Scouting<text:tab/>ix</text:a></text:p>
          <text:p text:style-name="P8"><text:a xlink:type="simple" xlink:href="#__RefHeading___Toc412_3226105849" text:style-name="Index_20_Link" text:visited-style-name="Index_20_Link">Opposition reports<text:tab/>ix</text:a></text:p>
          <text:p text:style-name="P8"><text:a xlink:type="simple" xlink:href="#__RefHeading___Toc414_3226105849" text:style-name="Index_20_Link" text:visited-style-name="Index_20_Link">Identifying weaknesses<text:tab/>ix</text:a></text:p>
          <text:p text:style-name="P7"><text:a xlink:type="simple" xlink:href="#__RefHeading___Toc416_3226105849" text:style-name="Index_20_Link" text:visited-style-name="Index_20_Link">Match Day<text:tab/>ix</text:a></text:p>
          <text:p text:style-name="P8"><text:a xlink:type="simple" xlink:href="#__RefHeading___Toc418_3226105849" text:style-name="Index_20_Link" text:visited-style-name="Index_20_Link">Reading the match<text:tab/>ix</text:a></text:p>
          <text:p text:style-name="P8"><text:a xlink:type="simple" xlink:href="#__RefHeading___Toc420_3226105849" text:style-name="Index_20_Link" text:visited-style-name="Index_20_Link">Tactical tweaks<text:tab/>ix</text:a></text:p>
          <text:p text:style-name="P8"><text:a xlink:type="simple" xlink:href="#__RefHeading___Toc422_3226105849" text:style-name="Index_20_Link" text:visited-style-name="Index_20_Link">Shouts<text:tab/>ix</text:a></text:p>
          <text:p text:style-name="P8"><text:a xlink:type="simple" xlink:href="#__RefHeading___Toc424_3226105849" text:style-name="Index_20_Link" text:visited-style-name="Index_20_Link">Substitutions<text:tab/>ix</text:a></text:p>
          <text:p text:style-name="P7"><text:a xlink:type="simple" xlink:href="#__RefHeading___Toc426_3226105849" text:style-name="Index_20_Link" text:visited-style-name="Index_20_Link">Performance Analysis<text:tab/>ix</text:a></text:p>
          <text:p text:style-name="P8"><text:a xlink:type="simple" xlink:href="#__RefHeading___Toc428_3226105849" text:style-name="Index_20_Link" text:visited-style-name="Index_20_Link">xG<text:tab/>ix</text:a></text:p>
          <text:p text:style-name="P8"><text:a xlink:type="simple" xlink:href="#__RefHeading___Toc430_3226105849" text:style-name="Index_20_Link" text:visited-style-name="Index_20_Link">Data Hub<text:tab/>ix</text:a></text:p>
          <text:p text:style-name="P8"><text:a xlink:type="simple" xlink:href="#__RefHeading___Toc432_3226105849" text:style-name="Index_20_Link" text:visited-style-name="Index_20_Link">Momentum<text:tab/>ix</text:a></text:p>
          <text:p text:style-name="P8"><text:a xlink:type="simple" xlink:href="#__RefHeading___Toc434_3226105849" text:style-name="Index_20_Link" text:visited-style-name="Index_20_Link">Player ratings<text:tab/>ix</text:a></text:p>
          <text:p text:style-name="P8"><text:a xlink:type="simple" xlink:href="#__RefHeading___Toc436_3226105849" text:style-name="Index_20_Link" text:visited-style-name="Index_20_Link">Learning from matches<text:tab/>ix</text:a></text:p>
          <text:p text:style-name="P7"><text:a xlink:type="simple" xlink:href="#__RefHeading___Toc274_874366845" text:style-name="Index_20_Link" text:visited-style-name="Index_20_Link">Appendix – Revision History<text:tab/>11</text:a></text:p>
        </text:index-body>
      </text:table-of-content>
      <text:p text:style-name="Body_20_Text"/>
      <text:h text:style-name="P53" text:outline-level="1"><text:bookmark-start text:name="__RefHeading___Toc956_3226105849"/>Part <text:span text:style-name="T3">I - </text:span>Foundations<text:bookmark-end text:name="__RefHeading___Toc956_3226105849"/></text:h>
      <text:h text:style-name="Chapter_20_Title" text:outline-level="2">Introduction</text:h>
      <text:p text:style-name="Body_20_Text">When I first started playing Football Manager <text:span text:style-name="T6">the game I didn’t know where to start. I turned to YouTube to see what helpful videos were out there in the search </text:span>for the perfect tactic.</text:p>
      <text:p text:style-name="Body_20_Text">Like many managers, I believed success could be downloaded, copied or recreated by choosing the right formation, selecting the best player roles and adjusting a handful of tactical instructions. <text:span text:style-name="T6">I</text:span>t worked for a while <text:span text:style-name="T6">but when it didn’t I didn’t know how t diagnose what was wrong and how to fix it.</text:span></text:p>
      <text:p text:style-name="Body_20_Text">Eventually I realised I was solving the wrong problem.</text:p>
      <text:p text:style-name="Body_20_Text">Football Manager is not won by finding a perfect tactic. It is won by making consistently better decisions than the opposition over the course of a season. Every match presents new challenges, every squad has different strengths and weaknesses, and every tactical decision involves compromise.</text:p>
      <text:p text:style-name="Body_20_Text">This handbook is the result of that realisation.</text:p>
      <text:p text:style-name="Body_20_Text">It is not intended to be a collection of "best tactics" or a guide to exploiting the match engine. Instead, it explains the way I <text:span text:style-name="T6">want to </text:span>approach Football Manager. The ideas within these pages are based on football principles, but they are always applied with one purpose in mind: <text:span text:style-name="T6">making things work like reality in </text:span>Football Manager <text:span text:style-name="T6">the game.</text:span></text:p>
      <text:p text:style-name="Body_20_Text">Throughout this handbook I will explain why I make tactical decisions before explaining how I implement them in the game. Whenever possible, I will use Football Manager's own tools—such as the Tactics screen, Match Analysis, Average Positions, Pass Maps and the Data Hub—to gather evidence and evaluate whether my decisions are working.</text:p>
      <text:p text:style-name="Body_20_Text">I do not expect every manager to reach the same conclusions that I do. Football Manager is one of the few games that rewards different approaches. A possession-based side, a direct counter-attacking team and a disciplined defensive unit can all be successful if they are built on clear ideas and managed consistently.</text:p>
      <text:p text:style-name="Body_20_Text">If, after reading this handbook, I find myself asking better questions, making more informed decisions and understanding why my team succeeds or fails, then this handbook has achieved its purpose.</text:p>
      <text:h text:style-name="P50" text:outline-level="2"><text:bookmark-start text:name="__RefHeading___Toc306_3226105849"/><text:soft-page-break/><text:span text:style-name="T6">F</text:span>ootball Before Formations<text:bookmark-end text:name="__RefHeading___Toc306_3226105849"/></text:h>
      <text:h text:style-name="Section_20_Title" text:outline-level="3"><text:bookmark-start text:name="__RefHeading___Toc308_3226105849"/>Why <text:span text:style-name="T5">T</text:span>his <text:span text:style-name="T5">H</text:span>andbook <text:span text:style-name="T5">E</text:span>xists <text:bookmark-end text:name="__RefHeading___Toc308_3226105849"/></text:h>
      <text:p text:style-name="Body_20_Text">When I first started playing Football Manager I didn't know where to begin. Like many managers, I searched YouTube and downloaded tactics that promised instant success.</text:p>
      <text:p text:style-name="Body_20_Text">Sometimes they worked.</text:p>
      <text:p text:style-name="Body_20_Text">Most of the time they didn't.</text:p>
      <text:p text:style-name="Body_20_Text">The biggest problem wasn't that the tactics were bad. It was that I didn't understand <text:span text:style-name="Strong_20_Emphasis">why</text:span> they worked, or why they eventually stopped working.</text:p>
      <text:p text:style-name="Body_20_Text">Over time I realised I wasn't learning Football Manager. I was copying someone else's decisions.</text:p>
      <text:p text:style-name="Body_20_Text">This handbook is my attempt to fix that.</text:p>
      <text:p text:style-name="Body_20_Text">It isn't about finding the perfect tactic.</text:p>
      <text:p text:style-name="Body_20_Text">It's about understanding the decisions that create a successful tactic and learning how to recognise when those decisions need to change.</text:p>
      <text:p text:style-name="Body_20_Text">Football provides the principles.</text:p>
      <text:p text:style-name="Body_20_Text"><draw:frame draw:style-name="fr3" draw:name="Frame2" text:anchor-type="paragraph" svg:width="6.765cm" draw:z-index="0"><draw:text-box fo:min-height="4.427cm"><text:p text:style-name="P15">Don’t copy decisions…</text:p><text:p text:style-name="P15">Understand why the decision was made.</text:p><text:p text:style-name="MJ_20_Text"/></draw:text-box></draw:frame>Football Manager provides the tools to test those principles.</text:p>
      <text:h text:style-name="Section_20_Title" text:outline-level="3"><text:bookmark-start text:name="__RefHeading___Toc310_3226105849"/>Football is <text:span text:style-name="T5">A</text:span>bout <text:span text:style-name="T5">S</text:span>olving <text:span text:style-name="T5">P</text:span>roblems <text:bookmark-end text:name="__RefHeading___Toc310_3226105849"/></text:h>
      <text:p text:style-name="Body_20_Text">Every tactical change should solve a problem.</text:p>
      <text:p text:style-name="Body_20_Text">Examples include:</text:p>
      <text:list xml:id="list2447059744" text:style-name="L1">
        <text:list-item>
          <text:p text:style-name="P22">My striker is isolated. </text:p>
        </text:list-item>
        <text:list-item>
          <text:p text:style-name="P22">We aren't creating enough chances. </text:p>
        </text:list-item>
        <text:list-item>
          <text:p text:style-name="P22">We're conceding too many crosses. </text:p>
        </text:list-item>
        <text:list-item>
          <text:p text:style-name="P22">The midfield can't progress the ball. </text:p>
        </text:list-item>
        <text:list-item>
          <text:p text:style-name="P22">The opposition always has a spare player. </text:p>
        </text:list-item>
        <text:list-item>
          <text:p text:style-name="P22">We lose possession too easily. </text:p>
        </text:list-item>
      </text:list>
      <text:p text:style-name="Body_20_Text">The first job isn't changing the tactic.</text:p>
      <text:p text:style-name="Body_20_Text">The first job is identifying the problem.</text:p>
      <text:p text:style-name="Body_20_Text">Only then can I decide what needs to change.</text:p>
      <text:p text:style-name="Body_20_Text">Football Manager provides plenty of evidence through Match Stats, Average Positions, Pass Maps, xG, the Data Hub and match replays.</text:p>
      <text:p text:style-name="Body_20_Text">The difficult part isn't finding information.</text:p>
      <text:p text:style-name="Body_20_Text">It's deciding which information matters.</text:p>
      <text:p text:style-name="Analysis"><text:soft-page-break/><text:span text:style-name="Strong_20_Emphasis"><text:span text:style-name="T10">What to look for in FM</text:span></text:span></text:p>
      <text:p text:style-name="Analysis">What problem am I trying to solve?</text:p>
      <text:p text:style-name="Analysis"><text:span text:style-name="Strong_20_Emphasis">Useful FM Screens</text:span></text:p>
      <text:p text:style-name="Analysis"><text:span text:style-name="Strong_20_Emphasis">- </text:span>Match Stats </text:p>
      <text:p text:style-name="Analysis">- Average Positions </text:p>
      <text:p text:style-name="Analysis">- Pass Map </text:p>
      <text:p text:style-name="Analysis">- Shot Map </text:p>
      <text:p text:style-name="Analysis">- Data Hub </text:p>
      <text:p text:style-name="Analysis">- Match Replay</text:p>
      <text:p text:style-name="Body_20_Text"/>
      <text:p text:style-name="P11"><text:span text:style-name="T7">I</text:span>f I can't explain why I'm changing an instruction, I probably shouldn't change it</text:p>
      <text:h text:style-name="Section_20_Title" text:outline-level="3"><text:bookmark-start text:name="__RefHeading___Toc312_3226105849"/>Principles <text:span text:style-name="T5">B</text:span>efore <text:span text:style-name="T5">S</text:span>ystems <text:bookmark-end text:name="__RefHeading___Toc312_3226105849"/></text:h>
      <text:p text:style-name="Body_20_Text">I no longer start with a formation.</text:p>
      <text:p text:style-name="Body_20_Text">I start with a set of principles.</text:p>
      <text:p text:style-name="Body_20_Text">For example:</text:p>
      <text:list xml:id="list2776031443" text:style-name="L2">
        <text:list-item>
          <text:p text:style-name="P23">I want to control possession. </text:p>
        </text:list-item>
        <text:list-item>
          <text:p text:style-name="P23">I want to press aggressively. </text:p>
        </text:list-item>
        <text:list-item>
          <text:p text:style-name="P23">I want to attack quickly after winning the ball. </text:p>
        </text:list-item>
        <text:list-item>
          <text:p text:style-name="P23">I want to defend compactly. </text:p>
        </text:list-item>
        <text:list-item>
          <text:p text:style-name="P23">I want to overload central areas. </text:p>
        </text:list-item>
      </text:list>
      <text:p text:style-name="Body_20_Text">Once I know <text:span text:style-name="Strong_20_Emphasis">how</text:span> I want to play, I can decide which formation, roles and instructions best support those ideas.</text:p>
      <text:p text:style-name="Body_20_Text">A formation should support my principles.</text:p>
      <text:p text:style-name="Body_20_Text">It should never define them.</text:p>
      <text:p text:style-name="P12">A formation is only the starting position.</text:p>
      <text:p text:style-name="Tactical_20_Principle">The football begins when the players start moving.</text:p>
      <text:p text:style-name="P10">Two managers can use exactly the same formation and produce completely different football.</text:p>
      <text:p text:style-name="FM_20_Behaviour">The difference comes from:</text:p>
      <text:p text:style-name="FM_20_Behaviour">- player roles</text:p>
      <text:p text:style-name="FM_20_Behaviour">- duties</text:p>
      <text:p text:style-name="FM_20_Behaviour"><text:soft-page-break/>- team instructions</text:p>
      <text:p text:style-name="FM_20_Behaviour">- player attributes</text:p>
      <text:p text:style-name="FM_20_Behaviour">- player traits</text:p>
      <text:p text:style-name="FM_20_Behaviour">- mentality</text:p>
      <text:p text:style-name="FM_20_Behaviour">The formation stays the same.</text:p>
      <text:p text:style-name="FM_20_Behaviour">The behaviour changes.</text:p>
      <text:p text:style-name="Body_20_Text"/>
      <text:h text:style-name="P57" text:outline-level="3">The <text:span text:style-name="T5">M</text:span>anager's <text:span text:style-name="T5">C</text:span>ycle </text:h>
      <text:p text:style-name="Body_20_Text">Every match follows the same process.</text:p>
      <text:section text:style-name="Sect2" text:name="code-block-viewer">
        <text:p text:style-name="P2"><text:span text:style-name="Source_20_Text">Observe</text:span></text:p>
        <text:p text:style-name="P2"><text:span text:style-name="Source_20_Text">↓</text:span></text:p>
        <text:p text:style-name="P2"><text:span text:style-name="Source_20_Text">Identify the problem</text:span></text:p>
        <text:p text:style-name="P2"><text:span text:style-name="Source_20_Text">↓</text:span></text:p>
        <text:p text:style-name="P2"><text:span text:style-name="Source_20_Text">Gather evidence</text:span></text:p>
        <text:p text:style-name="P2"><text:span text:style-name="Source_20_Text">↓</text:span></text:p>
        <text:p text:style-name="P2"><text:span text:style-name="Source_20_Text">Decide why it happened</text:span></text:p>
        <text:p text:style-name="P2"><text:span text:style-name="Source_20_Text">↓</text:span></text:p>
        <text:p text:style-name="P2"><text:span text:style-name="Source_20_Text">Make the smallest change possible</text:span></text:p>
        <text:p text:style-name="P2"><text:span text:style-name="Source_20_Text">↓</text:span></text:p>
        <text:p text:style-name="P3"><text:span text:style-name="Source_20_Text">Observe again</text:span></text:p>
      </text:section>
      <text:p text:style-name="Body_20_Text">I try to avoid making several tactical changes at once.</text:p>
      <text:p text:style-name="Body_20_Text">If I change four things and my team improves, I have no idea which change solved the problem.</text:p>
      <text:p text:style-name="Body_20_Text">Small changes are easier to evaluate.</text:p>
      <text:h text:style-name="Section_20_Title" text:outline-level="3"><text:bookmark-start text:name="__RefHeading___Toc316_3226105849"/>How to <text:span text:style-name="T5">U</text:span>se <text:span text:style-name="T5">T</text:span>his <text:span text:style-name="T5">H</text:span>andbook <text:bookmark-end text:name="__RefHeading___Toc316_3226105849"/></text:h>
      <text:p text:style-name="Body_20_Text">This handbook is written in the same order that I build a tactic.</text:p>
      <text:p text:style-name="Body_20_Text">I begin by deciding how I want my team to play.</text:p>
      <text:p text:style-name="Body_20_Text">I then translate those ideas into formations, roles and instructions.</text:p>
      <text:p text:style-name="Body_20_Text">Finally, I use Football Manager's analysis tools to decide whether my ideas are working.</text:p>
      <text:p text:style-name="Body_20_Text">Each chapter builds on the previous one.</text:p>
      <text:p text:style-name="Body_20_Text">Whenever possible I explain:</text:p>
      <text:list xml:id="list1618088294" text:style-name="L3">
        <text:list-item>
          <text:p text:style-name="P24">the football principle </text:p>
        </text:list-item>
        <text:list-item>
          <text:p text:style-name="P24">how Football Manager models it </text:p>
        </text:list-item>
        <text:list-item>
          <text:p text:style-name="P24">where I look for evidence </text:p>
        </text:list-item>
        <text:list-item>
          <text:p text:style-name="P24">how I decide what to change </text:p>
        </text:list-item>
      </text:list>
      <text:p text:style-name="P9">My aim isn't to build the best tactic.</text:p>
      <text:p text:style-name="P9"><text:soft-page-break/>My aim is to build a tactic that I understand.</text:p>
      <text:p text:style-name="P9">If I understand why it works, I have a much better chance of fixing it when it doesn't.</text:p>
      <text:h text:style-name="Section_20_Title" text:outline-level="3">Chapter Summary</text:h>
      <text:p text:style-name="Body_20_Text">Before changing a tactic, I ask myself four questions.</text:p>
      <text:list xml:id="list1437728677" text:style-name="L4">
        <text:list-item>
          <text:p text:style-name="P25">What problem am I trying to solve? </text:p>
        </text:list-item>
        <text:list-item>
          <text:p text:style-name="P25">What evidence supports that conclusion? </text:p>
        </text:list-item>
        <text:list-item>
          <text:p text:style-name="P25">What is the smallest change I can make? </text:p>
        </text:list-item>
        <text:list-item>
          <text:p text:style-name="P25">How will I know if it worked? </text:p>
        </text:list-item>
      </text:list>
      <text:p text:style-name="Body_20_Text">These four questions form the foundation of everything that follows.</text:p>
      <text:h text:style-name="Chapter_20_Title" text:outline-level="2"><text:bookmark-start text:name="__RefHeading___Toc318_3226105849"/><text:span text:style-name="Strong_20_Emphasis">Understanding the Match Engine</text:span><text:bookmark-end text:name="__RefHeading___Toc318_3226105849"/></text:h>
      <text:h text:style-name="Section_20_Title" text:outline-level="3">What FM Actually Simulates</text:h>
      <text:p text:style-name="Body_20_Text"/>
      <text:p text:style-name="Body_20_Text">Football Manager doesn't simulate every kick of a football.</text:p>
      <text:p text:style-name="Body_20_Text">It simulates thousands of decisions.</text:p>
      <text:p text:style-name="Body_20_Text">Every player is constantly making choices based on the information available to them.</text:p>
      <text:p text:style-name="Body_20_Text">Questions like:</text:p>
      <text:list xml:id="list3955023559" text:style-name="L5">
        <text:list-item>
          <text:p text:style-name="P26">Should I pass or dribble?</text:p>
        </text:list-item>
        <text:list-item>
          <text:p text:style-name="P26">Do I press or hold my position?</text:p>
        </text:list-item>
        <text:list-item>
          <text:p text:style-name="P26">Should I cross or recycle possession?</text:p>
        </text:list-item>
        <text:list-item>
          <text:p text:style-name="P26">Can I reach the ball first?</text:p>
        </text:list-item>
        <text:list-item>
          <text:p text:style-name="P26">Is there space behind the defence?</text:p>
        </text:list-item>
      </text:list>
      <text:p text:style-name="Body_20_Text">The match engine evaluates these decisions using the player's attributes, tactical instructions, role, mentality and the situation on the pitch.</text:p>
      <text:p text:style-name="Body_20_Text">The result is a football match that feels realistic because the decisions are realistic.</text:p>
      <text:p text:style-name="Body_20_Text">Understanding this changes how I think about tactics.</text:p>
      <text:p text:style-name="Body_20_Text">Instead of asking,</text:p>
      <text:p text:style-name="P14">"What instruction should I use?"</text:p>
      <text:p text:style-name="Body_20_Text">I ask,</text:p>
      <text:p text:style-name="P14">"What decisions am I asking my players to make?"</text:p>
      <text:p text:style-name="Tactical_20_Principle"><text:soft-page-break/>Players don't follow scripts.</text:p>
      <text:p text:style-name="P16">They solve problems using the abilities they possess.</text:p>
      <text:p text:style-name="P16">Football Manager attempts to model those decisions.</text:p>
      <text:p text:style-name="Body_20_Text"><draw:frame draw:style-name="fr2" draw:name="Frame1" text:anchor-type="paragraph" svg:width="7.879cm" draw:z-index="1"><draw:text-box fo:min-height="4.161cm"><text:p text:style-name="MJ_20_Text">Every instruction changes the decisions my players are likely to make.</text:p></draw:text-box></draw:frame></text:p>
      <text:p text:style-name="Body_20_Text"/>
      <text:p text:style-name="Body_20_Text"/>
      <text:h text:style-name="Section_20_Title" text:outline-level="3">Decision Making</text:h>
      <text:p text:style-name="Body_20_Text">Every player is trying to solve the same problem.</text:p>
      <text:p text:style-name="P14">What is the best action right now?</text:p>
      <text:p text:style-name="Body_20_Text">Some players consistently make good decisions.</text:p>
      <text:p text:style-name="Body_20_Text">Others don't.</text:p>
      <text:p text:style-name="Body_20_Text">Decision making isn't controlled by a single attribute.</text:p>
      <text:p text:style-name="Body_20_Text">It is influenced by several attributes working together.</text:p>
      <text:p text:style-name="Body_20_Text">For example:</text:p>
      <text:list xml:id="list3636151611" text:style-name="L6">
        <text:list-item>
          <text:p text:style-name="P27">Vision helps a player see passing options.</text:p>
        </text:list-item>
        <text:list-item>
          <text:p text:style-name="P27">Decisions influences the action they choose.</text:p>
        </text:list-item>
        <text:list-item>
          <text:p text:style-name="P27">Composure affects how they react under pressure.</text:p>
        </text:list-item>
        <text:list-item>
          <text:p text:style-name="P27">Technique determines whether they can execute the action successfully.</text:p>
        </text:list-item>
      </text:list>
      <text:p text:style-name="Body_20_Text">A player may recognise the perfect pass but lack the technique to play it.</text:p>
      <text:p text:style-name="Body_20_Text">Another may have the technique but never recognise the opportunity.</text:p>
      <text:p text:style-name="Body_20_Text">Good footballers combine both.</text:p>
      <text:p text:style-name="FM_20_Behaviour">Improving a player's options doesn't guarantee they will choose the best one.</text:p>
      <text:p text:style-name="FM_20_Behaviour">Likewise, choosing the correct tactic won't help if the players can't execute it.</text:p>
      <text:p text:style-name="Match_20_Tip">When a player repeatedly makes poor decisions, consider whether the tactic is asking too much of them.</text:p>
      <text:p text:style-name="Body_20_Text"/>
      <text:h text:style-name="Section_20_Title" text:outline-level="3">Attributes</text:h>
      <text:p text:style-name="Body_20_Text">Attributes describe what a player is capable of doing.</text:p>
      <text:p text:style-name="Body_20_Text">They do not guarantee success.</text:p>
      <text:p text:style-name="Body_20_Text">High Passing doesn't mean every pass will be accurate.</text:p>
      <text:p text:style-name="Body_20_Text">High Finishing doesn't mean every shot will score.</text:p>
      <text:p text:style-name="Body_20_Text"><text:soft-page-break/>Instead, attributes influence the likelihood of success over hundreds of actions.</text:p>
      <text:p text:style-name="Body_20_Text">This is why Football Manager should always be judged over a series of matches rather than a single result.</text:p>
      <text:p text:style-name="Body_20_Text">Even excellent decisions sometimes fail.</text:p>
      <text:p text:style-name="Analysis"><text:span text:style-name="Strong_20_Emphasis"><text:span text:style-name="T10">What to look for in FM</text:span></text:span></text:p>
      <text:p text:style-name="Analysis">When assessing a player's performance, don't focus on one mistake.</text:p>
      <text:p text:style-name="Analysis">Look for repeated patterns over multiple matches.</text:p>
      <text:h text:style-name="Section_20_Title" text:outline-level="3">Roles</text:h>
      <text:p text:style-name="Body_20_Text">Roles describe how I want a player to contribute to the team.</text:p>
      <text:p text:style-name="Body_20_Text">They are not positions.</text:p>
      <text:p text:style-name="Body_20_Text">A Complete Forward and an Advanced Forward may both play as a striker, but they solve different problems.</text:p>
      <text:p text:style-name="Body_20_Text">Likewise, two Central Midfielders can perform very different functions depending on their role and duty.</text:p>
      <text:p text:style-name="Body_20_Text">Roles should support my tactical principles.</text:p>
      <text:p text:style-name="Body_20_Text">I choose the role because it helps the team achieve something.</text:p>
      <text:p text:style-name="Body_20_Text">I don't choose it because it looks interesting.</text:p>
      <text:p text:style-name="Tactical_20_Principle">Every role should have a purpose.</text:p>
      <text:p text:style-name="Tactical_20_Principle">If I can't explain why a player has a particular role, I should probably reconsider it.</text:p>
      <text:h text:style-name="Section_20_Title" text:outline-level="3">Team Instructions</text:h>
      <text:p text:style-name="Body_20_Text">T<text:span text:style-name="T8">e</text:span>am Instructions influence the behaviour of the entire team.</text:p>
      <text:p text:style-name="Body_20_Text">Rather than controlling individual players, they create a shared approach.</text:p>
      <text:p text:style-name="Body_20_Text">For example:</text:p>
      <text:list xml:id="list1269988397" text:style-name="L7">
        <text:list-item>
          <text:p text:style-name="P28">Higher Tempo encourages quicker decisions.</text:p>
        </text:list-item>
        <text:list-item>
          <text:p text:style-name="P28">Shorter Passing encourages safer passing options.</text:p>
        </text:list-item>
        <text:list-item>
          <text:p text:style-name="P28">Higher Defensive Line changes where the team defends.</text:p>
        </text:list-item>
        <text:list-item>
          <text:p text:style-name="P28">Counter-Press changes behaviour immediately after losing possession.</text:p>
        </text:list-item>
      </text:list>
      <text:p text:style-name="Body_20_Text">Each instruction affects several parts of the game.</text:p>
      <text:p text:style-name="Body_20_Text">Very few instructions operate in isolation.</text:p>
      <text:p text:style-name="Warning">Adding more instructions doesn't automatically improve a tactic.</text:p>
      <text:p text:style-name="Warning">Every instruction introduces another compromise.</text:p>
      <text:h text:style-name="Section_20_Title" text:outline-level="3"><text:soft-page-break/>Hidden Interactions</text:h>
      <text:p text:style-name="Body_20_Text">One of the biggest mistakes I made was treating every instruction as independent.</text:p>
      <text:p text:style-name="Body_20_Text">They're not.</text:p>
      <text:p text:style-name="Body_20_Text"><draw:frame draw:style-name="fr2" draw:name="Frame3" text:anchor-type="paragraph" svg:width="7.721cm" draw:z-index="2"><draw:text-box fo:min-height="4.103cm"><text:p text:style-name="MJ_20_Text">Every tactical instruction has a cost.</text:p><text:p text:style-name="MJ_20_Text">My job is deciding whether the benefit is worth paying for.</text:p></draw:text-box></draw:frame>Changing one instruction often changes the effectiveness of another.</text:p>
      <text:p text:style-name="Body_20_Text">For example:</text:p>
      <text:list xml:id="list1855857228" text:style-name="L8">
        <text:list-item>
          <text:p text:style-name="P29">Increasing Tempo reduces the time available to make decisions.</text:p>
        </text:list-item>
        <text:list-item>
          <text:p text:style-name="P29">A Higher Defensive Line increases the space behind the defence.</text:p>
        </text:list-item>
        <text:list-item>
          <text:p text:style-name="P29">A Narrow Attack naturally creates more space on the wings.</text:p>
        </text:list-item>
      </text:list>
      <text:p text:style-name="Body_20_Text">The match engine is evaluating all of these together.</text:p>
      <text:p text:style-name="Body_20_Text">Because of this, I prefer making one tactical change at a time.</text:p>
      <text:p text:style-name="Body_20_Text">It becomes much easier to understand what actually caused the improvement.</text:p>
      <text:h text:style-name="Section_20_Title" text:outline-level="3">Match Engine vs Reality</text:h>
      <text:p text:style-name="Body_20_Text">Football Manager is a simulation.</text:p>
      <text:p text:style-name="Body_20_Text">Like every simulation, it simplifies reality.</text:p>
      <text:p text:style-name="Body_20_Text">Real football contains thousands of variables that cannot be modelled completely.</text:p>
      <text:p text:style-name="Body_20_Text">Weather.</text:p>
      <text:p text:style-name="Body_20_Text">Communication.</text:p>
      <text:p text:style-name="Body_20_Text">Confidence.</text:p>
      <text:p text:style-name="Body_20_Text">Luck.</text:p>
      <text:p text:style-name="Body_20_Text">Individual moments of brilliance.</text:p>
      <text:p text:style-name="Body_20_Text">The match engine captures many of these ideas, but never perfectly.</text:p>
      <text:p text:style-name="Body_20_Text">That isn't a weakness.</text:p>
      <text:p text:style-name="Body_20_Text">It's simply the nature of a simulation.</text:p>
      <text:p text:style-name="Body_20_Text">The goal isn't to recreate football exactly.</text:p>
      <text:p text:style-name="Body_20_Text">The goal is to create a believable environment where football principles generally produce believable results.</text:p>
      <text:p text:style-name="Body_20_Text">Understanding this helps me avoid chasing exploits.</text:p>
      <text:p text:style-name="Body_20_Text">Instead, I try to build tactics that make footballing sense.</text:p>
      <text:p text:style-name="Body_20_Text">Those tactics tend to remain effective across multiple versions of Football Manager.</text:p>
      <text:h text:style-name="Section_20_Title" text:outline-level="3"><text:soft-page-break/>Chapter Summary</text:h>
      <text:p text:style-name="Body_20_Text">The match engine isn't trying to simulate football.</text:p>
      <text:p text:style-name="Body_20_Text">It's trying to simulate footballers making decisions.</text:p>
      <text:p text:style-name="Body_20_Text">Those decisions are influenced by:</text:p>
      <text:list xml:id="list2190814693" text:style-name="L9">
        <text:list-item>
          <text:p text:style-name="P30">attributes</text:p>
        </text:list-item>
        <text:list-item>
          <text:p text:style-name="P30">roles</text:p>
        </text:list-item>
        <text:list-item>
          <text:p text:style-name="P30">duties</text:p>
        </text:list-item>
        <text:list-item>
          <text:p text:style-name="P30">team instructions</text:p>
        </text:list-item>
        <text:list-item>
          <text:p text:style-name="P30">mentality</text:p>
        </text:list-item>
        <text:list-item>
          <text:p text:style-name="P30">the situation on the pitch</text:p>
        </text:list-item>
      </text:list>
      <text:p text:style-name="Body_20_Text">The better I understand those interactions, the easier it becomes to understand why my tactic succeeds or fails.</text:p>
      <text:h text:style-name="Chapter_20_Title" text:outline-level="2"><text:bookmark-start text:name="__RefHeading___Toc334_3226105849"/><text:span text:style-name="Strong_20_Emphasis">Building a Tactical Identity</text:span><text:bookmark-end text:name="__RefHeading___Toc334_3226105849"/></text:h>
      <text:h text:style-name="Section_20_Title" text:outline-level="3"><text:bookmark-start text:name="__RefHeading___Toc336_3226105849"/>How <text:span text:style-name="T5">D</text:span>o <text:span text:style-name="T5">Y</text:span>ou <text:span text:style-name="T5">W</text:span>ant <text:span text:style-name="T5">Y</text:span>our <text:span text:style-name="T5">T</text:span>eam to <text:span text:style-name="T5">P</text:span>lay? <text:bookmark-end text:name="__RefHeading___Toc336_3226105849"/></text:h>
      <text:p text:style-name="Body_20_Text">Before I choose roles or instructions, I need a clear idea of what I want my team to look like.</text:p>
      <text:p text:style-name="Body_20_Text">Not in terms of formation.</text:p>
      <text:p text:style-name="Body_20_Text">In terms of behaviour.</text:p>
      <text:p text:style-name="Body_20_Text">Do I want to dominate the ball?</text:p>
      <text:p text:style-name="Body_20_Text">Do I want to attack quickly?</text:p>
      <text:p text:style-name="Body_20_Text">Do I want to press high?</text:p>
      <text:p text:style-name="Body_20_Text">Do I want to stay compact and counter?</text:p>
      <text:p text:style-name="Body_20_Text">Do I want to create chances through wide areas, central overloads or direct running?</text:p>
      <text:p text:style-name="Body_20_Text">If I cannot answer these questions, the tactic will probably become a collection of unrelated settings.</text:p>
      <text:p text:style-name="Body_20_Text">A tactical identity gives me a reference point.</text:p>
      <text:p text:style-name="Body_20_Text">It helps me decide what belongs in the tactic and what does not.</text:p>
      <text:p text:style-name="Body_20_Text">A good tactic should feel like one idea expressed through many decisions.</text:p>
      <text:h text:style-name="Section_20_Title" text:outline-level="3">Core Principles</text:h>
      <text:p text:style-name="Body_20_Text">I define my tactic by choosing a small number of core principles.</text:p>
      <text:p text:style-name="Body_20_Text">For example:</text:p>
      <text:list xml:id="list3552230618" text:style-name="L10">
        <text:list-item>
          <text:p text:style-name="P31">Keep possession patiently.</text:p>
        </text:list-item>
        <text:list-item>
          <text:p text:style-name="P31"><text:soft-page-break/>Win the ball back quickly.</text:p>
        </text:list-item>
        <text:list-item>
          <text:p text:style-name="P31">Attack space behind the defence.</text:p>
        </text:list-item>
        <text:list-item>
          <text:p text:style-name="P31">Protect the centre.</text:p>
        </text:list-item>
        <text:list-item>
          <text:p text:style-name="P31">Create overloads in wide areas.</text:p>
        </text:list-item>
        <text:list-item>
          <text:p text:style-name="P31">Build through midfield.</text:p>
        </text:list-item>
      </text:list>
      <text:p text:style-name="Body_20_Text">I do not need many.</text:p>
      <text:p text:style-name="Body_20_Text">Three or four clear principles are usually enough.</text:p>
      <text:p text:style-name="Body_20_Text">Too many principles create confusion.</text:p>
      <text:p text:style-name="Body_20_Text">The aim is not to describe every possible situation.</text:p>
      <text:p text:style-name="Body_20_Text">The aim is to define the kind of football I want my team to return to again and again.</text:p>
      <text:p text:style-name="Tactical_20_Principle">A tactical identity is not a formation.</text:p>
      <text:p text:style-name="Tactical_20_Principle">It is the behaviour I want to see repeatedly across different matches.</text:p>
      <text:h text:style-name="Section_20_Title" text:outline-level="3">Defensive Identity</text:h>
      <text:p text:style-name="Body_20_Text">My defensive identity answers one question:</text:p>
      <text:p text:style-name="P17">How do I want to stop the opposition?</text:p>
      <text:p text:style-name="Body_20_Text">There are several possible answers.</text:p>
      <text:p text:style-name="Body_20_Text">I might press high and try to win the ball early.</text:p>
      <text:p text:style-name="Body_20_Text">I might defend in a compact mid-block.</text:p>
      <text:p text:style-name="Body_20_Text">I might sit deeper, protect the box and force the opposition wide.</text:p>
      <text:p text:style-name="Body_20_Text">None of these is automatically right.</text:p>
      <text:p text:style-name="Body_20_Text">The correct choice depends on my players, my league and the risks I am willing to accept.</text:p>
      <text:p text:style-name="Body_20_Text">A high press needs energy, aggression, teamwork and pace behind the defence.</text:p>
      <text:p text:style-name="Body_20_Text">A deeper block needs concentration, positioning, strength and discipline.</text:p>
      <text:p text:style-name="Body_20_Text">The defensive idea must match the squad.</text:p>
      <text:p text:style-name="FM_20_Behaviour">Football Manager rewards defensive ideas that suit the players.</text:p>
      <text:p text:style-name="FM_20_Behaviour">A high line with slow centre-backs may create problems.</text:p>
      <text:p text:style-name="FM_20_Behaviour">A deep block with passive forwards may invite too much pressure.</text:p>
      <text:p text:style-name="FM_20_Behaviour">The instruction is only part of the tactic.</text:p>
      <text:p text:style-name="FM_20_Behaviour">The players decide whether it works.</text:p>
      <text:h text:style-name="Section_20_Title" text:outline-level="3">Attacking Identity</text:h>
      <text:p text:style-name="Body_20_Text">My attacking identity answers another question:</text:p>
      <text:p text:style-name="P17"><text:soft-page-break/>How do I want to create chances?</text:p>
      <text:p text:style-name="Body_20_Text">I might create chances by:</text:p>
      <text:list xml:id="list1329196071" text:style-name="L11">
        <text:list-item>
          <text:p text:style-name="P32">crossing from wide areas</text:p>
        </text:list-item>
        <text:list-item>
          <text:p text:style-name="P32"><draw:frame draw:style-name="fr1" draw:name="Frame4" text:anchor-type="paragraph" svg:x="11.43cm" svg:y="0.441cm" svg:width="6.001cm" draw:z-index="3"><draw:text-box fo:min-height="3.521cm"><text:p text:style-name="MJ_20_Text">A tactic should tell me where the next chance is supposed to come from.</text:p></draw:text-box></draw:frame>playing through central midfield</text:p>
        </text:list-item>
        <text:list-item>
          <text:p text:style-name="P32">attacking quickly into space</text:p>
        </text:list-item>
        <text:list-item>
          <text:p text:style-name="P32">overloading one side</text:p>
        </text:list-item>
        <text:list-item>
          <text:p text:style-name="P33">using a creative number ten</text:p>
        </text:list-item>
        <text:list-item>
          <text:p text:style-name="P33">releasing runners behind the defence</text:p>
        </text:list-item>
      </text:list>
      <text:p text:style-name="Body_20_Text">The important thing is that the roles support the idea.</text:p>
      <text:p text:style-name="Body_20_Text">If I want wide crosses, I need players attacking the box.</text:p>
      <text:p text:style-name="Body_20_Text">If I want central combinations, I need close support around the ball.</text:p>
      <text:p text:style-name="Body_20_Text">If I want quick counters, I need runners and forward passing options.</text:p>
      <text:p text:style-name="Body_20_Text">The attacking identity should be visible in the match.</text:p>
      <text:p text:style-name="Body_20_Text">If I cannot see how chances are supposed to be created, the tactic is not clear enough.</text:p>
      <text:p text:style-name="Body_20_Text"/>
      <text:h text:style-name="Section_20_Title" text:outline-level="3">Transition Identity</text:h>
      <text:p text:style-name="Body_20_Text">Transitions are the moments immediately after possession changes.</text:p>
      <text:p text:style-name="Body_20_Text">They often decide matches.</text:p>
      <text:p text:style-name="Body_20_Text">When I lose the ball, do I counter-press or regroup?</text:p>
      <text:p text:style-name="Body_20_Text">When I win the ball, do I counter quickly or keep possession?</text:p>
      <text:p text:style-name="Body_20_Text">These choices shape the whole tactic.</text:p>
      <text:p text:style-name="Body_20_Text">Counter-pressing can create quick chances, but it can also leave space if the press fails.</text:p>
      <text:p text:style-name="Body_20_Text">Regrouping can protect the team, but it may allow the opposition to keep possession.</text:p>
      <text:p text:style-name="Body_20_Text">Counter-attacking can punish teams quickly, but it needs forward runners and good decision making.</text:p>
      <text:p text:style-name="Body_20_Text">Holding possession can give control, but it may slow the attack down.</text:p>
      <text:p text:style-name="Body_20_Text">The transition identity links attack and defence.</text:p>
      <text:p text:style-name="Body_20_Text">It decides how quickly the team changes mindset.</text:p>
      <text:p text:style-name="Warning">Transition instructions are powerful.</text:p>
      <text:p text:style-name="Warning">They should match the players and the overall tactic.</text:p>
      <text:p text:style-name="Warning">Using Counter, Counter-Press, a high line and aggressive roles can create exciting football, but it can also make the team very open.</text:p>
      <text:p text:style-name="Analysis"><text:soft-page-break/><text:span text:style-name="Strong_20_Emphasis"><text:span text:style-name="T10">What to look for in FM</text:span></text:span></text:p>
      <text:p text:style-name="Analysis">Can I see my tactical identity in the match?</text:p>
      <text:p text:style-name="Analysis">Useful FM Screens</text:p>
      <text:p text:style-name="Analysis">Average Positions</text:p>
      <text:p text:style-name="Analysis">Pass Map</text:p>
      <text:p text:style-name="Analysis">Shot Map</text:p>
      <text:p text:style-name="Analysis">Possession Lost</text:p>
      <text:p text:style-name="Analysis">Possession Won</text:p>
      <text:p text:style-name="Analysis">Match Replay</text:p>
      <text:p text:style-name="Analysis">Data Hub trends</text:p>
      <text:h text:style-name="Section_20_Title" text:outline-level="3">Key Takeaways</text:h>
      <text:p text:style-name="Body_20_Text">A tactical identity gives the tactic direction.</text:p>
      <text:p text:style-name="Body_20_Text">The identity should explain:</text:p>
      <text:list xml:id="list2118260324" text:style-name="L12">
        <text:list-item>
          <text:p text:style-name="P34">how I defend</text:p>
        </text:list-item>
        <text:list-item>
          <text:p text:style-name="P34">how I attack</text:p>
        </text:list-item>
        <text:list-item>
          <text:p text:style-name="P34">how I react in transition</text:p>
        </text:list-item>
        <text:list-item>
          <text:p text:style-name="P34">which risks I accept</text:p>
        </text:list-item>
        <text:list-item>
          <text:p text:style-name="P34">which player strengths I want to use</text:p>
        </text:list-item>
      </text:list>
      <text:p text:style-name="Body_20_Text">If the tactic does not reflect the identity, I <text:span text:style-name="T9">will </text:span>need to simplify it.</text:p>
      <text:h text:style-name="P54" text:outline-level="1"><text:bookmark-start text:name="__RefHeading___Toc958_3226105849"/>Part <text:span text:style-name="T3">II - </text:span>Tactical Blueprint<text:bookmark-end text:name="__RefHeading___Toc958_3226105849"/></text:h>
      <text:h text:style-name="Chapter_20_Title" text:outline-level="2"><text:bookmark-start text:name="__RefHeading___Toc346_3226105849"/><text:span text:style-name="Strong_20_Emphasis">Space</text:span><text:bookmark-end text:name="__RefHeading___Toc346_3226105849"/></text:h>
      <text:h text:style-name="P58" text:outline-level="3">Why Space Matters</text:h>
      <text:p text:style-name="Body_20_Text">Football is a game of space.</text:p>
      <text:p text:style-name="Body_20_Text">The ball moves because players are trying to create, deny or exploit space.</text:p>
      <text:p text:style-name="Body_20_Text">Every pass, run and defensive action changes the amount of space available somewhere on the pitch.</text:p>
      <text:p text:style-name="Body_20_Text">The objective is not simply to keep possession or attack quickly.</text:p>
      <text:p text:style-name="Body_20_Text">The objective is to create more useful space than the opposition.</text:p>
      <text:p text:style-name="Body_20_Text">Everything else follows from that.</text:p>
      <text:h text:style-name="Section_20_Title" text:outline-level="3"><text:span text:style-name="T9">S</text:span>pace Changes Constantly</text:h>
      <text:p text:style-name="Body_20_Text">Space is never fixed.</text:p>
      <text:p text:style-name="Body_20_Text">Every player movement changes it.</text:p>
      <text:p text:style-name="Body_20_Text">When a striker drops deep, space may open behind the defence.</text:p>
      <text:p text:style-name="Body_20_Text">When a full-back overlaps, defenders are forced to make decisions.</text:p>
      <text:p text:style-name="Body_20_Text">When midfielders rotate positions, passing lanes appear and disappear.</text:p>
      <text:p text:style-name="Body_20_Text">Good teams recognise these changes.</text:p>
      <text:p text:style-name="Body_20_Text">Great teams create them deliberately.</text:p>
      <text:p text:style-name="Tactical_20_Principle">Space is not something players find.</text:p>
      <text:p text:style-name="Tactical_20_Principle">It is something they create.</text:p>
      <text:h text:style-name="Section_20_Title" text:outline-level="3">Creating Space</text:h>
      <text:p text:style-name="Body_20_Text">There are several common ways to create space.</text:p>
      <text:h text:style-name="Subsection_20_Title" text:outline-level="4">Width</text:h>
      <text:p text:style-name="Body_20_Text">Wide players stretch the opposition across the pitch.</text:p>
      <text:p text:style-name="Body_20_Text">As defenders move wider, central spaces often become available.</text:p>
      <text:p text:style-name="Body_20_Text"><text:soft-page-break/>If the opposition refuses to move, the wide player receives the ball with more time.</text:p>
      <text:p text:style-name="Body_20_Text">Either outcome is useful.</text:p>
      <text:h text:style-name="Subsection_20_Title" text:outline-level="4">Depth</text:h>
      <text:p text:style-name="Body_20_Text">Forward runs force defenders backwards.</text:p>
      <text:p text:style-name="Body_20_Text">This creates more room between defence and midfield.</text:p>
      <text:p text:style-name="Body_20_Text">Players arriving into this space often become the team's creators.</text:p>
      <text:p text:style-name="Body_20_Text">Without depth, defenders can step forward and compress the game.</text:p>
      <text:h text:style-name="P59" text:outline-level="4">Movement</text:h>
      <text:p text:style-name="Body_20_Text"><text:span text:style-name="T9">M</text:span>ovement forces defenders to choose.</text:p>
      <text:p text:style-name="Body_20_Text">Do they follow?</text:p>
      <text:p text:style-name="Body_20_Text">Do they hold their position?</text:p>
      <text:p text:style-name="Body_20_Text">Do they pass the player on?</text:p>
      <text:p text:style-name="Body_20_Text">Every decision creates an opportunity somewhere else.</text:p>
      <text:p text:style-name="Body_20_Text">The best movement is often the movement that creates space for someone else.</text:p>
      <text:h text:style-name="Subsection_20_Title" text:outline-level="4">Overloads</text:h>
      <text:p text:style-name="Body_20_Text">An overload exists when more attacking players occupy an area than defenders.</text:p>
      <text:p text:style-name="Body_20_Text">Examples include:</text:p>
      <text:list xml:id="list876884952" text:style-name="L13">
        <text:list-item>
          <text:p text:style-name="P35">Three midfielders against two. </text:p>
        </text:list-item>
        <text:list-item>
          <text:p text:style-name="P35">A full-back and winger combining against one defender. </text:p>
        </text:list-item>
        <text:list-item>
          <text:p text:style-name="P35">A striker dropping into midfield to create an extra passing option. </text:p>
        </text:list-item>
      </text:list>
      <text:p text:style-name="Body_20_Text"><draw:frame draw:style-name="fr1" draw:name="Frame5" text:anchor-type="paragraph" svg:x="13cm" svg:y="0.215cm" svg:width="6.001cm" draw:z-index="4"><draw:text-box fo:min-height="3.522cm"><text:p text:style-name="MJ_20_Text">Every player movement should ask a defender a question</text:p></draw:text-box></draw:frame>The aim is simple.</text:p>
      <text:p text:style-name="Body_20_Text">Create a numerical advantage somewhere on the pitch.</text:p>
      <text:h text:style-name="Section_20_Title" text:outline-level="3">Denying Space</text:h>
      <text:p text:style-name="Body_20_Text">Creating space is only half the game.</text:p>
      <text:p text:style-name="Body_20_Text">The opposition is trying to do exactly the same thing.</text:p>
      <text:p text:style-name="Body_20_Text">Good defending removes useful space.</text:p>
      <text:p text:style-name="Body_20_Text">Compact teams reduce passing options.</text:p>
      <text:p text:style-name="Body_20_Text">Pressing teams reduce time.</text:p>
      <text:p text:style-name="Body_20_Text">Deep defensive lines reduce space behind the defence.</text:p>
      <text:p text:style-name="Body_20_Text">Narrow shapes protect central areas.</text:p>
      <text:p text:style-name="Body_20_Text">Every defensive system is really an attempt to control space.</text:p>
      <text:h text:style-name="Section_20_Title" text:outline-level="3"><text:soft-page-break/>Space and Football Manager</text:h>
      <text:p text:style-name="Body_20_Text">Football Manager models space through player positioning, movement, roles and instructions.</text:p>
      <text:p text:style-name="Body_20_Text">Roles determine where players naturally move.</text:p>
      <text:p text:style-name="Body_20_Text">Mentality affects the risks players are willing to take.</text:p>
      <text:p text:style-name="Body_20_Text">Team Instructions influence spacing across the whole team.</text:p>
      <text:p text:style-name="Body_20_Text">Player Instructions modify individual movement.</text:p>
      <text:p text:style-name="Body_20_Text">No single instruction creates space.</text:p>
      <text:p text:style-name="Body_20_Text">Space emerges from how all eleven players interact.</text:p>
      <text:p text:style-name="FM_20_Behaviour">Changing one role can alter the positioning of several nearby players.</text:p>
      <text:p text:style-name="FM_20_Behaviour">Always observe how the whole team changes.</text:p>
      <text:h text:style-name="Section_20_Title" text:outline-level="3">Watching Space</text:h>
      <text:p text:style-name="Body_20_Text">One of the best ways to improve as a manager is simply to watch the space instead of the ball.</text:p>
      <text:p text:style-name="Body_20_Text">During highlights ask:</text:p>
      <text:list xml:id="list444017825" text:style-name="L14">
        <text:list-item>
          <text:p text:style-name="P36">Where is the free player? </text:p>
        </text:list-item>
        <text:list-item>
          <text:p text:style-name="P36">Where is the overload? </text:p>
        </text:list-item>
        <text:list-item>
          <text:p text:style-name="P36">Which defender has been pulled out of position? </text:p>
        </text:list-item>
        <text:list-item>
          <text:p text:style-name="P36">Which area keeps opening? </text:p>
        </text:list-item>
        <text:list-item>
          <text:p text:style-name="P36">Which area are we failing to use? </text:p>
        </text:list-item>
      </text:list>
      <text:p text:style-name="Body_20_Text">These questions often reveal more than watching the ball itself.</text:p>
      <text:p text:style-name="Horizontal_20_Line"/>
      <text:p text:style-name="Analysis">Useful screens:</text:p>
      <text:p text:style-name="Analysis">- Match Replay </text:p>
      <text:p text:style-name="Analysis">- Average Positions </text:p>
      <text:p text:style-name="Analysis">- Pass Map </text:p>
      <text:p text:style-name="Analysis">- Touch Heatmaps </text:p>
      <text:p text:style-name="Analysis">- Player Heatmaps </text:p>
      <text:p text:style-name="Analysis">Pause the replay frequently.</text:p>
      <text:p text:style-name="Analysis">The answer is often easier to see when the game is not moving.</text:p>
      <text:p text:style-name="Horizontal_20_Line"/>
      <text:p text:style-name="Warning">Do not judge your tactic only by possession.</text:p>
      <text:p text:style-name="Warning"><text:soft-page-break/>A team may have 65% possession while creating very little useful space.</text:p>
      <text:p text:style-name="Warning">Likewise, a counter-attacking side may create excellent chances from relatively little possession.</text:p>
      <text:p text:style-name="Warning">Space is usually a better indicator than possession.</text:p>
      <text:h text:style-name="Section_20_Title" text:outline-level="3">Key Takeaways</text:h>
      <text:list xml:id="list2350302515" text:style-name="L15">
        <text:list-item>
          <text:p text:style-name="P37">Football is a game of space. </text:p>
        </text:list-item>
        <text:list-item>
          <text:p text:style-name="P37">Good movement creates space. </text:p>
        </text:list-item>
        <text:list-item>
          <text:p text:style-name="P37">Good defending removes it. </text:p>
        </text:list-item>
        <text:list-item>
          <text:p text:style-name="P37">Roles and instructions influence space rather than control it directly. </text:p>
        </text:list-item>
        <text:list-item>
          <text:p text:style-name="P37">Watch where space appears, not just where the ball travels.</text:p>
        </text:list-item>
      </text:list>
      <text:h text:style-name="Chapter_20_Title" text:outline-level="2"><text:bookmark-start text:name="__RefHeading___Toc358_3226105849"/><text:span text:style-name="Strong_20_Emphasis">Team Shape</text:span><text:bookmark-end text:name="__RefHeading___Toc358_3226105849"/></text:h>
      <text:h text:style-name="Section_20_Title" text:outline-level="3">What Is Team Shape?</text:h>
      <text:p text:style-name="Body_20_Text">A formation tells me where players start.</text:p>
      <text:p text:style-name="Body_20_Text">Team shape describes where players actually play.</text:p>
      <text:p text:style-name="Body_20_Text">As soon as the match begins, players move.</text:p>
      <text:p text:style-name="Body_20_Text">Full-backs overlap.</text:p>
      <text:p text:style-name="Body_20_Text">Midfielders drop deeper.</text:p>
      <text:p text:style-name="Body_20_Text">Forwards drift wide.</text:p>
      <text:p text:style-name="Body_20_Text">Defenders step into midfield.</text:p>
      <text:p text:style-name="Body_20_Text">The formation disappears almost immediately.</text:p>
      <text:p text:style-name="Body_20_Text">What remains is the team's shape.</text:p>
      <text:p text:style-name="Body_20_Text">Shape Is Created by Roles</text:p>
      <text:p text:style-name="Body_20_Text">Roles have a greater influence on team shape than formations.</text:p>
      <text:p text:style-name="Body_20_Text">Two teams using a 4-3-3 can look completely different because the player roles are different.</text:p>
      <text:p text:style-name="Body_20_Text">A Wing-Back (Attack) creates a different shape to a Full-Back (Support).</text:p>
      <text:p text:style-name="Body_20_Text">A Deep-Lying Playmaker changes midfield positioning.</text:p>
      <text:p text:style-name="Body_20_Text">An Inside Forward attacks different spaces to a Winger.</text:p>
      <text:p text:style-name="Body_20_Text">The formation provides the framework.</text:p>
      <text:p text:style-name="Body_20_Text">The roles create the picture.</text:p>
      <text:p text:style-name="Tactical_20_Principle"><text:soft-page-break/>Formation is the starting point.</text:p>
      <text:p text:style-name="Tactical_20_Principle">Shape is the end result.</text:p>
      <text:h text:style-name="Section_20_Title" text:outline-level="3">Team Shape in Possession</text:h>
      <text:p text:style-name="Body_20_Text">When my team has the ball, I want to understand:</text:p>
      <text:list xml:id="list1939628172" text:style-name="L16">
        <text:list-item>
          <text:p text:style-name="P38">Where is the width?</text:p>
        </text:list-item>
        <text:list-item>
          <text:p text:style-name="P38">Where is the depth?</text:p>
        </text:list-item>
        <text:list-item>
          <text:p text:style-name="P38">Who supports the ball?</text:p>
        </text:list-item>
        <text:list-item>
          <text:p text:style-name="P38">Who attacks the penalty area?</text:p>
        </text:list-item>
        <text:list-item>
          <text:p text:style-name="P38">Who protects against the counter?</text:p>
        </text:list-item>
      </text:list>
      <text:p text:style-name="Body_20_Text">Every player should have a purpose.</text:p>
      <text:p text:style-name="Body_20_Text">If several players occupy the same space, another area will probably become empty.</text:p>
      <text:p text:style-name="Body_20_Text"><draw:frame draw:style-name="fr1" draw:name="Frame6" text:anchor-type="paragraph" svg:x="10.16cm" svg:y="0.325cm" svg:width="7.001cm" draw:z-index="5"><draw:text-box fo:min-height="0.55cm"><text:p text:style-name="MJ_20_Text">When watching highlights, pause the game before the pass.</text:p><text:p text:style-name="MJ_20_Text">Can I already predict where the passing options are?</text:p></draw:text-box></draw:frame>Good shape creates options.</text:p>
      <text:p text:style-name="Body_20_Text">Poor shape creates congestion.</text:p>
      <text:h text:style-name="Section_20_Title" text:outline-level="3">Team Shape Out of Possession</text:h>
      <text:p text:style-name="Body_20_Text">Without the ball, the priorities change.</text:p>
      <text:p text:style-name="Body_20_Text">The team should remain compact.</text:p>
      <text:p text:style-name="Body_20_Text">Distances between players become important.</text:p>
      <text:p text:style-name="Body_20_Text">Large gaps invite passes.</text:p>
      <text:p text:style-name="Body_20_Text">Compact teams reduce space between the defensive lines.</text:p>
      <text:p text:style-name="Body_20_Text">The aim is not necessarily to win the ball immediately.</text:p>
      <text:p text:style-name="Body_20_Text">The aim is to make the opposition run out of good options.</text:p>
      <text:h text:style-name="Section_20_Title" text:outline-level="3">Vertical Compactness</text:h>
      <text:p text:style-name="Body_20_Text">Think about the distance between:</text:p>
      <text:list xml:id="list2257422460" text:style-name="L17">
        <text:list-item>
          <text:p text:style-name="P39">the forwards</text:p>
        </text:list-item>
        <text:list-item>
          <text:p text:style-name="P39">the midfield</text:p>
        </text:list-item>
        <text:list-item>
          <text:p text:style-name="P39">the defence</text:p>
        </text:list-item>
      </text:list>
      <text:p text:style-name="Body_20_Text">If these lines drift too far apart, the opposition can play between them.</text:p>
      <text:p text:style-name="Body_20_Text">If they stay too close together, space behind the defence may become vulnerable.</text:p>
      <text:p text:style-name="Body_20_Text">The right balance depends on the tactical approach.</text:p>
      <text:h text:style-name="Section_20_Title" text:outline-level="3">Horizontal Compactness</text:h>
      <text:p text:style-name="Body_20_Text">The team must also remain connected across the width of the pitch.</text:p>
      <text:p text:style-name="Body_20_Text"><text:soft-page-break/>Too narrow and the opposition may switch play easily.</text:p>
      <text:p text:style-name="Body_20_Text">Too wide and central spaces become available.</text:p>
      <text:p text:style-name="Body_20_Text">The best teams shift together as the ball moves.</text:p>
      <text:p text:style-name="FM_20_Behaviour">Roles, mentality and Team Instructions all influence team shape.</text:p>
      <text:p text:style-name="FM_20_Behaviour">Changing a single role may alter the positioning of several nearby players.</text:p>
      <text:p text:style-name="FM_20_Behaviour">Always observe the whole team rather than individual players.</text:p>
      <text:h text:style-name="Section_20_Title" text:outline-level="3">Maintaining Balance</text:h>
      <text:p text:style-name="Body_20_Text">Every attacking movement creates a defensive question.</text:p>
      <text:p text:style-name="Body_20_Text">If my full-back attacks:</text:p>
      <text:p text:style-name="Body_20_Text">Who protects behind him?</text:p>
      <text:p text:style-name="Body_20_Text">If both midfielders attack:</text:p>
      <text:p text:style-name="Body_20_Text">Who screens the defence?</text:p>
      <text:p text:style-name="Body_20_Text">If several players attack the same area:</text:p>
      <text:p text:style-name="Body_20_Text">Who provides support?</text:p>
      <text:p text:style-name="Body_20_Text">Good tactics maintain balance.</text:p>
      <text:p text:style-name="Body_20_Text">Every risk should have a compensating strength elsewhere.</text:p>
      <text:p text:style-name="Warning">Adding more attacking duties does not necessarily make the team more dangerous.</text:p>
      <text:p text:style-name="Warning">It often reduces support, compactness and defensive stability.</text:p>
      <text:h text:style-name="Section_20_Title" text:outline-level="3">Reviewing Team Shape</text:h>
      <text:p text:style-name="Body_20_Text">The best way to assess shape is by watching the match.</text:p>
      <text:p text:style-name="Body_20_Text">Useful questions include:</text:p>
      <text:list xml:id="list3765296569" text:style-name="L18">
        <text:list-item>
          <text:p text:style-name="P40">Are players too close together?</text:p>
        </text:list-item>
        <text:list-item>
          <text:p text:style-name="P40">Are passing options available?</text:p>
        </text:list-item>
        <text:list-item>
          <text:p text:style-name="P40">Does someone always support the ball?</text:p>
        </text:list-item>
        <text:list-item>
          <text:p text:style-name="P40">Are there unnecessary gaps?</text:p>
        </text:list-item>
        <text:list-item>
          <text:p text:style-name="P40">Can we recover our shape after losing possession?</text:p>
        </text:list-item>
      </text:list>
      <text:p text:style-name="Body_20_Text">These observations often explain why a tactic succeeds or fails.</text:p>
      <text:p text:style-name="Analysis">Useful FM screens:</text:p>
      <text:p text:style-name="Analysis">- Average Positions</text:p>
      <text:p text:style-name="Analysis">- Pass Map</text:p>
      <text:p text:style-name="Analysis"><text:soft-page-break/>- Team Heatmap</text:p>
      <text:p text:style-name="Analysis">- Player Heatmaps</text:p>
      <text:p text:style-name="Analysis">- Match Replay</text:p>
      <text:p text:style-name="Body_20_Text">Average Positions should confirm the shape I expected.</text:p>
      <text:p text:style-name="Body_20_Text">If they do not, I need to understand why.</text:p>
      <text:h text:style-name="Section_20_Title" text:outline-level="3">Key Takeaways</text:h>
      <text:list xml:id="list2631449737" text:style-name="L19">
        <text:list-item>
          <text:p text:style-name="P41">Formation describes where players begin.</text:p>
        </text:list-item>
        <text:list-item>
          <text:p text:style-name="P41">Shape describes how the team actually plays.</text:p>
        </text:list-item>
        <text:list-item>
          <text:p text:style-name="P41">Roles create shape.</text:p>
        </text:list-item>
        <text:list-item>
          <text:p text:style-name="P41">Good shape creates space in possession.</text:p>
        </text:list-item>
        <text:list-item>
          <text:p text:style-name="P41">Good shape removes space out of possession.</text:p>
        </text:list-item>
        <text:list-item>
          <text:p text:style-name="P41">Balance is more important than simply adding attacking players.</text:p>
        </text:list-item>
      </text:list>
      <text:p text:style-name="Parking_20_Lot">I'd like to revisit this chapter later to include <text:span text:style-name="Strong_20_Emphasis">real match examples</text:span> from FM26.</text:p>
      <text:p text:style-name="Parking_20_Lot">For example, we could show:<text:line-break/>- A 4-3-3 on the tactics screen. <text:line-break/>- The corresponding <text:span text:style-name="Strong_20_Emphasis">Average Positions</text:span> after 60 minutes. <text:line-break/>- Annotate why the shape changed. </text:p>
      <text:p text:style-name="Parking_20_Lot">I think that would become one of the strongest teaching points in the entire handbook because it visually reinforces that <text:span text:style-name="Strong_20_Emphasis">formations are static, while team shapes are dynamic</text:span>. It also naturally leads into Chapter 6 on <text:span text:style-name="Strong_20_Emphasis">Mentality</text:span>, where we explain <text:span text:style-name="Emphasis">why</text:span> the same shape can behave very differently depending on the team's risk appetite.</text:p>
      <text:p text:style-name="P21"/>
      <text:h text:style-name="Chapter_20_Title" text:outline-level="2"><text:bookmark-start text:name="__RefHeading___Toc370_3226105849"/><text:span text:style-name="Strong_20_Emphasis">Mentality</text:span><text:bookmark-end text:name="__RefHeading___Toc370_3226105849"/></text:h>
      <text:h text:style-name="Section_20_Title" text:outline-level="3">What Does Mentality Really Mean?</text:h>
      <text:p text:style-name="Body_20_Text">Mentality does not decide whether my team attacks or defends.</text:p>
      <text:p text:style-name="Body_20_Text">Every team does both.</text:p>
      <text:p text:style-name="Body_20_Text">Instead, mentality influences the amount of risk players are willing to take when making decisions.</text:p>
      <text:p text:style-name="Body_20_Text">Higher mentalities encourage players to attempt more ambitious actions.</text:p>
      <text:p text:style-name="Body_20_Text">Lower mentalities encourage safer decisions.</text:p>
      <text:p text:style-name="Body_20_Text">Mentality changes the probability of success against the potential reward.</text:p>
      <text:h text:style-name="Section_20_Title" text:outline-level="3"><text:soft-page-break/>Risk and Reward</text:h>
      <text:p text:style-name="Body_20_Text">Every football decision carries risk.</text:p>
      <text:p text:style-name="Body_20_Text">Should the defender play the difficult forward pass?</text:p>
      <text:p text:style-name="Body_20_Text">Should the winger cross immediately?</text:p>
      <text:p text:style-name="Body_20_Text">Should the midfielder attempt a through ball?</text:p>
      <text:p text:style-name="Body_20_Text">Should the striker shoot from distance?</text:p>
      <text:p text:style-name="Body_20_Text">Mentality influences how often players attempt these actions.</text:p>
      <text:p text:style-name="Body_20_Text">Higher mentalities increase risk.</text:p>
      <text:p text:style-name="Body_20_Text">Lower mentalities favour patience.</text:p>
      <text:p text:style-name="Body_20_Text">Neither is automatically better.</text:p>
      <text:p text:style-name="Tactical_20_Principle">Mentality controls risk.</text:p>
      <text:p text:style-name="Tactical_20_Principle">It does not control effort.</text:p>
      <text:h text:style-name="Section_20_Title" text:outline-level="3">Mentality Affects the Whole Team</text:h>
      <text:p text:style-name="Body_20_Text">Changing mentality affects every player.</text:p>
      <text:p text:style-name="Body_20_Text">Defenders may hold a higher line.</text:p>
      <text:p text:style-name="Body_20_Text">Midfielders may support attacks more quickly.</text:p>
      <text:p text:style-name="Body_20_Text">Forwards may make earlier runs.</text:p>
      <text:p text:style-name="Body_20_Text">Passing may become more direct.</text:p>
      <text:p text:style-name="Body_20_Text">Shots may be taken earlier.</text:p>
      <text:p text:style-name="Body_20_Text">The change is gradual rather than absolute.</text:p>
      <text:p text:style-name="Body_20_Text">Every player still makes decisions based on their role, attributes and the situation.</text:p>
      <text:p text:style-name="FM_20_Behaviour">Mentality acts as a modifier.</text:p>
      <text:p text:style-name="FM_20_Behaviour">Roles, duties and player attributes still have the greatest influence on individual behaviour.</text:p>
      <text:h text:style-name="Section_20_Title" text:outline-level="3">Choosing the Right Mentality</text:h>
      <text:p text:style-name="Body_20_Text">Start with the style of football I want to play.</text:p>
      <text:p text:style-name="Body_20_Text">Then choose the mentality that supports it.</text:p>
      <text:p text:style-name="Body_20_Text">I should not select an Attacking mentality simply because I want to score more goals.</text:p>
      <text:p text:style-name="Body_20_Text">If my players lose possession too easily, a more positive mentality may make the problem worse.</text:p>
      <text:p text:style-name="Body_20_Text">Likewise, lowering mentality does not guarantee defensive stability.</text:p>
      <text:p text:style-name="Body_20_Text">The best mentality is the one that allows the tactic to function consistently.</text:p>
      <text:h text:style-name="Section_20_Title" text:outline-level="3"><text:soft-page-break/>When Should Mentality Change?</text:h>
      <text:p text:style-name="Body_20_Text"><draw:frame draw:style-name="fr1" draw:name="Frame7" text:anchor-type="paragraph" svg:x="8.936cm" svg:y="0.639cm" svg:width="8.437cm" draw:z-index="6"><draw:text-box fo:min-height="6.378cm"><text:p text:style-name="MJ_20_Text">If I change mentality, what behaviour am I expecting to change?</text:p><text:p text:style-name="MJ_20_Text">If I cannot answer that question, I probably shouldn't make the change.</text:p></draw:text-box></draw:frame>Mentality is one of the easiest tactical adjustments to make during a match.</text:p>
      <text:p text:style-name="Body_20_Text">Possible reasons include:</text:p>
      <text:list xml:id="list3458411591" text:style-name="L20">
        <text:list-item>
          <text:p text:style-name="P42">protecting a lead</text:p>
        </text:list-item>
        <text:list-item>
          <text:p text:style-name="P42">chasing a goal</text:p>
        </text:list-item>
        <text:list-item>
          <text:p text:style-name="P42">responding to a red card</text:p>
        </text:list-item>
        <text:list-item>
          <text:p text:style-name="P42">exploiting an opposition weakness</text:p>
        </text:list-item>
        <text:list-item>
          <text:p text:style-name="P42">reducing unnecessary risk</text:p>
        </text:list-item>
      </text:list>
      <text:p text:style-name="Body_20_Text">These changes should be purposeful.</text:p>
      <text:p text:style-name="Body_20_Text">Mentality is not a substitute for solving the real tactical problem.</text:p>
      <text:h text:style-name="Section_20_Title" text:outline-level="3">Mentality and Player Roles</text:h>
      <text:p text:style-name="Body_20_Text">Roles and mentality work together.</text:p>
      <text:p text:style-name="Body_20_Text">An attacking role on a Cautious mentality will still attack.</text:p>
      <text:p text:style-name="Body_20_Text">A defensive role on an Attacking mentality will still defend.</text:p>
      <text:p text:style-name="Body_20_Text">Mentality influences how they perform those duties, not whether they perform them.</text:p>
      <text:p text:style-name="Body_20_Text">This is why changing mentality rarely transforms a tactic on its own.</text:p>
      <text:p text:style-name="Body_20_Text">The underlying roles remain the same.</text:p>
      <text:h text:style-name="Section_20_Title" text:outline-level="3">Watching Mentality</text:h>
      <text:p text:style-name="Body_20_Text">Rather than looking at the result, observe the behaviour.</text:p>
      <text:p text:style-name="Body_20_Text">Ask:</text:p>
      <text:list xml:id="list350584330" text:style-name="L21">
        <text:list-item>
          <text:p text:style-name="P43">Are we forcing difficult passes?</text:p>
        </text:list-item>
        <text:list-item>
          <text:p text:style-name="P43">Are we giving the ball away too easily?</text:p>
        </text:list-item>
        <text:list-item>
          <text:p text:style-name="P43">Are players supporting attacks quickly enough?</text:p>
        </text:list-item>
        <text:list-item>
          <text:p text:style-name="P43">Are we committing too many players forward?</text:p>
        </text:list-item>
        <text:list-item>
          <text:p text:style-name="P43">Are we creating better chances or simply taking more shots?</text:p>
        </text:list-item>
      </text:list>
      <text:p text:style-name="Body_20_Text">These questions reveal whether the mentality suits the match.</text:p>
      <text:p text:style-name="Analysis">Useful FM screens:</text:p>
      <text:p text:style-name="Analysis">- Match Replay</text:p>
      <text:p text:style-name="Analysis">- Pass Completion</text:p>
      <text:p text:style-name="Analysis">- Shot Map</text:p>
      <text:p text:style-name="Analysis">- Average Positions</text:p>
      <text:p text:style-name="Analysis"><text:soft-page-break/>- Team Stats</text:p>
      <text:p text:style-name="Analysis">- Data Hub</text:p>
      <text:p text:style-name="Body_20_Text">Watch several highlights before deciding whether a mentality change has worked.</text:p>
      <text:p text:style-name="Warning">Changing mentality is often the first reaction to a poor performance.</text:p>
      <text:p text:style-name="Warning">It is rarely the first problem.</text:p>
      <text:p text:style-name="Warning">If the tactic lacks balance, changing mentality will not fix it.</text:p>
      <text:p text:style-name="Warning">Look for the underlying cause first.</text:p>
      <text:h text:style-name="Section_20_Title" text:outline-level="3">Key Takeaways</text:h>
      <text:list xml:id="list2815225823" text:style-name="L22">
        <text:list-item>
          <text:p text:style-name="P44">Mentality controls risk.</text:p>
        </text:list-item>
        <text:list-item>
          <text:p text:style-name="P44">It affects every player.</text:p>
        </text:list-item>
        <text:list-item>
          <text:p text:style-name="P44">Roles remain more important than mentality.</text:p>
        </text:list-item>
        <text:list-item>
          <text:p text:style-name="P44">Observe behaviour, not just results.</text:p>
        </text:list-item>
        <text:list-item>
          <text:p text:style-name="P44">Use mentality to support the tactic, not replace it.</text:p>
        </text:list-item>
      </text:list>
      <text:h text:style-name="Chapter_20_Title" text:outline-level="2"><text:bookmark-start text:name="__RefHeading___Toc382_3226105849"/><text:span text:style-name="Strong_20_Emphasis">Team Instructions</text:span><text:bookmark-end text:name="__RefHeading___Toc382_3226105849"/></text:h>
      <text:h text:style-name="Section_20_Title" text:outline-level="3">What Are Team Instructions?</text:h>
      <text:p text:style-name="Body_20_Text">Team Instructions describe how I want the team to behave.</text:p>
      <text:p text:style-name="Body_20_Text">They provide the overall tactical framework.</text:p>
      <text:p text:style-name="Body_20_Text">They do not replace player roles.</text:p>
      <text:p text:style-name="Body_20_Text">Instead, they influence how all players behave together.</text:p>
      <text:p text:style-name="Body_20_Text">Every instruction should support the tactical identity.</text:p>
      <text:p text:style-name="Body_20_Text">If I cannot explain why an instruction is enabled, it probably should not be.</text:p>
      <text:h text:style-name="Section_20_Title" text:outline-level="3">Start Simple</text:h>
      <text:p text:style-name="Body_20_Text">It is tempting to use lots of instructions.</text:p>
      <text:p text:style-name="Body_20_Text">Football Manager offers many options and it feels as though more instructions create a more detailed tactic.</text:p>
      <text:p text:style-name="Body_20_Text">Usually the opposite is true.</text:p>
      <text:p text:style-name="Body_20_Text">The best tactics often use surprisingly few Team Instructions.</text:p>
      <text:p text:style-name="Body_20_Text">Start with the minimum needed to express the tactical idea.</text:p>
      <text:p text:style-name="Body_20_Text">Only add instructions when they solve a specific problem.</text:p>
      <text:p text:style-name="Tactical_20_Principle"><text:soft-page-break/>Every instruction should solve a problem.</text:p>
      <text:p text:style-name="Tactical_20_Principle">It should never exist simply because it sounds sensible.</text:p>
      <text:h text:style-name="Section_20_Title" text:outline-level="3">Instructions Work Together</text:h>
      <text:p text:style-name="Body_20_Text">No instruction works in isolation.</text:p>
      <text:p text:style-name="Body_20_Text">Each one affects the behaviour of others.</text:p>
      <text:p text:style-name="Body_20_Text">For example:</text:p>
      <text:p text:style-name="Body_20_Text">A higher defensive line often works best with higher pressing.</text:p>
      <text:p text:style-name="Body_20_Text">Short passing usually benefits from players offering close support.</text:p>
      <text:p text:style-name="Body_20_Text">A lower tempo combined with very direct passing may produce conflicting behaviour.</text:p>
      <text:p text:style-name="Body_20_Text">Rather than thinking about individual instructions, think about how they combine to create a style of play.</text:p>
      <text:p text:style-name="FM_20_Behaviour">Football Manager evaluates instructions together.</text:p>
      <text:p text:style-name="FM_20_Behaviour">Changing one instruction may alter the effectiveness of several others.</text:p>
      <text:h text:style-name="Section_20_Title" text:outline-level="3">The Four Phases</text:h>
      <text:p text:style-name="Body_20_Text">Football Manager groups Team Instructions into four areas.</text:p>
      <text:p text:style-name="Body_20_Text">Each answers a different tactical question.</text:p>
      <text:h text:style-name="Subsection_20_Title" text:outline-level="4">In Possession</text:h>
      <text:p text:style-name="Body_20_Text">How do I want to attack?</text:p>
      <text:p text:style-name="Body_20_Text">Examples include:</text:p>
      <text:list xml:id="list2893576759" text:style-name="L23">
        <text:list-item>
          <text:p text:style-name="P45">passing style </text:p>
        </text:list-item>
        <text:list-item>
          <text:p text:style-name="P45">tempo </text:p>
        </text:list-item>
        <text:list-item>
          <text:p text:style-name="P45">width </text:p>
        </text:list-item>
        <text:list-item>
          <text:p text:style-name="P45">crossing </text:p>
        </text:list-item>
        <text:list-item>
          <text:p text:style-name="P45">creative freedom </text:p>
        </text:list-item>
      </text:list>
      <text:h text:style-name="Subsection_20_Title" text:outline-level="4">In Transition</text:h>
      <text:p text:style-name="Body_20_Text">What happens when possession changes?</text:p>
      <text:p text:style-name="Body_20_Text">Examples include:</text:p>
      <text:list xml:id="list1813773929" text:style-name="L24">
        <text:list-item>
          <text:p text:style-name="P46">Counter </text:p>
        </text:list-item>
        <text:list-item>
          <text:p text:style-name="P46">Hold Shape </text:p>
        </text:list-item>
        <text:list-item>
          <text:p text:style-name="P46">Counter-Press </text:p>
        </text:list-item>
        <text:list-item>
          <text:p text:style-name="P46">Regroup </text:p>
        </text:list-item>
        <text:list-item>
          <text:p text:style-name="P46"><text:soft-page-break/>Goalkeeper distribution </text:p>
        </text:list-item>
      </text:list>
      <text:h text:style-name="Subsection_20_Title" text:outline-level="4">Out of Possession</text:h>
      <text:p text:style-name="Body_20_Text">How do I defend?</text:p>
      <text:p text:style-name="Body_20_Text">Examples include:</text:p>
      <text:list xml:id="list3169540531" text:style-name="L25">
        <text:list-item>
          <text:p text:style-name="P47">defensive line </text:p>
        </text:list-item>
        <text:list-item>
          <text:p text:style-name="P47">line of engagement </text:p>
        </text:list-item>
        <text:list-item>
          <text:p text:style-name="P47">pressing intensity </text:p>
        </text:list-item>
        <text:list-item>
          <text:p text:style-name="P47">pressing traps </text:p>
        </text:list-item>
        <text:list-item>
          <text:p text:style-name="P47">defensive width </text:p>
        </text:list-item>
      </text:list>
      <text:h text:style-name="Subsection_20_Title" text:outline-level="4">Set Pieces</text:h>
      <text:p text:style-name="Body_20_Text">How do I organise dead-ball situations?</text:p>
      <text:p text:style-name="Body_20_Text">Although separate from open play, set pieces should support the overall tactical identity.</text:p>
      <text:h text:style-name="Section_20_Title" text:outline-level="3">Building Instructions</text:h>
      <text:p text:style-name="Body_20_Text"><draw:frame draw:style-name="fr1" draw:name="Frame8" text:anchor-type="paragraph" svg:x="9.364cm" svg:y="0.198cm" svg:width="8.781cm" draw:z-index="7"><draw:text-box fo:min-height="5.11cm"><text:p text:style-name="MJ_20_Text">When I add an instruction, I should finish this sentence:</text:p><text:p text:style-name="MJ_20_Text"><text:span text:style-name="Emphasis">I have enabled this because…</text:span></text:p><text:p text:style-name="MJ_20_Text">If I cannot complete it clearly, I should leave the instruction off.</text:p><text:p text:style-name="MJ_20_Text"/></draw:text-box></draw:frame>A useful approach is:</text:p>
      <text:list xml:id="list1118253963" text:style-name="L26">
        <text:list-item>
          <text:p text:style-name="P48">Define the tactical identity. </text:p>
        </text:list-item>
        <text:list-item>
          <text:p text:style-name="P48">Choose player roles. </text:p>
        </text:list-item>
        <text:list-item>
          <text:p text:style-name="P48">Add only the Team Instructions needed to support those roles. </text:p>
        </text:list-item>
        <text:list-item>
          <text:p text:style-name="P48">Watch the match. </text:p>
        </text:list-item>
        <text:list-item>
          <text:p text:style-name="P48">Adjust only when evidence suggests a problem. </text:p>
        </text:list-item>
      </text:list>
      <text:p text:style-name="Body_20_Text">This keeps the tactic focused.</text:p>
      <text:p text:style-name="Horizontal_20_Line"/>
      <text:p text:style-name="Heading_20_2">Solving Problems</text:p>
      <text:p text:style-name="Text_20_body">Do not start by changing instructions.</text:p>
      <text:p text:style-name="Text_20_body">Start by identifying the problem.</text:p>
      <text:p text:style-name="Text_20_body">Examples:</text:p>
      <text:p text:style-name="Text_20_body">"Our striker receives no support."</text:p>
      <text:p text:style-name="Text_20_body">"Our press is easily bypassed."</text:p>
      <text:p text:style-name="Text_20_body">"We lose possession too quickly."</text:p>
      <text:p text:style-name="Text_20_body">Only then should I consider which instruction might help.</text:p>
      <text:p text:style-name="Text_20_body"><text:soft-page-break/>Changing instructions without identifying the problem usually creates new problems.</text:p>
      <text:p text:style-name="Horizontal_20_Line"/>
      <text:p text:style-name="Heading_20_2">Reviewing Team Instructions</text:p>
      <text:p text:style-name="Text_20_body">During matches ask:</text:p>
      <text:list xml:id="list1685449638" text:style-name="L27">
        <text:list-item>
          <text:p text:style-name="P61">Is this instruction producing the behaviour I expected? </text:p>
        </text:list-item>
        <text:list-item>
          <text:p text:style-name="P61">Is it creating new problems? </text:p>
        </text:list-item>
        <text:list-item>
          <text:p text:style-name="P61">Do my players have the attributes to perform it? </text:p>
        </text:list-item>
        <text:list-item>
          <text:p text:style-name="P60">Does it still fit my tactical identity? </text:p>
        </text:list-item>
      </text:list>
      <text:p text:style-name="Text_20_body">These questions are more useful than simply looking at the score.</text:p>
      <text:p text:style-name="Horizontal_20_Line"/>
      <text:p text:style-name="Heading_20_2">Evidence</text:p>
      <text:p text:style-name="Text_20_body">Useful FM screens:</text:p>
      <text:list xml:id="list4112495506" text:style-name="L28">
        <text:list-item>
          <text:p text:style-name="P63">Match Replay </text:p>
        </text:list-item>
        <text:list-item>
          <text:p text:style-name="P63">Pass Map </text:p>
        </text:list-item>
        <text:list-item>
          <text:p text:style-name="P63">Average Positions </text:p>
        </text:list-item>
        <text:list-item>
          <text:p text:style-name="P63">Data Hub </text:p>
        </text:list-item>
        <text:list-item>
          <text:p text:style-name="P63">Team Statistics </text:p>
        </text:list-item>
        <text:list-item>
          <text:p text:style-name="P63">Expected Goals </text:p>
        </text:list-item>
        <text:list-item>
          <text:p text:style-name="P62">Possession Won/Lost </text:p>
        </text:list-item>
      </text:list>
      <text:p text:style-name="Text_20_body">Watch behaviour first.</text:p>
      <text:p text:style-name="Text_20_body">Statistics should confirm what I have already observed.</text:p>
      <text:p text:style-name="Warning">Warning</text:p>
      <text:p text:style-name="Warning">More instructions do not make a better tactic.</text:p>
      <text:p text:style-name="Warning">They often make behaviour harder to predict.</text:p>
      <text:p text:style-name="Warning">If the tactic stops making sense, simplify it.</text:p>
      <text:h text:style-name="Section_20_Title" text:outline-level="3">Key Takeaways</text:h>
      <text:list xml:id="list3886716297" text:style-name="L29">
        <text:list-item>
          <text:p text:style-name="P49">Team Instructions define collective behaviour. </text:p>
        </text:list-item>
        <text:list-item>
          <text:p text:style-name="P49">Start with as few as possible. </text:p>
        </text:list-item>
        <text:list-item>
          <text:p text:style-name="P49">Every instruction should support the tactical identity. </text:p>
        </text:list-item>
        <text:list-item>
          <text:p text:style-name="P49"><text:soft-page-break/>Solve problems, don't collect instructions. </text:p>
        </text:list-item>
        <text:list-item>
          <text:p text:style-name="P49">Observe behaviour before making changes.</text:p>
        </text:list-item>
      </text:list>
      <text:p text:style-name="FM_20_Behaviour"><text:span text:style-name="Strong_20_Emphasis">The default tactic is often better than an over-engineered one.</text:span></text:p>
      <text:p text:style-name="FM_20_Behaviour">Many successful Football Manager tactics use relatively few Team Instructions. Each additional instruction influences player decision-making and may interact with several others. Before adding an instruction, ask what behaviour you expect it to change and how you will recognise whether it has worked.</text:p>
      <text:h text:style-name="P55" text:outline-level="1"><text:bookmark-start text:name="__RefHeading___Toc960_3226105849"/>Part <text:span text:style-name="T3">III - </text:span>The Players<text:bookmark-end text:name="__RefHeading___Toc960_3226105849"/></text:h>
      <text:h text:style-name="Chapter_20_Title" text:outline-level="2"><text:bookmark-start text:name="__RefHeading___Toc390_3226105849"/><text:span text:style-name="Strong_20_Emphasis">Player Roles &amp; Duties</text:span><text:bookmark-end text:name="__RefHeading___Toc390_3226105849"/></text:h>
      <text:h text:style-name="Section_20_Title" text:outline-level="3"><text:bookmark-start text:name="__RefHeading___Toc392_3226105849"/>Roles <text:span text:style-name="T4">E</text:span>xplained <text:bookmark-end text:name="__RefHeading___Toc392_3226105849"/></text:h>
      <text:h text:style-name="Section_20_Title" text:outline-level="3"><text:bookmark-start text:name="__RefHeading___Toc394_3226105849"/>Duties <text:bookmark-end text:name="__RefHeading___Toc394_3226105849"/></text:h>
      <text:h text:style-name="Section_20_Title" text:outline-level="3"><text:bookmark-start text:name="__RefHeading___Toc396_3226105849"/>Partnerships <text:bookmark-end text:name="__RefHeading___Toc396_3226105849"/></text:h>
      <text:h text:style-name="Section_20_Title" text:outline-level="3"><text:bookmark-start text:name="__RefHeading___Toc398_3226105849"/>Complementary <text:span text:style-name="T4">R</text:span>oles <text:bookmark-end text:name="__RefHeading___Toc398_3226105849"/></text:h>
      <text:h text:style-name="Chapter_20_Title" text:outline-level="2"><text:bookmark-start text:name="__RefHeading___Toc400_3226105849"/><text:span text:style-name="Strong_20_Emphasis">Player Instructions</text:span><text:bookmark-end text:name="__RefHeading___Toc400_3226105849"/></text:h>
      <text:h text:style-name="Section_20_Title" text:outline-level="3"><text:bookmark-start text:name="__RefHeading___Toc402_3226105849"/>When to <text:span text:style-name="T4">O</text:span>verride a <text:span text:style-name="T4">R</text:span>ole <text:bookmark-end text:name="__RefHeading___Toc402_3226105849"/></text:h>
      <text:h text:style-name="Section_20_Title" text:outline-level="3"><text:bookmark-start text:name="__RefHeading___Toc404_3226105849"/>Simplicity <text:bookmark-end text:name="__RefHeading___Toc404_3226105849"/></text:h>
      <text:h text:style-name="Section_20_Title" text:outline-level="3"><text:bookmark-start text:name="__RefHeading___Toc406_3226105849"/>Common <text:span text:style-name="T4">M</text:span>istakes <text:bookmark-end text:name="__RefHeading___Toc406_3226105849"/></text:h>
      <text:h text:style-name="P56" text:outline-level="1"><text:bookmark-start text:name="__RefHeading___Toc962_3226105849"/>Part <text:span text:style-name="T3">IV - </text:span>Match Management<text:bookmark-end text:name="__RefHeading___Toc962_3226105849"/></text:h>
      <text:h text:style-name="Chapter_20_Title" text:outline-level="2"><text:bookmark-start text:name="__RefHeading___Toc408_3226105849"/><text:span text:style-name="Strong_20_Emphasis">Opposition Analysis</text:span><text:bookmark-end text:name="__RefHeading___Toc408_3226105849"/></text:h>
      <text:h text:style-name="Section_20_Title" text:outline-level="3"><text:bookmark-start text:name="__RefHeading___Toc410_3226105849"/>Scouting <text:bookmark-end text:name="__RefHeading___Toc410_3226105849"/></text:h>
      <text:h text:style-name="Section_20_Title" text:outline-level="3"><text:bookmark-start text:name="__RefHeading___Toc412_3226105849"/>Opposition reports <text:bookmark-end text:name="__RefHeading___Toc412_3226105849"/></text:h>
      <text:h text:style-name="Section_20_Title" text:outline-level="3"><text:bookmark-start text:name="__RefHeading___Toc414_3226105849"/>Identifying weaknesses <text:bookmark-end text:name="__RefHeading___Toc414_3226105849"/></text:h>
      <text:h text:style-name="Chapter_20_Title" text:outline-level="2"><text:bookmark-start text:name="__RefHeading___Toc416_3226105849"/><text:span text:style-name="Strong_20_Emphasis">Match Day</text:span><text:bookmark-end text:name="__RefHeading___Toc416_3226105849"/></text:h>
      <text:h text:style-name="Section_20_Title" text:outline-level="3"><text:bookmark-start text:name="__RefHeading___Toc418_3226105849"/>Reading the match <text:bookmark-end text:name="__RefHeading___Toc418_3226105849"/></text:h>
      <text:h text:style-name="Section_20_Title" text:outline-level="3"><text:bookmark-start text:name="__RefHeading___Toc420_3226105849"/>Tactical tweaks <text:bookmark-end text:name="__RefHeading___Toc420_3226105849"/></text:h>
      <text:h text:style-name="Section_20_Title" text:outline-level="3"><text:bookmark-start text:name="__RefHeading___Toc422_3226105849"/>Shouts <text:bookmark-end text:name="__RefHeading___Toc422_3226105849"/></text:h>
      <text:h text:style-name="Section_20_Title" text:outline-level="3"><text:bookmark-start text:name="__RefHeading___Toc424_3226105849"/>Substitutions <text:bookmark-end text:name="__RefHeading___Toc424_3226105849"/></text:h>
      <text:h text:style-name="Chapter_20_Title" text:outline-level="2"><text:bookmark-start text:name="__RefHeading___Toc426_3226105849"/><text:span text:style-name="Strong_20_Emphasis">Performance Analysis</text:span><text:bookmark-end text:name="__RefHeading___Toc426_3226105849"/></text:h>
      <text:h text:style-name="Section_20_Title" text:outline-level="3"><text:bookmark-start text:name="__RefHeading___Toc428_3226105849"/>xG <text:bookmark-end text:name="__RefHeading___Toc428_3226105849"/></text:h>
      <text:h text:style-name="Section_20_Title" text:outline-level="3"><text:bookmark-start text:name="__RefHeading___Toc430_3226105849"/>Data Hub <text:bookmark-end text:name="__RefHeading___Toc430_3226105849"/></text:h>
      <text:h text:style-name="Section_20_Title" text:outline-level="3"><text:bookmark-start text:name="__RefHeading___Toc432_3226105849"/>Momentum <text:bookmark-end text:name="__RefHeading___Toc432_3226105849"/></text:h>
      <text:h text:style-name="Section_20_Title" text:outline-level="3"><text:bookmark-start text:name="__RefHeading___Toc434_3226105849"/>Player ratings <text:bookmark-end text:name="__RefHeading___Toc434_3226105849"/></text:h>
      <text:h text:style-name="Section_20_Title" text:outline-level="3"><text:bookmark-start text:name="__RefHeading___Toc436_3226105849"/>Learning from matches<text:bookmark-end text:name="__RefHeading___Toc436_3226105849"/></text:h>
      <text:p text:style-name="Body_20_Text"/>
      <text:h text:style-name="P51" text:outline-level="2"><text:soft-page-break/></text:h>
      <text:h text:style-name="P52" text:outline-level="2"><text:bookmark-start text:name="__RefHeading___Toc274_874366845"/>Appendix – Revision History<text:bookmark-end text:name="__RefHeading___Toc274_874366845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/>
    <style:style style:name="Book_20_Title" style:display-name="Book Title" style:family="paragraph" style:master-page-name="cover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hapter_20_Title" style:display-name="Chapter Title" style:family="paragraph" style:next-style-name="Body_20_Text" style:auto-update="true" style:default-outline-level="2" style:master-page-name="">
      <style:paragraph-properties fo:margin-left="0cm" fo:margin-right="0cm" fo:margin-top="0.3cm" fo:margin-bottom="0.6cm" style:contextual-spacing="tru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family="Tahoma" fo:font-size="16pt" fo:font-weight="bold"/>
    </style:style>
    <style:style style:name="Section_20_Title" style:display-name="Section Title" style:family="paragraph" style:parent-style-name="Chapter_20_Title" style:next-style-name="Body_20_Text" style:auto-update="true" style:default-outline-level="3" style:master-page-name="">
      <style:paragraph-properties fo:margin-left="0cm" fo:margin-right="0cm" fo:margin-top="0.3cm" fo:margin-bottom="0.3cm" style:contextual-spacing="false" fo:text-indent="0cm" style:auto-text-indent="false" style:page-number="auto" fo:break-before="auto" fo:break-after="auto"/>
      <style:text-properties fo:color="#7a1f1f" loext:opacity="100%" style:font-name="Tahoma" fo:font-family="Tahoma" fo:font-size="14pt" fo:font-weight="normal" style:font-weight-asian="normal" style:font-weight-complex="normal"/>
    </style:style>
    <style:style style:name="Subsection_20_Title" style:display-name="Subsection Title" style:family="paragraph" style:parent-style-name="Section_20_Title" style:next-style-name="Body_20_Text" style:auto-update="true" style:default-outline-level="4">
      <style:paragraph-properties fo:margin-left="0cm" fo:margin-right="0cm" fo:margin-top="0.199cm" fo:margin-bottom="0.199cm" style:contextual-spacing="false" fo:text-indent="0cm" style:auto-text-indent="false"/>
      <style:text-properties fo:color="#7a1f1f" loext:opacity="100%" style:font-name="Tahoma" fo:font-family="Tahoma" fo:font-size="12pt" fo:font-weight="normal" style:font-size-asian="16pt" style:font-weight-asian="normal" style:font-size-complex="16pt" style:font-weight-complex="normal"/>
    </style:style>
    <style:style style:name="Minor_20_Heading" style:display-name="Minor Heading" style:family="paragraph" style:parent-style-name="Subsection_20_Title" style:auto-update="true" style:default-outline-level="5">
      <style:paragraph-properties fo:margin-top="0cm" fo:margin-bottom="0.3cm" style:contextual-spacing="false"/>
      <style:text-properties fo:color="#7a1f1f" loext:opacity="100%" style:font-name="Tahoma" fo:font-family="Tahoma" fo:font-size="11pt" style:font-size-asian="16pt" style:font-size-complex="16pt"/>
    </style:style>
    <style:style style:name="Body_20_Text" style:display-name="Body Text" style:family="paragraph">
      <style:paragraph-properties fo:margin-left="0cm" fo:margin-right="0cm" fo:margin-top="0.101cm" fo:margin-bottom="0.101cm" style:contextual-spacing="false" fo:text-indent="0cm" style:auto-text-indent="false"/>
      <style:text-properties style:font-name="Calibri" fo:font-family="Calibri" fo:font-size="11pt"/>
    </style:style>
    <style:style style:name="Quote" style:family="paragraph" style:parent-style-name="Body_20_Text">
      <style:paragraph-properties fo:text-align="center" style:justify-single-word="false"/>
      <style:text-properties fo:color="#555555" loext:opacity="100%" style:font-name="Calibri" fo:font-family="Calibri" fo:font-size="11pt" fo:font-style="italic"/>
    </style:style>
    <style:style style:name="FM_20_Behaviour" style:display-name="FM Behaviour" style:family="paragraph" style:parent-style-name="Panel_20_Heading" style:master-page-name="">
      <loext:graphic-properties draw:fill="solid" draw:fill-color="#b4c7dc"/>
      <style:paragraph-properties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Tactical_20_Principle" style:display-name="Tactical Principle" style:family="paragraph" style:parent-style-name="Panel_20_Heading" style:master-page-name="">
      <loext:graphic-properties draw:fill="solid" draw:fill-color="#81aca6"/>
      <style:paragraph-properties fo:keep-together="auto" style:page-number="auto" fo:background-color="#81aca6" fo:padding-left="0.3cm" fo:padding-right="0.3cm" fo:padding-top="0.199cm" fo:padding-bottom="0.15cm" fo:border="1.5pt solid #168253" fo:keep-with-next="always"/>
      <style:text-properties fo:color="#ffffff" loext:opacity="100%" style:font-name="Calibri" fo:font-family="Calibri" fo:font-size="11pt" fo:font-weight="normal"/>
    </style:style>
    <style:style style:name="Managers_20_Journal" style:display-name="Managers Journal" style:family="paragraph" style:parent-style-name="Panel_20_Heading">
      <loext:graphic-properties draw:fill="solid" draw:fill-color="#ffde59"/>
      <style:paragraph-properties fo:margin-left="0.3cm" fo:margin-right="0.3cm" fo:margin-top="0cm" fo:margin-bottom="0cm" style:contextual-spacing="false" fo:text-indent="0cm" style:auto-text-indent="false" fo:background-color="#ffde59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Match_20_Tip" style:display-name="Match 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Body_20_Text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Body_20_Text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1" fo:font-family="Tahoma" style:font-style-name="Regular" style:font-family-generic="swiss" fo:font-size="14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Contents_20_1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2pt"/>
    </style:style>
    <style:style style:name="Contents_20_3" style:display-name="Contents 3" style:family="paragraph" style:parent-style-name="Contents_20_2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Contents_20_3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cm" fo:margin-right="0.4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1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Part_20_Title" style:display-name="Part Title" style:family="paragraph" style:parent-style-name="Book_20_Title" style:default-outline-level="1" style:master-page-name="frontMatter">
      <style:paragraph-properties fo:margin-top="2cm" fo:margin-bottom="1cm" style:contextual-spacing="false" style:page-number="auto" fo:break-before="auto" fo:break-after="auto" text:number-lines="false" text:line-number="0"/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art_20_Subtitle" style:display-name="Part Subtitle" style:family="paragraph" style:parent-style-name="Part_20_Title" style:default-outline-level="" style:list-style-name="" style:master-page-name="">
      <style:paragraph-properties fo:margin-top="0cm" fo:margin-bottom="1cm" style:contextual-spacing="false" style:page-number="auto" fo:break-before="auto" fo:break-after="auto"/>
      <style:text-properties fo:color="#999999" loext:opacity="100%" fo:font-size="18pt" fo:font-weight="normal"/>
    </style:style>
    <style:style style:name="Contents_20_5" style:display-name="Contents 5" style:family="paragraph" style:parent-style-name="Contents_20_4" style:class="index">
      <style:paragraph-properties fo:margin-left="2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MJ_20_Title" style:display-name="MJ Title" style:family="paragraph" style:parent-style-name="Managers_20_Journal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true"/>
      <style:text-properties fo:font-weight="bold"/>
    </style:style>
    <style:style style:name="MJ_20_Text" style:display-name="MJ Text" style:family="paragraph" style:parent-style-name="MJ_20_Title" style:auto-update="true" style:master-page-name="">
      <loext:graphic-properties draw:fill="none" draw:fill-color="#729fcf"/>
      <style:paragraph-properties fo:margin-top="0cm" fo:margin-bottom="0cm" style:contextual-spacing="true" fo:line-height="100%" style:register-true="false" style:page-number="auto" fo:background-color="transparent">
        <style:tab-stops/>
      </style:paragraph-properties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ost_20_It" style:display-name="Post It" style:family="graphic" style:parent-style-name="Frame">
      <style:graphic-properties svg:width="7.001cm" fo:min-height="0.55cm" text:anchor-type="paragraph" svg:x="0cm" fo:margin-top="0.101cm" fo:margin-bottom="0.101cm" style:wrap="dynamic" style:number-wrapped-paragraphs="no-limit" style:wrap-contour="false" style:horizontal-pos="outside" style:horizontal-rel="page-end-margin" fo:background-color="#ffe994" style:background-transparency="0%" draw:fill="solid" draw:fill-color="#ffe994" draw:opacity="100%" fo:padding="0.199cm" fo:border="none" style:shadow="#80808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667cm" style:rel-column-width="21844*"/>
    </style:style>
    <style:style style:name="Table4.B" style:family="table-column">
      <style:table-column-properties style:column-width="5.667cm" style:rel-column-width="21846*"/>
    </style:style>
    <style:style style:name="Table4.C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none"/>
    </style:style>
    <style:style style:name="MP1" style:family="paragraph" style:parent-style-name="Body_20_Text">
      <style:paragraph-properties fo:text-align="center" style:justify-single-word="false"/>
    </style:style>
    <style:style style:name="MP2" style:family="paragraph" style:parent-style-name="Body_20_Text">
      <style:paragraph-properties fo:text-align="end" style:justify-single-word="false"/>
    </style:style>
    <style:style style:name="MP3" style:family="paragraph" style:parent-style-name="Body_20_Text">
      <style:text-properties officeooo:rsid="0006db54" officeooo:paragraph-rsid="0006db54"/>
    </style:style>
    <style:style style:name="MT1" style:family="text">
      <style:text-properties officeooo:rsid="0011e173"/>
    </style:style>
    <style:style style:name="MT2" style:family="text">
      <style:text-properties officeooo:rsid="00148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1" draw:style-name="Mdp1" style:next-style-name="Standard"/>
    <style:master-page style:name="cover" style:page-layout-name="Mpm1" draw:style-name="Mdp1" style:next-style-name="frontMatter"/>
    <style:master-page style:name="Left_20_Page" loext:hidden="true" style:hidden="true" style:display-name="Left Page" style:page-layout-name="Mpm2" draw:style-name="Mdp1" style:next-style-name="Right_20_Page"/>
    <style:master-page style:name="Right_20_Page" loext:hidden="true" style:hidden="true" style:display-name="Right Page" style:page-layout-name="Mpm3" draw:style-name="Mdp1" style:next-style-name="Left_20_Page"/>
    <style:master-page style:name="Envelope" loext:hidden="true" style:hidden="true" style:page-layout-name="Mpm4" draw:style-name="Mdp1"/>
    <style:master-page style:name="Index" loext:hidden="true" style:hidden="true" style:page-layout-name="Mpm1" draw:style-name="Mdp1"/>
    <style:master-page style:name="HTML" loext:hidden="true" style:hidden="true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footer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5.A1" office:value-type="string">
              <text:p text:style-name="MP1">Draft</text:p>
            </table:table-cell>
            <table:table-cell table:style-name="Table5.A1" office:value-type="string">
              <text:p text:style-name="MP2"><text:page-number text:select-page="current">iii</text:page-number></text:p>
            </table:table-cell>
          </table:table-row>
        </table:table>
        <text:p text:style-name="Footer"/>
      </style:footer>
    </style:master-page>
    <style:master-page style:name="chapter" style:page-layout-name="Mpm9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<text:title>The Manager's Handbook</text:title></text:p>
            </table:table-cell>
            <table:table-cell table:style-name="Table1.A1" office:value-type="string">
              <text:p text:style-name="MP2"><text:subject>Philosophy and Tactical Blueprint</text:subject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2.A1" office:value-type="string">
              <text:p text:style-name="MP1">Draft</text:p>
            </table:table-cell>
            <table:table-cell table:style-name="Table2.A1" office:value-type="string">
              <text:p text:style-name="MP2"><text:page-number text:select-page="current">23</text:page-number><text:s/><text:span text:style-name="MT1">of </text:span><text:span text:style-name="MT1"><text:page-count>33</text:page-count></text:span></text:p>
            </table:table-cell>
          </table:table-row>
        </table:table>
        <text:p text:style-name="Footer"/>
      </style:footer>
    </style:master-page>
    <style:master-page style:name="appendix" style:page-layout-name="Mpm9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Body_20_Text"><text:title>The Manager's Handbook</text:title></text:p>
            </table:table-cell>
            <table:table-cell table:style-name="Table3.A1" office:value-type="string">
              <text:p text:style-name="MP2"><text:subject>Philosophy and Tactical Blueprint</text:subject></text:p>
            </table:table-cell>
          </table:table-row>
        </table:table>
        <text:p text:style-name="Foot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4.A1" office:value-type="string">
              <text:p text:style-name="MP1">Draft</text:p>
            </table:table-cell>
            <table:table-cell table:style-name="Table4.A1" office:value-type="string">
              <text:p text:style-name="MP1"><text:span text:style-name="MT2"><text:page-number text:select-page="current">33</text:page-number></text:span><text:span text:style-name="MT2"><text:s/>of </text:span><text:span text:style-name="MT2"><text:page-count>3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5H17M9S</meta:editing-duration>
    <meta:editing-cycles>25</meta:editing-cycles>
    <meta:keyword>Football Manager</meta:keyword>
    <meta:keyword>Tactice</meta:keyword>
    <meta:keyword>Coaching</meta:keyword>
    <meta:keyword>Recruitment</meta:keyword>
    <dc:subject>Philosophy and Tactical Blueprint</dc:subject>
    <dc:title>The Manager's Handbook</dc:title>
    <meta:creation-date>2026-06-29T09:51:10.719993666</meta:creation-date>
    <dc:date>2026-07-02T23:07:59.904235381</dc:date>
    <meta:document-statistic meta:table-count="5" meta:image-count="0" meta:object-count="0" meta:page-count="33" meta:paragraph-count="822" meta:word-count="5506" meta:character-count="33368" meta:non-whitespace-character-count="28722"/>
    <meta:user-defined meta:name="Author">Andy Wilson</meta:user-defined>
    <meta:user-defined meta:name="Comments">My living tactical handbook</meta:user-defined>
    <meta:user-defined meta:name="FMVersion">Football Manager 2026 Edition</meta:user-defined>
    <meta:user-defined meta:name="Status">Draft</meta:user-defined>
    <meta:user-defined meta:name="Template Version" meta:value-type="string">0.5.0</meta:user-defined>
    <meta:user-defined meta:name="Version" meta:value-type="string">0.1.0</meta:user-defined>
    <meta:user-defined meta:name="Volume" meta:value-type="string">1</meta:user-defined>
    <meta:template xlink:type="simple" xlink:actuate="onRequest" xlink:title="myManagerHandbook-StyleTemplate" xlink:href="../../../../../.config/libreoffice/4/user/template/myManagerHandbook-StyleTemplate.ott" meta:date="2026-06-29T09:51:10.288544054"/>
  </office:meta>
</office:document-meta>
</file>