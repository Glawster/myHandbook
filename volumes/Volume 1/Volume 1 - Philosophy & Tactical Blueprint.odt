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chitects Daughter" svg:font-family="'Architects Daughter'" style:font-pitch="variable"/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Caveat" svg:font-family="Cavea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loria Hallelujah" svg:font-family="'Gloria Hallelujah'" style:font-pitch="variable"/>
    <style:font-face style:name="Handlee" svg:font-family="Handle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atrick Hand" svg:font-family="'Patrick Hand'" style:font-adornments="Bold Italic" style:font-pitch="variable"/>
    <style:font-face style:name="Tahoma" svg:font-family="Tahoma"/>
    <style:font-face style:name="Tahoma1" svg:font-family="Tahoma" style:font-adornments="Regular" style:font-family-generic="swiss"/>
  </office:font-face-decls>
  <office:automatic-styles>
    <style:style style:name="P1" style:family="paragraph" style:parent-style-name="Body_20_Text">
      <style:paragraph-properties fo:text-align="center" style:justify-single-word="false"/>
    </style:style>
    <style:style style:name="P2" style:family="paragraph" style:parent-style-name="Body_20_Text">
      <style:paragraph-properties fo:text-align="end" style:justify-single-word="false"/>
    </style:style>
    <style:style style:name="P3" style:family="paragraph" style:parent-style-name="Body_20_Text">
      <style:text-properties officeooo:rsid="0006db54" officeooo:paragraph-rsid="0006db54"/>
    </style:style>
    <style:style style:name="P4" style:family="paragraph" style:parent-style-name="BookSubtitle">
      <style:text-properties officeooo:paragraph-rsid="000ab937"/>
    </style:style>
    <style:style style:name="P5" style:family="paragraph" style:parent-style-name="BookTitle">
      <style:text-properties officeooo:rsid="0008d43a" officeooo:paragraph-rsid="0008d43a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6.101cm" style:type="right" style:leader-style="dotted" style:leader-text="."/>
        </style:tab-stops>
      </style:paragraph-properties>
    </style:style>
    <style:style style:name="P10" style:family="paragraph" style:parent-style-name="FM_20_Behaviour">
      <style:text-properties officeooo:paragraph-rsid="001f77c9"/>
    </style:style>
    <style:style style:name="P11" style:family="paragraph" style:parent-style-name="Tactical_20_Principle">
      <style:text-properties officeooo:rsid="001f77c9" officeooo:paragraph-rsid="001f77c9"/>
    </style:style>
    <style:style style:name="P12" style:family="paragraph" style:parent-style-name="Body_20_Text">
      <style:text-properties officeooo:rsid="0021d109" officeooo:paragraph-rsid="0021d109"/>
    </style:style>
    <style:style style:name="P13" style:family="paragraph" style:parent-style-name="Body_20_Text">
      <style:text-properties fo:font-size="14pt" style:font-size-asian="14pt" style:font-size-complex="14pt"/>
    </style:style>
    <style:style style:name="P14" style:family="paragraph" style:parent-style-name="Managers_20_Journal">
      <style:text-properties fo:font-size="14pt" style:font-size-asian="14pt" style:font-size-complex="14pt"/>
    </style:style>
    <style:style style:name="P15" style:family="paragraph" style:parent-style-name="Body_20_Text">
      <style:text-properties fo:font-size="14pt" fo:font-style="normal" officeooo:paragraph-rsid="0021d109" style:font-size-asian="14pt" style:font-style-asian="normal" style:font-size-complex="14pt" style:font-style-complex="normal"/>
    </style:style>
    <style:style style:name="P16" style:family="paragraph" style:parent-style-name="Managers_20_Journal">
      <style:text-properties fo:font-size="14pt" fo:font-style="normal" officeooo:paragraph-rsid="0021d109" style:font-size-asian="14pt" style:font-style-asian="normal" style:font-size-complex="14pt" style:font-style-complex="normal"/>
    </style:style>
    <style:style style:name="P17" style:family="paragraph" style:parent-style-name="Managers_20_Journal">
      <style:text-properties style:font-name="Caveat" fo:font-size="14pt" style:font-size-asian="14pt" style:font-size-complex="14pt"/>
    </style:style>
    <style:style style:name="P18" style:family="paragraph" style:parent-style-name="Managers_20_Journal">
      <style:text-properties style:font-name="Caveat" fo:font-size="14pt" fo:font-style="normal" officeooo:paragraph-rsid="0021d109" style:font-size-asian="14pt" style:font-style-asian="normal" style:font-size-complex="14pt" style:font-style-complex="normal"/>
    </style:style>
    <style:style style:name="P19" style:family="paragraph" style:parent-style-name="Managers_20_Journal">
      <style:text-properties style:font-name="Handlee" fo:font-size="14pt" style:font-size-asian="14pt" style:font-size-complex="14pt"/>
    </style:style>
    <style:style style:name="P20" style:family="paragraph" style:parent-style-name="Managers_20_Journal">
      <style:text-properties style:font-name="Handlee" fo:font-size="14pt" fo:font-style="normal" officeooo:paragraph-rsid="0021d109" style:font-size-asian="14pt" style:font-style-asian="normal" style:font-size-complex="14pt" style:font-style-complex="normal"/>
    </style:style>
    <style:style style:name="P21" style:family="paragraph" style:parent-style-name="Managers_20_Journal">
      <style:text-properties style:font-name="Gloria Hallelujah" fo:font-size="14pt" style:font-size-asian="14pt" style:font-size-complex="14pt"/>
    </style:style>
    <style:style style:name="P22" style:family="paragraph" style:parent-style-name="Managers_20_Journal">
      <style:text-properties style:font-name="Gloria Hallelujah" fo:font-size="14pt" fo:font-style="normal" officeooo:paragraph-rsid="0021d109" style:font-size-asian="14pt" style:font-style-asian="normal" style:font-size-complex="14pt" style:font-style-complex="normal"/>
    </style:style>
    <style:style style:name="P23" style:family="paragraph" style:parent-style-name="Managers_20_Journal">
      <style:text-properties style:font-name="Architects Daughter" fo:font-size="14pt" style:font-size-asian="14pt" style:font-size-complex="14pt"/>
    </style:style>
    <style:style style:name="P24" style:family="paragraph" style:parent-style-name="Managers_20_Journal">
      <style:text-properties style:font-name="Architects Daughter" fo:font-size="14pt" fo:font-style="normal" officeooo:rsid="0021d109" officeooo:paragraph-rsid="0021d109" style:font-size-asian="14pt" style:font-style-asian="normal" style:font-size-complex="14pt" style:font-style-complex="normal"/>
    </style:style>
    <style:style style:name="P25" style:family="paragraph" style:parent-style-name="BookTitle" style:master-page-name="cover">
      <style:paragraph-properties style:page-number="auto"/>
    </style:style>
    <style:style style:name="P26" style:family="paragraph" style:parent-style-name="BookTitle" style:master-page-name="frontMatter">
      <style:paragraph-properties style:page-number="auto"/>
      <style:text-properties officeooo:rsid="001b75c5" officeooo:paragraph-rsid="001b75c5"/>
    </style:style>
    <style:style style:name="P27" style:family="paragraph" style:parent-style-name="Chapter_20_Title" style:master-page-name="chapter">
      <style:paragraph-properties style:page-number="auto"/>
    </style:style>
    <style:style style:name="P28" style:family="paragraph" style:parent-style-name="Chapter_20_Title">
      <style:text-properties officeooo:rsid="0021d109" officeooo:paragraph-rsid="0021d109"/>
    </style:style>
    <style:style style:name="P29" style:family="paragraph" style:parent-style-name="Chapter_20_Title" style:master-page-name="appendix">
      <style:paragraph-properties style:page-number="auto"/>
      <style:text-properties officeooo:rsid="0021d109" officeooo:paragraph-rsid="0021d109"/>
    </style:style>
    <style:style style:name="P30" style:family="paragraph" style:parent-style-name="Chapter_20_Title" style:master-page-name="appendix">
      <style:paragraph-properties style:page-number="auto"/>
    </style:style>
    <style:style style:name="P31" style:family="paragraph" style:parent-style-name="Minor_20_Heading">
      <style:text-properties officeooo:paragraph-rsid="0006db54"/>
    </style:style>
    <style:style style:name="P32" style:family="paragraph" style:parent-style-name="Section_20_Title">
      <style:text-properties officeooo:rsid="0006db54"/>
    </style:style>
    <style:style style:name="T1" style:family="text">
      <style:text-properties officeooo:rsid="0011e173"/>
    </style:style>
    <style:style style:name="T2" style:family="text">
      <style:text-properties officeooo:rsid="00148293"/>
    </style:style>
    <style:style style:name="T3" style:family="text">
      <style:text-properties officeooo:rsid="00047f1e"/>
    </style:style>
    <style:style style:name="T4" style:family="text">
      <style:text-properties officeooo:rsid="0006db54"/>
    </style:style>
    <style:style style:name="T5" style:family="text">
      <style:text-properties officeooo:rsid="001f77c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1d109"/>
    </style:style>
    <style:style style:name="T8" style:family="text">
      <style:text-properties officeooo:rsid="00221e1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title>The Manager's Handbook</text:title></text:p>
      <text:p text:style-name="BookSubtitle"><text:subject>Philosophy and Tactical Blueprint</text:subject></text:p>
      <text:p text:style-name="Body_20_Text"/>
      <text:p text:style-name="RevisionNote">Style Guide (Delete this section once the template is configured)</text:p>
      <text:p text:style-name="RevisionNote">Each paragraph below demonstrates one custom style.</text:p>
      <text:p text:style-name="P5"/>
      <text:p text:style-name="P26"><text:subject>Philosophy and Tactical Blueprint</text:subject></text:p>
      <text:p text:style-name="P4">BookSubtitle - Volume I</text:p>
      <text:h text:style-name="Chapter_20_Title" text:outline-level="1" text:is-list-header="true"/>
      <text:table-of-content text:style-name="Sect1" text:protected="true" text:name="Table of Contents1">
        <text:table-of-content-source text:outline-level="4">
          <text:index-title-template text:style-name="Chapter_20_Title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hapter_20_Title" text:outline-level="1">Table of Contents</text:h>
          </text:index-title>
          <text:p text:style-name="P6"><text:a xlink:type="simple" xlink:href="#__RefHeading___Toc271_3319242966" text:style-name="Index_20_Link" text:visited-style-name="Index_20_Link">Chapter Title - Football Before Formations<text:tab/>3</text:a></text:p>
          <text:p text:style-name="P7"><text:a xlink:type="simple" xlink:href="#__RefHeading___Toc647_3319242966" text:style-name="Index_20_Link" text:visited-style-name="Index_20_Link">Section Title - Understanding Space<text:tab/>3</text:a></text:p>
          <text:p text:style-name="P8"><text:a xlink:type="simple" xlink:href="#__RefHeading___Toc649_3319242966" text:style-name="Index_20_Link" text:visited-style-name="Index_20_Link">Subsection Title – Why Width Matters<text:tab/>3</text:a></text:p>
          <text:p text:style-name="P9"><text:a xlink:type="simple" xlink:href="#__RefHeading___Toc651_3319242966" text:style-name="Index_20_Link" text:visited-style-name="Index_20_Link">Minor Heading - Example<text:tab/>3</text:a></text:p>
        </text:index-body>
      </text:table-of-content>
      <text:p text:style-name="Body_20_Text"/>
      <text:h text:style-name="P27" text:outline-level="1"><text:bookmark-start text:name="__RefHeading___Toc271_3319242966"/><text:span text:style-name="T4">Chapter Title - </text:span>Football Before Formations<text:bookmark-end text:name="__RefHeading___Toc271_3319242966"/></text:h>
      <text:h text:style-name="P32" text:outline-level="2"><text:bookmark-start text:name="__RefHeading___Toc647_3319242966"/>Section Title - Understanding Space<text:bookmark-end text:name="__RefHeading___Toc647_3319242966"/></text:h>
      <text:h text:style-name="Subsection_20_Title" text:outline-level="3"><text:bookmark-start text:name="__RefHeading___Toc649_3319242966"/><text:span text:style-name="T4">S</text:span>ubsection <text:span text:style-name="T4">Title – Why Width Matters</text:span><text:bookmark-end text:name="__RefHeading___Toc649_3319242966"/></text:h>
      <text:h text:style-name="P31" text:outline-level="4"><text:bookmark-start text:name="__RefHeading___Toc651_3319242966"/>Minor Heading - <text:span text:style-name="T4">Example</text:span><text:bookmark-end text:name="__RefHeading___Toc651_3319242966"/></text:h>
      <text:p text:style-name="Body_20_Text">Body - Standard paragraph text. This is the default writing style for the handbook.</text:p>
      <text:p text:style-name="Body_20_Text">Another body line.</text:p>
      <text:p text:style-name="Quote">Quote - 'A tactic should solve a problem, not create one.'</text:p>
      <text:h text:style-name="P28" text:outline-level="1" text:is-list-header="true"/>
      <text:h text:style-name="P29" text:outline-level="1">Appendix – Design Experiments</text:h>
      <text:h text:style-name="Section_20_Title" text:outline-level="2">Handwriting Shoot Out</text:h>
      <text:p text:style-name="P14">Need to test the AWB against elite wingers. Powell was isolated too often. <text:span text:style-name="T7">Patrick Hand</text:span></text:p>
      <text:p text:style-name="P13"/>
      <text:p text:style-name="P17">Need to test the AWB against elite wingers. Powell was isolated too often. <text:span text:style-name="T7">Caveat</text:span></text:p>
      <text:p text:style-name="P13"/>
      <text:p text:style-name="P19">Need to test the AWB against elite wingers. Powell was isolated too often. <text:span text:style-name="T7">Handlee</text:span></text:p>
      <text:p text:style-name="P13"/>
      <text:p text:style-name="P21">Need to test the AWB against elite wingers. Powell was isolated too often. <text:span text:style-name="T7">Gloria H</text:span></text:p>
      <text:p text:style-name="P13"/>
      <text:p text:style-name="P23">Need to test the AWB against elite wingers. Powell was isolated too often. <text:span text:style-name="T7">AD</text:span></text:p>
      <text:p text:style-name="P13"/>
      <text:h text:style-name="Section_20_Title" text:outline-level="2">Below non-italic versions<text:line-break/></text:h>
      <text:p text:style-name="P16">Need to test the AWB against elite wingers. Powell was isolated too often. <text:span text:style-name="T7">Patrick Hand</text:span></text:p>
      <text:p text:style-name="P15"/>
      <text:p text:style-name="P18">Need to test the AWB against elite wingers. Powell was isolated too often. <text:span text:style-name="T7">Caveat</text:span></text:p>
      <text:p text:style-name="P15"/>
      <text:p text:style-name="P20">Need to test the AWB against elite wingers. Powell was isolated too often. <text:span text:style-name="T7">Handlee</text:span></text:p>
      <text:p text:style-name="P15"><text:soft-page-break/></text:p>
      <text:p text:style-name="P22">Need to test the AWB against elite wingers. Powell was isolated too often. <text:span text:style-name="T7">Gloria H</text:span></text:p>
      <text:p text:style-name="P15"/>
      <text:p text:style-name="P24">Need to test the AWB against elite wingers. Powell was isolated too often. AD</text:p>
      <text:p text:style-name="P12">We selected Patrick Hand, regular, 11 pt.</text:p>
      <text:h text:style-name="P30" text:outline-level="1">Call-<text:span text:style-name="T8">O</text:span>ut Styles</text:h>
      <text:p text:style-name="P10">FM B<text:span text:style-name="T3">e</text:span>haviour</text:p>
      <text:p text:style-name="P10">Explain how the Football Manager match engine interprets an instruction.</text:p>
      <text:p text:style-name="Tactical_20_Principle">Tactical Principle - Explain the football coaching principle.</text:p>
      <text:p text:style-name="P11">Second line</text:p>
      <text:p text:style-name="Managers_20_Journal"><text:span text:style-name="T6">Manager's Journal</text:span><text:line-break/><text:span text:style-name="T5">Need to test FB(D) against fast wingers.<text:line-break/>Powell isolated too often.</text:span></text:p>
      <text:p text:style-name="Warning">⚠ Warning - Common pitfalls or tactical risks.</text:p>
      <text:p text:style-name="Match_20_Tip">💡 Match Tip - Practical advice for match day.</text:p>
      <text:p text:style-name="Evidence">Evidence</text:p>
      <text:p text:style-name="Evidence">Data Hub:</text:p>
      <text:p text:style-name="Evidence">Possession 71%</text:p>
      <text:p text:style-name="Evidence">xG 2.41 – 0.82</text:p>
      <text:p text:style-name="Evidence">Progressive Passes 43</text:p>
      <text:p text:style-name="Example">Example</text:p>
      <text:p text:style-name="Example">Manchester City 4-3-3</text:p>
      <text:p text:style-name="Example">Our response: 3-2-2-3</text:p>
      <text:p text:style-name="Example">Result: Won 2–1</text:p>
      <text:p text:style-name="RevisionNote">Revision Note - Added after version 1.1.</text:p>
      <text:p text:style-name="Caption">Figure 1.1 - Example diagram cap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chitects Daughter" svg:font-family="'Architects Daughter'" style:font-pitch="variable"/>
    <style:font-face style:name="Calibri" svg:font-family="Calibri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Caveat" svg:font-family="Cavea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loria Hallelujah" svg:font-family="'Gloria Hallelujah'" style:font-pitch="variable"/>
    <style:font-face style:name="Handlee" svg:font-family="Handle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atrick Hand" svg:font-family="'Patrick Hand'" style:font-adornments="Bold Italic" style:font-pitch="variable"/>
    <style:font-face style:name="Tahoma" svg:font-family="Tahoma"/>
    <style:font-face style:name="Tahoma1" svg:font-family="Tahoma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loext:hidden="true" style:hidden="true" style:class="text"/>
    <style:style style:name="BookTitle" style:family="paragraph" style:master-page-name="">
      <style:paragraph-properties fo:margin-left="0cm" fo:margin-right="0cm" fo:margin-top="0cm" fo:margin-bottom="0.6cm" style:contextual-spacing="false" fo:text-align="center" style:justify-single-word="false" fo:text-indent="0cm" style:auto-text-indent="false" style:page-number="auto" fo:break-before="auto" fo:break-after="auto" fo:keep-with-next="always"/>
      <style:text-properties fo:color="#729fcf" loext:opacity="100%" style:font-name="Tahoma" fo:font-family="Tahoma" fo:font-size="22pt" fo:font-weight="bold"/>
    </style:style>
    <style:style style:name="BookSubtitle" style:family="paragraph" style:parent-style-name="BookTitle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 fo:keep-with-next="auto"/>
      <style:text-properties fo:color="#729fcf" loext:opacity="100%" style:font-name="Tahoma" fo:font-family="Tahoma" fo:font-size="18pt" fo:font-weight="normal"/>
    </style:style>
    <style:style style:name="Chapter_20_Title" style:display-name="Chapter Title" style:family="paragraph" style:parent-style-name="BookTitle" style:next-style-name="Body_20_Text" style:auto-update="true" style:default-outline-level="1" style:master-page-name="">
      <style:paragraph-properties fo:margin-left="0cm" fo:margin-right="0cm" fo:margin-top="0cm" fo:margin-bottom="0.6cm" style:contextual-spacing="true" fo:text-align="start" style:justify-single-word="false" fo:text-indent="0cm" style:auto-text-indent="false" style:page-number="auto" fo:break-before="auto" fo:break-after="auto" fo:keep-with-next="always">
        <style:tab-stops>
          <style:tab-stop style:position="1.111cm"/>
        </style:tab-stops>
      </style:paragraph-properties>
      <style:text-properties fo:color="#7a1f1f" loext:opacity="100%" style:font-name="Tahoma" fo:font-family="Tahoma" fo:font-size="16pt" fo:font-weight="bold"/>
    </style:style>
    <style:style style:name="Section_20_Title" style:display-name="Section Title" style:family="paragraph" style:parent-style-name="Chapter_20_Title" style:next-style-name="Body_20_Text" style:auto-update="true" style:default-outline-level="2" style:master-page-name="">
      <style:paragraph-properties fo:margin-left="0cm" fo:margin-right="0cm" fo:margin-top="0cm" fo:margin-bottom="0.4cm" style:contextual-spacing="false" fo:text-indent="0cm" style:auto-text-indent="false" style:page-number="auto" fo:break-before="auto" fo:break-after="auto"/>
      <style:text-properties fo:color="#7a1f1f" loext:opacity="100%" style:font-name="Tahoma" fo:font-family="Tahoma" fo:font-size="14pt" fo:font-weight="normal"/>
    </style:style>
    <style:style style:name="Subsection_20_Title" style:display-name="Subsection Title" style:family="paragraph" style:parent-style-name="Section_20_Title" style:next-style-name="Body_20_Text" style:auto-update="true" style:default-outline-level="3">
      <style:paragraph-properties fo:margin-left="0cm" fo:margin-right="0cm" fo:margin-top="0cm" fo:margin-bottom="0.4cm" style:contextual-spacing="false" fo:text-indent="0cm" style:auto-text-indent="false"/>
      <style:text-properties fo:color="#7a1f1f" loext:opacity="100%" style:font-name="Tahoma" fo:font-family="Tahoma" fo:font-size="12pt" fo:font-weight="normal" style:font-size-asian="16pt" style:font-weight-asian="normal" style:font-size-complex="16pt" style:font-weight-complex="normal"/>
    </style:style>
    <style:style style:name="Minor_20_Heading" style:display-name="Minor Heading" style:family="paragraph" style:parent-style-name="Subsection_20_Title" style:auto-update="true" style:default-outline-level="4">
      <style:paragraph-properties fo:margin-top="0cm" fo:margin-bottom="0.3cm" style:contextual-spacing="false"/>
      <style:text-properties fo:color="#7a1f1f" loext:opacity="100%" style:font-name="Tahoma" fo:font-family="Tahoma" fo:font-size="11pt" style:font-size-asian="16pt" style:font-size-complex="16pt"/>
    </style:style>
    <style:style style:name="Body_20_Text" style:display-name="Body Text" style:family="paragraph">
      <style:paragraph-properties fo:margin-left="0cm" fo:margin-right="0cm" fo:margin-top="0.199cm" fo:margin-bottom="0.199cm" style:contextual-spacing="true" fo:text-indent="0cm" style:auto-text-indent="false"/>
      <style:text-properties style:font-name="Calibri" fo:font-family="Calibri" fo:font-size="11pt"/>
    </style:style>
    <style:style style:name="Quote" style:family="paragraph" style:parent-style-name="Body_20_Text">
      <style:paragraph-properties fo:text-align="center" style:justify-single-word="false"/>
      <style:text-properties fo:color="#555555" loext:opacity="100%" style:font-name="Calibri" fo:font-family="Calibri" fo:font-size="11pt" fo:font-style="italic"/>
    </style:style>
    <style:style style:name="FM_20_Behaviour" style:display-name="FM Behaviour" style:family="paragraph" style:parent-style-name="Panel_20_Heading" style:master-page-name="">
      <loext:graphic-properties draw:fill="solid" draw:fill-color="#b4c7dc"/>
      <style:paragraph-properties fo:margin-left="0.3cm" fo:margin-right="0.3cm" fo:margin-top="0.101cm" fo:margin-bottom="0.101cm" style:contextual-spacing="false" fo:text-indent="0cm" style:auto-text-indent="false" style:page-number="auto" fo:background-color="#b4c7dc" fo:padding-left="0.3cm" fo:padding-right="0.3cm" fo:padding-top="0.15cm" fo:padding-bottom="0.15cm" fo:border="0.74pt solid #5983b0" style:join-border="true">
        <style:tab-stops/>
      </style:paragraph-properties>
      <style:text-properties fo:color="#1565c0" loext:opacity="100%" style:font-name="Calibri" fo:font-family="Calibri" fo:font-size="11pt" fo:font-weight="normal"/>
    </style:style>
    <style:style style:name="Tactical_20_Principle" style:display-name="Tactical Principle" style:family="paragraph" style:parent-style-name="Panel_20_Heading">
      <loext:graphic-properties draw:fill="solid" draw:fill-color="#81aca6"/>
      <style:paragraph-properties fo:background-color="#81aca6" fo:padding-left="0.3cm" fo:padding-right="0.3cm" fo:padding-top="0.199cm" fo:padding-bottom="0.15cm" fo:border="0.74pt solid #168253"/>
      <style:text-properties fo:color="#2e7d32" loext:opacity="100%" style:font-name="Calibri" fo:font-family="Calibri" fo:font-size="11pt" fo:font-weight="normal"/>
    </style:style>
    <style:style style:name="Managers_20_Journal" style:display-name="Managers Journal" style:family="paragraph" style:parent-style-name="Panel_20_Heading">
      <loext:graphic-properties draw:fill="solid" draw:fill-color="#ffffff"/>
      <style:paragraph-properties fo:margin-left="0.3cm" fo:margin-right="0.3cm" fo:margin-top="0cm" fo:margin-bottom="0cm" style:contextual-spacing="false" fo:text-indent="0cm" style:auto-text-indent="false" fo:background-color="#ffffff" fo:padding-left="0.3cm" fo:padding-right="0.3cm" fo:padding-top="0.15cm" fo:padding-bottom="0.15cm" fo:border="0.74pt solid #ff0000" style:shadow="none"/>
      <style:text-properties fo:color="#c62828" loext:opacity="100%" style:font-name="Patrick Hand" fo:font-family="'Patrick Hand'" style:font-style-name="Bold Italic" style:font-pitch="variable" fo:font-size="11pt" fo:font-style="normal" fo:font-weight="normal"/>
    </style:style>
    <style:style style:name="Warning" style:family="paragraph" style:parent-style-name="Panel_20_Heading">
      <loext:graphic-properties draw:fill="solid" draw:fill-color="#cccccc"/>
      <style:paragraph-properties fo:margin-top="0.199cm" fo:margin-bottom="0.199cm" style:contextual-spacing="false" fo:background-color="#cccccc" fo:padding-left="0.3cm" fo:padding-right="0.3cm" fo:padding-top="0.15cm" fo:padding-bottom="0.15cm" fo:border="0.74pt solid #666666"/>
      <style:text-properties fo:color="#666666" loext:opacity="100%" style:font-name="Calibri" fo:font-family="Calibri" fo:font-size="11pt" fo:font-weight="normal"/>
    </style:style>
    <style:style style:name="Match_20_Tip" style:display-name="Match Tip" style:family="paragraph" style:parent-style-name="Panel_20_Heading">
      <loext:graphic-properties draw:fill="solid" draw:fill-color="#ffe994"/>
      <style:paragraph-properties fo:margin-top="0.199cm" fo:margin-bottom="0.199cm" style:contextual-spacing="false" fo:background-color="#ffe994" fo:padding-left="0.3cm" fo:padding-right="0.3cm" fo:padding-top="0.199cm" fo:padding-bottom="0.15cm" fo:border="0.74pt solid #8a6d00"/>
      <style:text-properties fo:color="#8a6d00" loext:opacity="100%" style:font-name="Calibri" fo:font-family="Calibri" fo:font-size="11pt" fo:font-weight="normal"/>
    </style:style>
    <style:style style:name="RevisionNote" style:family="paragraph" style:parent-style-name="Body_20_Text">
      <style:paragraph-properties fo:margin-top="0.199cm" fo:margin-bottom="0cm" style:contextual-spacing="false"/>
      <style:text-properties fo:color="#c62828" loext:opacity="100%" style:font-name="Calibri" fo:font-family="Calibri" fo:font-size="10pt" fo:font-style="italic"/>
    </style:style>
    <style:style style:name="Caption" style:family="paragraph" style:parent-style-name="Body_20_Text" style:class="extra">
      <style:paragraph-properties fo:margin-top="0.199cm" fo:margin-bottom="0.199cm" style:contextual-spacing="false"/>
      <style:text-properties fo:color="#666666" loext:opacity="100%" style:font-name="Calibri" fo:font-family="Calibri" fo:font-size="9pt" fo:font-style="italic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Bold" style:font-family-generic="swiss" fo:font-size="12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Calibri1" fo:font-family="Calibri" style:font-style-name="Bold" style:font-family-generic="swiss" fo:font-size="14pt" fo:font-weight="bold" style:font-size-asian="16pt" style:font-weight-asian="bold" style:font-size-complex="16pt" style:font-weight-complex="600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style-name="Regular" style:font-family-generic="swiss" fo:font-size="11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text-indent="0cm" style:auto-text-indent="false">
        <style:tab-stops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6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nel_20_Heading" style:display-name="Panel Heading" style:family="paragraph" style:auto-update="true">
      <loext:graphic-properties draw:fill="solid" draw:fill-color="#729fcf"/>
      <style:paragraph-properties fo:margin-left="0.3cm" fo:margin-right="0.3cm" fo:margin-top="0.101cm" fo:margin-bottom="0.101cm" style:contextual-spacing="false" fo:text-indent="0cm" style:auto-text-indent="false" fo:background-color="#729fcf" fo:padding-left="0.199cm" fo:padding-right="0.199cm" fo:padding-top="0.15cm" fo:padding-bottom="0.15cm" fo:border="3pt solid #000000"/>
      <style:text-properties style:font-name="Tahoma1" fo:font-family="Tahoma" style:font-style-name="Regular" style:font-family-generic="swiss" fo:font-size="11pt" fo:font-weight="normal"/>
    </style:style>
    <style:style style:name="Evidence" style:family="paragraph" style:parent-style-name="Panel_20_Heading">
      <loext:graphic-properties draw:fill="solid" draw:fill-color="#e0c2cd"/>
      <style:paragraph-properties fo:margin-left="0.3cm" fo:margin-right="0.3cm" fo:margin-top="0.101cm" fo:margin-bottom="0.101cm" style:contextual-spacing="false" fo:text-indent="0cm" style:auto-text-indent="false" fo:background-color="#e0c2cd" fo:padding-left="0.3cm" fo:padding-right="0.3cm" fo:padding-top="0.199cm" fo:padding-bottom="0.15cm" fo:border="0.74pt solid #8d1d75"/>
      <style:text-properties fo:color="#8d1d75" loext:opacity="100%" fo:font-weight="normal"/>
    </style:style>
    <style:style style:name="Example" style:family="paragraph" style:parent-style-name="Panel_20_Heading">
      <loext:graphic-properties draw:fill="solid" draw:fill-color="#e8f2a1"/>
      <style:paragraph-properties fo:margin-top="0.101cm" fo:margin-bottom="0.101cm" style:contextual-spacing="false" fo:background-color="#e8f2a1" fo:padding-left="0.3cm" fo:padding-right="0.3cm" fo:padding-top="0.199cm" fo:padding-bottom="0.15cm" fo:border="0.74pt solid #468a1a"/>
      <style:text-properties fo:color="#468a1a" loext:opacity="100%" fo:font-weight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5.667cm" style:rel-column-width="21844*"/>
    </style:style>
    <style:style style:name="Table4.B" style:family="table-column">
      <style:table-column-properties style:column-width="5.667cm" style:rel-column-width="21846*"/>
    </style:style>
    <style:style style:name="Table4.C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="none"/>
    </style:style>
    <style:style style:name="MP1" style:family="paragraph" style:parent-style-name="Body_20_Text">
      <style:paragraph-properties fo:text-align="center" style:justify-single-word="false"/>
    </style:style>
    <style:style style:name="MP2" style:family="paragraph" style:parent-style-name="Body_20_Text">
      <style:paragraph-properties fo:text-align="end" style:justify-single-word="false"/>
    </style:style>
    <style:style style:name="MP3" style:family="paragraph" style:parent-style-name="Body_20_Text">
      <style:text-properties officeooo:rsid="0006db54" officeooo:paragraph-rsid="0006db54"/>
    </style:style>
    <style:style style:name="MT1" style:family="text">
      <style:text-properties officeooo:rsid="0011e173"/>
    </style:style>
    <style:style style:name="MT2" style:family="text">
      <style:text-properties officeooo:rsid="00148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loext:hidden="true" style:hidden="true" style:display-name="First Page" style:page-layout-name="Mpm1" draw:style-name="Mdp1" style:next-style-name="Standard"/>
    <style:master-page style:name="cover" style:page-layout-name="Mpm1" draw:style-name="Mdp1" style:next-style-name="frontMatter"/>
    <style:master-page style:name="Left_20_Page" loext:hidden="true" style:hidden="true" style:display-name="Left Page" style:page-layout-name="Mpm2" draw:style-name="Mdp1" style:next-style-name="Right_20_Page"/>
    <style:master-page style:name="Right_20_Page" loext:hidden="true" style:hidden="true" style:display-name="Right Page" style:page-layout-name="Mpm3" draw:style-name="Mdp1" style:next-style-name="Left_20_Page"/>
    <style:master-page style:name="Envelope" loext:hidden="true" style:hidden="true" style:page-layout-name="Mpm4" draw:style-name="Mdp1"/>
    <style:master-page style:name="Index" loext:hidden="true" style:hidden="true" style:page-layout-name="Mpm1" draw:style-name="Mdp1"/>
    <style:master-page style:name="HTML" loext:hidden="true" style:hidden="true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footer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5.A1" office:value-type="string">
              <text:p text:style-name="MP1">Draft</text:p>
            </table:table-cell>
            <table:table-cell table:style-name="Table5.A1" office:value-type="string">
              <text:p text:style-name="MP2"><text:page-number text:select-page="current">ii</text:page-number></text:p>
            </table:table-cell>
          </table:table-row>
        </table:table>
        <text:p text:style-name="Footer"/>
      </style:footer>
    </style:master-page>
    <style:master-page style:name="chapter" style:page-layout-name="Mpm9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3"><text:title>The Manager's Handbook</text:title></text:p>
            </table:table-cell>
            <table:table-cell table:style-name="Table1.A1" office:value-type="string">
              <text:p text:style-name="MP2"><text:subject>Philosophy and Tactical Blueprint</text:subject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2.A1" office:value-type="string">
              <text:p text:style-name="MP1">Draft</text:p>
            </table:table-cell>
            <table:table-cell table:style-name="Table2.A1" office:value-type="string">
              <text:p text:style-name="MP2"><text:page-number text:select-page="current">3</text:page-number><text:s/><text:span text:style-name="MT1">of </text:span><text:span text:style-name="MT1"><text:page-count>6</text:page-count></text:span></text:p>
            </table:table-cell>
          </table:table-row>
        </table:table>
        <text:p text:style-name="Footer"/>
      </style:footer>
    </style:master-page>
    <style:master-page style:name="appendix" style:page-layout-name="Mpm9" draw:style-name="Mdp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Body_20_Text"><text:title>The Manager's Handbook</text:title></text:p>
            </table:table-cell>
            <table:table-cell table:style-name="Table3.A1" office:value-type="string">
              <text:p text:style-name="MP2"><text:subject>Philosophy and Tactical Blueprint</text:subject></text:p>
            </table:table-cell>
          </table:table-row>
        </table:table>
        <text:p text:style-name="Foot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Body_20_Text">Version <text:user-defined style:data-style-name="N0" text:name="Version">0.1.0</text:user-defined></text:p>
            </table:table-cell>
            <table:table-cell table:style-name="Table4.A1" office:value-type="string">
              <text:p text:style-name="MP1">Draft</text:p>
            </table:table-cell>
            <table:table-cell table:style-name="Table4.A1" office:value-type="string">
              <text:p text:style-name="MP1"><text:span text:style-name="MT2"><text:page-number text:select-page="current">6</text:page-number></text:span><text:span text:style-name="MT2"><text:s/>of </text:span><text:span text:style-name="MT2"><text:page-count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duration>PT4M55S</meta:editing-duration>
    <meta:editing-cycles>3</meta:editing-cycles>
    <meta:keyword>Football Manager</meta:keyword>
    <meta:keyword>Tactice</meta:keyword>
    <meta:keyword>Coaching</meta:keyword>
    <meta:keyword>Recruitment</meta:keyword>
    <dc:subject>Philosophy and Tactical Blueprint</dc:subject>
    <dc:title>The Manager's Handbook</dc:title>
    <meta:creation-date>2026-06-29T09:51:10.719993666</meta:creation-date>
    <dc:date>2026-06-29T09:56:07.069796828</dc:date>
    <meta:document-statistic meta:table-count="5" meta:image-count="0" meta:object-count="0" meta:page-count="6" meta:paragraph-count="64" meta:word-count="380" meta:character-count="2379" meta:non-whitespace-character-count="2059"/>
    <meta:user-defined meta:name="Author">Andy Wilson</meta:user-defined>
    <meta:user-defined meta:name="Comments">My living tactical handbook</meta:user-defined>
    <meta:user-defined meta:name="FMVersion">FM26</meta:user-defined>
    <meta:user-defined meta:name="Status">Draft</meta:user-defined>
    <meta:user-defined meta:name="Version" meta:value-type="string">0.1.0</meta:user-defined>
    <meta:user-defined meta:name="Volume" meta:value-type="string">1</meta:user-defined>
    <meta:template xlink:type="simple" xlink:actuate="onRequest" xlink:title="myManagerHandbook-StyleTemplate" xlink:href="../../../../../../../home/andy/.config/libreoffice/4/user/template/myManagerHandbook-StyleTemplate.ott" meta:date="2026-06-29T09:51:10.288544054"/>
  </office:meta>
</office:document-meta>
</file>