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Calibri1" svg:font-family="Calibri" style:font-adornments="Bold" style:font-family-generic="swiss"/>
    <style:font-face style:name="Calibri2" svg:font-family="Calibri" style:font-adornments="Regular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Patrick Hand" svg:font-family="'Patrick Hand'" style:font-adornments="Bold Italic" style:font-pitch="variable"/>
    <style:font-face style:name="Patrick Hand1" svg:font-family="'Patrick Hand'" style:font-adornments="Regular" style:font-pitch="variable"/>
    <style:font-face style:name="Tahoma" svg:font-family="Tahoma"/>
    <style:font-face style:name="Tahoma1" svg:font-family="Tahoma" style:font-adornments="Bold" style:font-family-generic="swiss"/>
    <style:font-face style:name="Tahoma2" svg:font-family="Tahoma" style:font-adornments="Regular" style:font-family-generic="swiss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Heading_20_2">
      <style:text-properties officeooo:paragraph-rsid="001ca0fa"/>
    </style:style>
    <style:style style:name="P4" style:family="paragraph" style:parent-style-name="Heading_20_3">
      <style:text-properties officeooo:paragraph-rsid="001ca0fa"/>
    </style:style>
    <style:style style:name="P5" style:family="paragraph" style:parent-style-name="Text_20_body">
      <style:text-properties officeooo:paragraph-rsid="001ca0fa"/>
    </style:style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2">
      <style:paragraph-properties fo:margin-top="0cm" fo:margin-bottom="0cm" style:contextual-spacing="false"/>
      <style:text-properties officeooo:rsid="0019a97c" officeooo:paragraph-rsid="0019a97c"/>
    </style:style>
    <style:style style:name="P8" style:family="paragraph" style:parent-style-name="Text_20_body" style:list-style-name="L2"/>
    <style:style style:name="P9" style:family="paragraph" style:parent-style-name="H1">
      <style:text-properties officeooo:paragraph-rsid="001ca0fa"/>
    </style:style>
    <style:style style:name="P10" style:family="paragraph" style:parent-style-name="Text_20_body" style:list-style-name="L3">
      <style:paragraph-properties fo:margin-top="0cm" fo:margin-bottom="0cm" style:contextual-spacing="false"/>
      <style:text-properties officeooo:paragraph-rsid="001ca0fa"/>
    </style:style>
    <style:style style:name="P11" style:family="paragraph" style:parent-style-name="Heading_20_3" style:list-style-name="">
      <style:text-properties officeooo:paragraph-rsid="001ca0fa"/>
    </style:style>
    <style:style style:name="P12" style:family="paragraph" style:parent-style-name="Text_20_body" style:list-style-name="L4">
      <style:paragraph-properties fo:margin-top="0cm" fo:margin-bottom="0cm" style:contextual-spacing="false"/>
      <style:text-properties officeooo:paragraph-rsid="001ca0fa"/>
    </style:style>
    <style:style style:name="P13" style:family="paragraph" style:parent-style-name="Text_20_body" style:list-style-name="L5">
      <style:paragraph-properties fo:margin-top="0cm" fo:margin-bottom="0cm" style:contextual-spacing="false"/>
      <style:text-properties officeooo:paragraph-rsid="001ca0fa"/>
    </style:style>
    <style:style style:name="P14" style:family="paragraph" style:parent-style-name="Text_20_body" style:list-style-name="L6">
      <style:paragraph-properties fo:margin-top="0cm" fo:margin-bottom="0cm" style:contextual-spacing="false"/>
      <style:text-properties officeooo:paragraph-rsid="001ca0fa"/>
    </style:style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7"/>
    <style:style style:name="P17" style:family="paragraph" style:parent-style-name="Heading_20_3">
      <style:text-properties officeooo:paragraph-rsid="0017c264"/>
    </style:style>
    <style:style style:name="P18" style:family="paragraph" style:parent-style-name="Standard" style:list-style-name="L8">
      <style:paragraph-properties fo:margin-top="0cm" fo:margin-bottom="0cm" style:contextual-spacing="false"/>
      <style:text-properties officeooo:paragraph-rsid="0017c264"/>
    </style:style>
    <style:style style:name="P19" style:family="paragraph" style:parent-style-name="Text_20_body" style:list-style-name="L8">
      <style:paragraph-properties fo:margin-top="0cm" fo:margin-bottom="0cm" style:contextual-spacing="false"/>
      <style:text-properties officeooo:paragraph-rsid="0017c264"/>
    </style:style>
    <style:style style:name="P20" style:family="paragraph" style:parent-style-name="Text_20_body" style:list-style-name="L8">
      <style:text-properties officeooo:paragraph-rsid="0017c264"/>
    </style:style>
    <style:style style:name="P21" style:family="paragraph" style:parent-style-name="Text_20_body" style:list-style-name="L9">
      <style:paragraph-properties fo:margin-top="0cm" fo:margin-bottom="0cm" style:contextual-spacing="false"/>
      <style:text-properties officeooo:paragraph-rsid="0017c264"/>
    </style:style>
    <style:style style:name="P22" style:family="paragraph" style:parent-style-name="Text_20_body" style:list-style-name="L9">
      <style:paragraph-properties fo:margin-top="0cm" fo:margin-bottom="0cm" style:contextual-spacing="false"/>
      <style:text-properties officeooo:rsid="001c6b26" officeooo:paragraph-rsid="0017c264"/>
    </style:style>
    <style:style style:name="P23" style:family="paragraph" style:parent-style-name="Text_20_body" style:list-style-name="L10"/>
    <style:style style:name="P24" style:family="paragraph" style:parent-style-name="Text_20_body" style:list-style-name="L11"/>
    <style:style style:name="P25" style:family="paragraph" style:parent-style-name="Text_20_body" style:list-style-name="L12"/>
    <style:style style:name="P26" style:family="paragraph" style:parent-style-name="Text_20_body" style:list-style-name="L13"/>
    <style:style style:name="P27" style:family="paragraph" style:parent-style-name="Text_20_body" style:list-style-name="L13">
      <style:text-properties officeooo:paragraph-rsid="0017c264"/>
    </style:style>
    <style:style style:name="P28" style:family="paragraph" style:parent-style-name="Text_20_body" style:list-style-name="L14"/>
    <style:style style:name="P29" style:family="paragraph" style:parent-style-name="Text_20_body" style:list-style-name="L15"/>
    <style:style style:name="P30" style:family="paragraph" style:parent-style-name="Text_20_body" style:list-style-name="L16"/>
    <style:style style:name="P31" style:family="paragraph" style:parent-style-name="Text_20_body" style:list-style-name="L17">
      <style:paragraph-properties fo:margin-top="0cm" fo:margin-bottom="0cm" style:contextual-spacing="false"/>
    </style:style>
    <style:style style:name="P32" style:family="paragraph" style:parent-style-name="Text_20_body" style:list-style-name="L17"/>
    <style:style style:name="P33" style:family="paragraph" style:parent-style-name="Text_20_body" style:list-style-name="L18">
      <style:paragraph-properties fo:margin-top="0cm" fo:margin-bottom="0cm" style:contextual-spacing="false"/>
    </style:style>
    <style:style style:name="P34" style:family="paragraph" style:parent-style-name="Text_20_body" style:list-style-name="L18">
      <style:text-properties officeooo:paragraph-rsid="0016291d"/>
    </style:style>
    <style:style style:name="P35" style:family="paragraph" style:parent-style-name="Text_20_body">
      <style:text-properties officeooo:paragraph-rsid="0016291d"/>
    </style:style>
    <style:style style:name="P36" style:family="paragraph" style:parent-style-name="Heading_20_1" style:list-style-name="">
      <style:text-properties officeooo:paragraph-rsid="0016291d"/>
    </style:style>
    <style:style style:name="P37" style:family="paragraph" style:parent-style-name="Text_20_body" style:list-style-name="L19">
      <style:text-properties officeooo:paragraph-rsid="0016291d"/>
    </style:style>
    <style:style style:name="P38" style:family="paragraph" style:parent-style-name="myNotes" style:list-style-name="L20"/>
    <style:style style:name="P39" style:family="paragraph" style:parent-style-name="myNotes" style:list-style-name="L20">
      <style:text-properties officeooo:paragraph-rsid="0016291d"/>
    </style:style>
    <style:style style:name="P40" style:family="paragraph" style:parent-style-name="H1">
      <style:text-properties officeooo:rsid="0018c748" officeooo:paragraph-rsid="0016291d"/>
    </style:style>
    <style:style style:name="P41" style:family="paragraph" style:parent-style-name="Standard">
      <style:text-properties officeooo:rsid="0018c748" officeooo:paragraph-rsid="0016291d"/>
    </style:style>
    <style:style style:name="P42" style:family="paragraph" style:parent-style-name="Standard">
      <style:text-properties officeooo:paragraph-rsid="0016291d"/>
    </style:style>
    <style:style style:name="T1" style:family="text">
      <style:text-properties officeooo:rsid="0019a97c"/>
    </style:style>
    <style:style style:name="T2" style:family="text">
      <style:text-properties officeooo:rsid="001ca0f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431bc"/>
    </style:style>
    <style:style style:name="T5" style:family="text">
      <style:text-properties officeooo:rsid="001822c3"/>
    </style:style>
    <style:style style:name="T6" style:family="text">
      <style:text-properties officeooo:rsid="001c6b26"/>
    </style:style>
    <style:style style:name="T7" style:family="text">
      <style:text-properties officeooo:rsid="0017c264"/>
    </style:style>
    <style:style style:name="T8" style:family="text">
      <style:text-properties fo:font-weight="normal" officeooo:rsid="0016291d" style:font-weight-asian="normal" style:font-weight-complex="normal"/>
    </style:style>
    <style:style style:name="T9" style:family="text">
      <style:text-properties officeooo:rsid="001b4d9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d1c84"/>
    </style:style>
    <style:style style:name="fr1" style:family="graphic" style:parent-style-name="Coaching_20_Point">
      <style:graphic-properties style:run-through="foreground" style:vertical-pos="top" style:vertical-rel="paragraph" style:horizontal-pos="from-left" style:horizontal-rel="paragraph" loext:rel-width-rel="paragraph"/>
    </style:style>
    <style:style style:name="fr2" style:family="graphic" style:parent-style-name="Coaching_20_Point">
      <style:graphic-properties style:run-through="foreground" style:vertical-pos="from-top" style:vertical-rel="paragraph" style:horizontal-pos="from-left" style:horizontal-rel="paragraph" loext:rel-width-rel="paragraph"/>
    </style:style>
    <style:style style:name="fr3" style:family="graphic" style:parent-style-name="Warning">
      <style:graphic-properties fo:margin-left="0cm" fo:margin-right="0cm" style:vertical-pos="from-top" style:vertical-rel="paragraph" style:horizontal-pos="from-left" style:horizontal-rel="paragraph" style:flow-with-text="true"/>
    </style:style>
    <style:style style:name="fr4" style:family="graphic" style:parent-style-name="Warning">
      <style:graphic-properties fo:margin-left="0cm" fo:margin-right="0cm" style:vertical-pos="from-top" style:vertical-rel="paragraph" style:horizontal-pos="from-left" style:horizontal-rel="paragraph" draw:fill-color="#cccccc" style:flow-with-text="true"/>
    </style:style>
    <style:style style:name="fr5" style:family="graphic" style:parent-style-name="Session_20_Summary">
      <style:graphic-properties style:vertical-pos="from-top" style:vertical-rel="paragraph" style:horizontal-pos="from-left" style:horizontal-rel="paragraph" loext:rel-width-rel="paragraph"/>
    </style:style>
    <style:style style:name="fr6" style:family="graphic" style:parent-style-name="My_20_Notes">
      <style:graphic-properties fo:margin-left="0cm" fo:margin-right="0cm" style:vertical-pos="from-top" style:vertical-rel="paragraph" style:horizontal-pos="from-left" style:horizontal-rel="paragraph" draw:fill-color="#ffe994" fo:padding-left="0.3cm" fo:padding-right="0cm" fo:padding-top="0.199cm" fo:padding-bottom="0.199cm" fo:border-left="2.01pt solid #e8a202" fo:border-right="none" fo:border-top="none" fo:border-bottom="none" draw:wrap-influence-on-position="once-concurrent" loext:allow-overlap="false" loext:rel-width-rel="paragraph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Title" text:outline-level="1">Session Plan (60 minutes)</text:h>
      <text:h text:style-name="Heading_20_2" text:outline-level="3">Welcome</text:h>
      <text:h text:style-name="Heading_20_3" text:outline-level="4">Objectives</text:h>
      <text:p text:style-name="Text_20_body">By the end of today's session players should be able to:</text:p>
      <text:list text:style-name="L1">
        <text:list-item>
          <text:p text:style-name="P1">Make a simple accurate pass. </text:p>
        </text:list-item>
        <text:list-item>
          <text:p text:style-name="P1">Receive the ball with control. </text:p>
        </text:list-item>
        <text:list-item>
          <text:p text:style-name="P2">Shield the ball while looking for the next pass. </text:p>
        </text:list-item>
      </text:list>
      <text:h text:style-name="P3" text:outline-level="3"><draw:frame draw:style-name="fr1" draw:name="Frame5" text:anchor-type="paragraph" svg:x="0cm" svg:width="17cm" style:rel-width="100%" draw:z-index="12"><draw:text-box fo:min-height="0.041cm"><text:h text:style-name="P4" text:outline-level="4">🎯 <text:span text:style-name="Strong_20_Emphasis">Coaching Point</text:span></text:h><text:p text:style-name="P5">Football is easier when your first touch gives you time.</text:p></draw:text-box></draw:frame><text:span text:style-name="Strong_20_Emphasis"><text:line-break/></text:span>Warm-up (10 minutes)</text:h>
      <text:h text:style-name="Heading_20_3" text:outline-level="4">Ball Familiarisation</text:h>
      <text:p text:style-name="Text_20_body">Each player has a ball.</text:p>
      <text:p text:style-name="Text_20_body">Walking only.</text:p>
      <text:h text:style-name="Heading_20_3" text:outline-level="4">Drills</text:h>
      <text:list text:style-name="L2">
        <text:list-item>
          <text:p text:style-name="P6">Toe taps </text:p>
        </text:list-item>
        <text:list-item>
          <text:p text:style-name="P6">Inside touches </text:p>
        </text:list-item>
        <text:list-item>
          <text:p text:style-name="P6">Outside touches </text:p>
        </text:list-item>
        <text:list-item>
          <text:p text:style-name="P7">Sole control, draw the letter L both feet</text:p>
        </text:list-item>
        <text:list-item>
          <text:p text:style-name="P6">Gentle dribbling <text:span text:style-name="T1">(around two cones in a figure of eight)</text:span> </text:p>
        </text:list-item>
        <text:list-item>
          <text:p text:style-name="P6">Stop the ball with the sole </text:p>
        </text:list-item>
        <text:list-item>
          <text:p text:style-name="P8">Change direction every few metres </text:p>
        </text:list-item>
      </text:list>
      <text:h text:style-name="Heading_20_2" text:outline-level="3"><draw:frame draw:style-name="fr1" draw:name="Frame4" text:anchor-type="paragraph" svg:x="-0.026cm" svg:width="17cm" style:rel-width="100%" draw:z-index="11"><draw:text-box fo:min-height="0.041cm"><text:h text:style-name="P4" text:outline-level="4">🎯 <text:span text:style-name="Strong_20_Emphasis">Coaching Point</text:span></text:h><text:p text:style-name="P5">Keep the ball close enough that you could stop it with one step.</text:p></draw:text-box></draw:frame><text:span text:style-name="Strong_20_Emphasis"><text:line-break/></text:span>Passing (1<text:span text:style-name="T2">0</text:span> minutes)</text:h>
      <text:h text:style-name="Heading_20_3" text:outline-level="4">Setup</text:h>
      <text:p text:style-name="Text_20_body">Players work in pairs.</text:p>
      <text:p text:style-name="Text_20_body">Distance: <text:span text:style-name="Strong_20_Emphasis"><text:span text:style-name="T3">5–7 metres</text:span></text:span></text:p>
      <text:h text:style-name="Heading_20_3" text:outline-level="4">Stage 1</text:h>
      <text:p text:style-name="Text_20_body">Pass with the inside of the foot.</text:p>
      <text:p text:style-name="Text_20_body">Stop the ball.</text:p>
      <text:p text:style-name="Text_20_body">Pass back.</text:p>
      <text:h text:style-name="Heading_20_3" text:outline-level="4"><text:soft-page-break/>Stage 2</text:h>
      <text:p text:style-name="Text_20_body">Pass first time if comfortable.</text:p>
      <text:h text:style-name="P9" text:outline-level="1"><draw:frame draw:style-name="fr2" draw:name="Frame1" text:anchor-type="paragraph" svg:x="0cm" svg:y="0cm" svg:width="17cm" style:rel-width="100%" draw:z-index="9"><draw:text-box fo:min-height="0.041cm"><text:h text:style-name="P4" text:outline-level="4">🎯 Coaching Points</text:h><text:list text:style-name="L3"><text:list-item><text:p text:style-name="P10">Plant foot beside the ball</text:p></text:list-item><text:list-item><text:p text:style-name="P10">Strike through the middle </text:p></text:list-item><text:list-item><text:p text:style-name="P10">Follow through towards your target</text:p></text:list-item><text:list-item><text:p text:style-name="P10">Watch your partner before passing</text:p></text:list-item></text:list></draw:text-box></draw:frame></text:h>
      <text:p text:style-name="Standard"><draw:frame draw:style-name="fr3" draw:name="Frame2" text:anchor-type="paragraph" svg:x="0cm" svg:y="0cm" svg:width="17.069cm" draw:z-index="10"><draw:text-box fo:min-height="1.951cm"><text:h text:style-name="P11" text:outline-level="4">⚠ Common Mistakes</text:h><text:list text:style-name="L4"><text:list-item><text:p text:style-name="P12">Passing too hard</text:p></text:list-item><text:list-item><text:p text:style-name="P12">Looking down throughout the kick</text:p></text:list-item><text:list-item><text:p text:style-name="P12">Leaning backwards</text:p></text:list-item></text:list></draw:text-box></draw:frame></text:p>
      <text:h text:style-name="Heading_20_2" text:outline-level="3">Receiving (1<text:span text:style-name="T2">0</text:span> minutes)</text:h>
      <text:h text:style-name="Heading_20_3" text:outline-level="4">Setup</text:h>
      <text:p text:style-name="Text_20_body">Same pairs.</text:p>
      <text:h text:style-name="Heading_20_3" text:outline-level="4">Stage 1</text:h>
      <text:p text:style-name="Text_20_body">Receive with the inside of the foot.</text:p>
      <text:p text:style-name="Text_20_body">Stop the ball.</text:p>
      <text:p text:style-name="Text_20_body">Pass back.</text:p>
      <text:h text:style-name="Heading_20_3" text:outline-level="4">Stage 2</text:h>
      <text:p text:style-name="Text_20_body">Receive and guide the ball one metre to the left.</text:p>
      <text:p text:style-name="Text_20_body">Pass.</text:p>
      <text:p text:style-name="Text_20_body">Repeat to the right.</text:p>
      <text:h text:style-name="Heading_20_3" text:outline-level="4">Stage 3</text:h>
      <text:p text:style-name="Text_20_body">Receive on the back foot.</text:p>
      <text:p text:style-name="Text_20_body">Turn slightly.</text:p>
      <text:p text:style-name="P5">Pass.<text:line-break/></text:p>
      <text:h text:style-name="P9" text:outline-level="1"><draw:frame draw:style-name="fr1" draw:name="Frame3" text:anchor-type="paragraph" svg:x="-0.026cm" svg:width="17cm" style:rel-width="100%" draw:z-index="8"><draw:text-box fo:min-height="0.041cm"><text:h text:style-name="P4" text:outline-level="4">🎯 Coaching Points</text:h><text:list text:style-name="L5"><text:list-item><text:p text:style-name="P13">Watch the ball all the way</text:p></text:list-item><text:list-item><text:p text:style-name="P13">Cushion the ball</text:p></text:list-item><text:list-item><text:p text:style-name="P13">Open your body before the ball arrives</text:p></text:list-item><text:list-item><text:p text:style-name="P13">First touch into space</text:p></text:list-item></text:list></draw:text-box></draw:frame><text:soft-page-break/></text:h>
      <text:p text:style-name="Standard"><draw:frame draw:style-name="fr3" draw:name="Frame14" text:anchor-type="paragraph" svg:x="0cm" svg:y="0cm" svg:width="17.069cm" draw:z-index="7"><draw:text-box fo:min-height="1.951cm"><text:h text:style-name="P4" text:outline-level="4">⚠ Common Mistakes</text:h><text:list text:style-name="L6"><text:list-item><text:p text:style-name="P14">Stopping the ball dead every time.</text:p></text:list-item><text:list-item><text:p text:style-name="P14">Standing square</text:p></text:list-item><text:list-item><text:p text:style-name="P14">Heavy first touch</text:p></text:list-item></text:list></draw:text-box></draw:frame></text:p>
      <text:p text:style-name="Standard"/>
      <text:h text:style-name="Heading_20_2" text:outline-level="3"><text:span text:style-name="T4">S</text:span>hielding (10 minutes)</text:h>
      <text:h text:style-name="Heading_20_3" text:outline-level="4">Setup</text:h>
      <text:p text:style-name="Text_20_body">Pairs.</text:p>
      <text:p text:style-name="Text_20_body">One ball.</text:p>
      <text:p text:style-name="Text_20_body">One attacker.</text:p>
      <text:p text:style-name="Text_20_body">One defender.</text:p>
      <text:h text:style-name="Heading_20_3" text:outline-level="4">Drill</text:h>
      <text:p text:style-name="Text_20_body">The attacker stands with their back to the defender.</text:p>
      <text:p text:style-name="Text_20_body">The defender applies light pressure.</text:p>
      <text:p text:style-name="Text_20_body">The attacker must:</text:p>
      <text:list text:style-name="L7">
        <text:list-item>
          <text:p text:style-name="P15">keep the ball, </text:p>
        </text:list-item>
        <text:list-item>
          <text:p text:style-name="P15">move it from foot to foot, </text:p>
        </text:list-item>
        <text:list-item>
          <text:p text:style-name="P15">use their body, </text:p>
        </text:list-item>
        <text:list-item>
          <text:p text:style-name="P15">pivot, </text:p>
        </text:list-item>
        <text:list-item>
          <text:p text:style-name="P16">make a pass when the coach calls "Pass!" </text:p>
        </text:list-item>
      </text:list>
      <text:p text:style-name="Text_20_body">No tackling.</text:p>
      <text:p text:style-name="Text_20_body">No pushing.</text:p>
      <text:h text:style-name="P17" text:outline-level="4"><draw:frame draw:style-name="fr1" draw:name="Frame33" text:anchor-type="paragraph" svg:x="-0.026cm" svg:width="17cm" style:rel-width="100%" draw:z-index="5"><draw:text-box fo:min-height="0.041cm"><text:h text:style-name="Heading_20_3" text:outline-level="4">🎯 C<text:span text:style-name="T5">oaching Point</text:span></text:h><text:list text:style-name="L8"><text:list-item><text:p text:style-name="P18"><text:span text:style-name="T5">S</text:span>ide-on body position. </text:p></text:list-item><text:list-item><text:p text:style-name="P19">Bend knees slightly. </text:p></text:list-item><text:list-item><text:p text:style-name="P19">Use your arms naturally for balance (not pushing). </text:p></text:list-item><text:list-item><text:p text:style-name="P19">Keep the ball on the far side. </text:p></text:list-item><text:list-item><text:p text:style-name="P20">Scan before turning. </text:p></text:list-item></text:list></draw:text-box></draw:frame><draw:frame draw:style-name="fr3" draw:name="Frame34" text:anchor-type="paragraph" svg:x="-0.081cm" svg:y="4.748cm" svg:width="17.069cm" draw:z-index="6"><draw:text-box fo:min-height="1.951cm"><text:h text:style-name="Heading_20_3" text:outline-level="4">⚠ <text:span text:style-name="T6">Common Mistakes</text:span></text:h><text:list text:style-name="L9"><text:list-item><text:p text:style-name="P21">Looking only at the ball. </text:p></text:list-item><text:list-item><text:p text:style-name="P21">Turning into pressure. </text:p></text:list-item><text:list-item><text:p text:style-name="P22">Standing upright. </text:p></text:list-item></text:list></draw:text-box></draw:frame><text:soft-page-break/><text:line-break/></text:h>
      <text:h text:style-name="Heading_20_2" text:outline-level="3">Practice Drill – Walking Football Rondo</text:h>
      <text:h text:style-name="Heading_20_3" text:outline-level="4">Objective</text:h>
      <text:p text:style-name="Text_20_body">Develop accurate passing, controlled receiving and simple shielding under light pressure.</text:p>
      <text:h text:style-name="Heading_20_3" text:outline-level="4">Equipment</text:h>
      <text:list text:style-name="L10">
        <text:list-item>
          <text:p text:style-name="P23">4 cones </text:p>
        </text:list-item>
        <text:list-item>
          <text:p text:style-name="P23">1 football </text:p>
        </text:list-item>
      </text:list>
      <text:h text:style-name="Heading_20_3" text:outline-level="4">Players</text:h>
      <text:p text:style-name="Text_20_body">5</text:p>
      <text:list text:style-name="L11">
        <text:list-item>
          <text:p text:style-name="P24">4 attackers </text:p>
        </text:list-item>
        <text:list-item>
          <text:p text:style-name="P24">1 defender </text:p>
        </text:list-item>
      </text:list>
      <text:h text:style-name="Heading_20_3" text:outline-level="4">Setup</text:h>
      <text:p text:style-name="Text_20_body">Create a square approximately <text:span text:style-name="Strong_20_Emphasis">8 × 8 metres</text:span>.</text:p>
      <text:p text:style-name="Text_20_body">One attacker stands on each side of the square.</text:p>
      <text:p text:style-name="Text_20_body">One defender starts in the middle.</text:p>
      <text:section text:style-name="Sect1" text:name="code-block-viewer">
        <text:p text:style-name="Text_20_body"><text:span text:style-name="Source_20_Text"><text:s text:c="11"/>A</text:span></text:p>
        <text:p text:style-name="Text_20_body"/>
        <text:p text:style-name="Text_20_body"><text:span text:style-name="Source_20_Text"><text:s text:c="6"/>+---------+</text:span></text:p>
        <text:p text:style-name="Text_20_body"><text:span text:style-name="Source_20_Text"><text:s text:c="6"/>| <text:s text:c="8"/>|</text:span></text:p>
        <text:p text:style-name="Text_20_body"><text:span text:style-name="Source_20_Text"><text:s text:c="2"/>A <text:s text:c="2"/>| <text:s text:c="3"/>D <text:s text:c="3"/>| <text:s text:c="2"/>A</text:span></text:p>
        <text:p text:style-name="Text_20_body"><text:span text:style-name="Source_20_Text"><text:s text:c="6"/>| <text:s text:c="8"/>|</text:span></text:p>
        <text:p text:style-name="Text_20_body"><text:span text:style-name="Source_20_Text"><text:s text:c="6"/>+---------+</text:span></text:p>
        <text:p text:style-name="Text_20_body"/>
        <text:p text:style-name="Text_20_body"><text:span text:style-name="Source_20_Text"><text:s text:c="11"/>A</text:span></text:p>
      </text:section>
      <text:p text:style-name="Text_20_body">The outside players should stay on their own side of the square. </text:p>
      <text:p text:style-name="Text_20_body">They may move sideways along that side to create an angle. </text:p>
      <text:p text:style-name="Text_20_body"><text:soft-page-break/>The defender remains inside the square. </text:p>
      <text:h text:style-name="Heading_20_3" text:outline-level="4">Instructions</text:h>
      <text:p text:style-name="Text_20_body">The outside players keep possession. </text:p>
      <text:p text:style-name="Text_20_body">The defender attempts to intercept the ball. </text:p>
      <text:p text:style-name="Text_20_body">Walking only. </text:p>
      <text:p text:style-name="Text_20_body">No tackling from behind. </text:p>
      <text:p text:style-name="Text_20_body">If the defender wins the ball or forces it out of the square, they swap with the player responsible for losing possession. </text:p>
      <text:p text:style-name="Text_20_body"/>
      <text:h text:style-name="Heading_20_3" text:outline-level="4"><draw:frame draw:style-name="fr1" draw:name="Frame30" text:anchor-type="paragraph" svg:x="-0.026cm" svg:width="17cm" style:rel-width="100%" draw:z-index="3"><draw:text-box fo:min-height="0.041cm"><text:h text:style-name="Heading_20_3" text:outline-level="4">🎯 COACHING POINT </text:h><text:list text:style-name="L12"><text:list-item><text:p text:style-name="P25">Receive with an open body</text:p></text:list-item><text:list-item><text:p text:style-name="P25">Look before the ball arrives</text:p></text:list-item><text:list-item><text:p text:style-name="P25">Pass with the inside of the foot</text:p></text:list-item><text:list-item><text:p text:style-name="P25">Keep passes firm but controlled</text:p></text:list-item><text:list-item><text:p text:style-name="P25">Move a step or two after passing to create a new angle</text:p></text:list-item><text:list-item><text:p text:style-name="P25">If under pressure, shield the ball before passing</text:p></text:list-item></text:list></draw:text-box></draw:frame><draw:frame draw:style-name="fr4" draw:name="Frame31" text:anchor-type="paragraph" svg:x="-0.026cm" svg:y="5.239cm" svg:width="17.069cm" draw:z-index="4"><draw:text-box fo:min-height="1.951cm"><text:h text:style-name="Heading_20_3" text:outline-level="4">⚠ <text:span text:style-name="T7">Common Mistakes</text:span></text:h><text:list text:style-name="L13"><text:list-item><text:p text:style-name="P26">Standing still after passing</text:p></text:list-item><text:list-item><text:p text:style-name="P26">Watching the ball instead of scanning</text:p></text:list-item><text:list-item><text:p text:style-name="P26">Passing too hard</text:p></text:list-item><text:list-item><text:p text:style-name="P27">Heavy first touch </text:p></text:list-item><text:list-item><text:p text:style-name="P27">Turning into the defender</text:p></text:list-item></text:list></draw:text-box></draw:frame><text:line-break/><text:line-break/>Progressions</text:h>
      <text:h text:style-name="Heading_20_4" text:outline-level="5">Level 1</text:h>
      <text:p text:style-name="Text_20_body">Unlimited touches.</text:p>
      <text:h text:style-name="Heading_20_4" text:outline-level="5">Level 2</text:h>
      <text:p text:style-name="Text_20_body">Maximum three touches.</text:p>
      <text:h text:style-name="Heading_20_4" text:outline-level="5">Level 3</text:h>
      <text:p text:style-name="Text_20_body">Maximum two touches.</text:p>
      <text:h text:style-name="Heading_20_4" text:outline-level="5">Level 4</text:h>
      <text:p text:style-name="Text_20_body">Award one bonus point if a player successfully:</text:p>
      <text:list text:style-name="L14">
        <text:list-item>
          <text:p text:style-name="P28">shields the ball, </text:p>
        </text:list-item>
        <text:list-item>
          <text:p text:style-name="P28">then completes the next pass. </text:p>
        </text:list-item>
      </text:list>
      <text:h text:style-name="Heading_20_3" text:outline-level="4"><draw:frame draw:style-name="fr1" draw:name="Frame29" text:anchor-type="paragraph" svg:x="-0.026cm" svg:width="17cm" style:rel-width="100%" draw:z-index="2"><draw:text-box fo:min-height="0.041cm"><text:h text:style-name="Heading_20_3" text:outline-level="4">🎯 COACHING POINT </text:h><text:p text:style-name="Text_20_body">Coaching Challenge</text:p><text:p text:style-name="Text_20_body">Ask players to think before every reception:</text:p><text:p text:style-name="Text_20_body"><text:span text:style-name="Strong_20_Emphasis"><text:tab/>Can I pass first time?</text:span></text:p><text:p text:style-name="Text_20_body">If not:</text:p><text:p text:style-name="Text_20_body"><text:span text:style-name="Strong_20_Emphasis"><text:tab/>Can I protect the ball with my body?<text:line-break/></text:span><text:span text:style-name="Strong_20_Emphasis"><text:span text:style-name="T8">If</text:span></text:span><text:span text:style-name="Strong_20_Emphasis"><text:span text:style-name="T3"> still no:</text:span></text:span></text:p><text:p text:style-name="Text_20_body"><text:span text:style-name="Strong_20_Emphasis"><text:tab/>Where is my next safe pass?</text:span></text:p></draw:text-box></draw:frame><text:soft-page-break/><text:span text:style-name="Strong_20_Emphasis"><text:line-break/></text:span>Why this drill works</text:h>
      <text:p text:style-name="Text_20_body">This single exercise develops all three skills you've introduced:</text:p>
      <text:list text:style-name="L15">
        <text:list-item>
          <text:p text:style-name="P29"><text:span text:style-name="Strong_20_Emphasis">Passing</text:span> – choosing the correct weight and direction of pass</text:p>
          <text:p text:style-name="P29"><text:span text:style-name="Strong_20_Emphasis">Receiving</text:span> – taking the first touch into space rather than stopping the ball dead</text:p>
        </text:list-item>
        <text:list-item>
          <text:p text:style-name="P29"><text:span text:style-name="Strong_20_Emphasis">Shielding</text:span> – using body position to protect the ball when the defender gets close</text:p>
        </text:list-item>
      </text:list>
      <text:p text:style-name="Text_20_body">It also introduces two new concepts naturally:</text:p>
      <text:list text:style-name="L16">
        <text:list-item>
          <text:p text:style-name="P30"><text:span text:style-name="Strong_20_Emphasis">Creating angles</text:span> by moving after passing</text:p>
        </text:list-item>
        <text:list-item>
          <text:p text:style-name="P30"><text:span text:style-name="Strong_20_Emphasis">Scanning</text:span> before receiving so the next action is already planned</text:p>
        </text:list-item>
      </text:list>
      <text:p text:style-name="Text_20_body">I think this is an excellent first rondo for a beginner walking football group because it's simple to explain, everyone is involved, and it creates lots of repetitions without feeling like a repetitive drill. It would fit perfectly near the end of your session before the cool-down, when players are ready to combine the individual techniques they've just practised.</text:p>
      <text:h text:style-name="Heading_20_2" text:outline-level="3"><text:span text:style-name="T9">Match Practice </text:span>(10 minutes)</text:h>
      <text:h text:style-name="Heading_20_3" text:outline-level="4">4 v 4</text:h>
      <text:p text:style-name="Text_20_body">Rules:</text:p>
      <text:list text:style-name="L17">
        <text:list-item>
          <text:p text:style-name="P31">Walking only</text:p>
        </text:list-item>
        <text:list-item>
          <text:p text:style-name="P31"><text:span text:style-name="T9">Receive the ball with your first touch under control</text:span> </text:p>
        </text:list-item>
        <text:list-item>
          <text:p text:style-name="P31"><text:span text:style-name="T9">Give yourself a pat on the back </text:span>for receiving on the back foot</text:p>
        </text:list-item>
        <text:list-item>
          <text:p text:style-name="P32"><text:span text:style-name="T9">Also for </text:span>shielding successfully before passing</text:p>
        </text:list-item>
      </text:list>
      <text:p text:style-name="Text_20_body">This encourages players to use everything they've just practised.</text:p>
      <text:h text:style-name="Heading_20_2" text:outline-level="3">Cool Down (5 minutes)</text:h>
      <text:p text:style-name="Text_20_body">Gentle walking.</text:p>
      <text:p text:style-name="Text_20_body">Light stretches.</text:p>
      <text:p text:style-name="Text_20_body">Ask:</text:p>
      <text:list text:style-name="L18">
        <text:list-item>
          <text:p text:style-name="P33">What was easiest? </text:p>
        </text:list-item>
        <text:list-item>
          <text:p text:style-name="P33">What was hardest? </text:p>
        </text:list-item>
        <text:list-item>
          <text:p text:style-name="P34">What will you practise this week? </text:p>
        </text:list-item>
      </text:list>
      <text:p text:style-name="P35"/>
      <text:h text:style-name="P36" text:outline-level="2"><draw:frame draw:style-name="fr5" draw:name="Frame28" text:anchor-type="paragraph" svg:x="0cm" svg:y="0cm" svg:width="17cm" style:rel-width="100%" draw:z-index="1"><draw:text-box fo:min-height="0.041cm"><text:h text:style-name="Heading_20_3" text:outline-level="4">📋 <text:span text:style-name="T10">SESSION SUMMARY</text:span></text:h><text:p text:style-name="P35">By the end of the session players should:</text:p><text:list text:style-name="L19"><text:list-item><text:p text:style-name="P37">Pass accurately over short distances.</text:p></text:list-item><text:list-item><text:p text:style-name="P37">Receive with a controlled first touch.</text:p></text:list-item><text:list-item><text:p text:style-name="P37">Protect the ball under light pressure.</text:p></text:list-item><text:list-item><text:p text:style-name="P37">Understand when to shield instead of forcing a pass.</text:p></text:list-item></text:list></draw:text-box></draw:frame><text:soft-page-break/></text:h>
      <text:p text:style-name="Standard"><draw:frame draw:style-name="fr6" draw:name="Frame27" text:anchor-type="paragraph" svg:x="0cm" svg:y="0cm" svg:width="17cm" style:rel-width="100%" draw:z-index="0"><draw:text-box fo:min-height="1.981cm"><text:p text:style-name="myNotes">📝 <text:span text:style-name="T5">While </text:span><text:span text:style-name="T11">coaching this session</text:span></text:p><text:p text:style-name="myNotes"><text:span text:style-name="T5">K</text:span>eep coming back to <text:span text:style-name="Strong_20_Emphasis">one phrase</text:span> throughout the hour:</text:p><text:p text:style-name="myNotes"><text:span text:style-name="Strong_20_Emphasis">Receive. Protect. Pass.</text:span></text:p><text:p text:style-name="myNotes">Every exercise reinforces that sequence:</text:p><text:list text:style-name="L20"><text:list-item><text:p text:style-name="P38"><text:span text:style-name="Strong_20_Emphasis">Receive</text:span> with a good first touch. </text:p></text:list-item><text:list-item><text:p text:style-name="P39"><text:span text:style-name="Strong_20_Emphasis">Protect</text:span> the ball if under pressure. </text:p></text:list-item><text:list-item><text:p text:style-name="P39"><text:span text:style-name="Strong_20_Emphasis">Pass</text:span> accurately to a teammate. </text:p></text:list-item></text:list><text:p text:style-name="myNotes">For beginners, repeating that simple cycle helps them connect the individual skills into what actually happens during a match, rather than seeing passing, receiving and shielding as separate techniques. I think it would also make a great title for the chapter in your coaching manual.</text:p></draw:text-box></draw:frame></text:p>
      <text:h text:style-name="P40" text:outline-level="1"/>
      <text:h text:style-name="P41" text:outline-level="1"/>
      <text:h text:style-name="P42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Calibri1" svg:font-family="Calibri" style:font-adornments="Bold" style:font-family-generic="swiss"/>
    <style:font-face style:name="Calibri2" svg:font-family="Calibri" style:font-adornments="Regular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Patrick Hand" svg:font-family="'Patrick Hand'" style:font-adornments="Bold Italic" style:font-pitch="variable"/>
    <style:font-face style:name="Patrick Hand1" svg:font-family="'Patrick Hand'" style:font-adornments="Regular" style:font-pitch="variable"/>
    <style:font-face style:name="Tahoma" svg:font-family="Tahoma"/>
    <style:font-face style:name="Tahoma1" svg:font-family="Tahoma" style:font-adornments="Bold" style:font-family-generic="swiss"/>
    <style:font-face style:name="Tahoma2" svg:font-family="Tahoma" style:font-adornments="Regular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en" fo:country="GB" style:letter-kerning="true" style:font-name-asian="DejaVu Sans" style:font-size-asian="12pt" style:language-asian="zxx" style:country-asian="none" style:font-name-complex="Noto Sans Arabic UI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fo:color="#000000" loext:opacity="100%" style:font-name="Liberation Serif" fo:font-size="12pt" fo:language="en" fo:country="GB" style:letter-kerning="true" style:font-name-asian="DejaVu Sans" style:font-size-asian="12pt" style:language-asian="zxx" style:country-asian="none" style:font-name-complex="Noto Sans Arabic UI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loext:hidden="true" style:hidden="true" style:class="text">
      <style:text-properties style:font-name="Calibri2" fo:font-family="Calibri" style:font-style-name="Regular" style:font-family-generic="swiss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fo:color="#7a1f1f" loext:opacity="100%" style:font-name="Tahoma2" fo:font-family="Tahoma" style:font-style-name="Regular" style:font-family-generic="swiss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15%"/>
      <style:text-properties style:font-name="Calibri2" fo:font-family="Calibri" style:font-style-name="Regular" style:font-family-generic="swiss" fo:font-size="11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Text_20_body" style:class="extra">
      <style:paragraph-properties fo:margin-top="0.199cm" fo:margin-bottom="0.199cm" style:contextual-spacing="false"/>
      <style:text-properties fo:color="#666666" loext:opacity="100%" style:font-name="Calibri" fo:font-family="Calibri" fo:font-size="9pt"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2" fo:font-family="Calibri" style:font-style-name="Regular" style:font-family-generic="swiss" fo:font-size="11pt"/>
    </style:style>
    <style:style style:name="Heading_20_1" style:display-name="Heading 1" style:family="paragraph" style:parent-style-name="Heading" style:next-style-name="Text_20_body" style:default-outline-level="2" style:class="chapter">
      <style:paragraph-properties fo:margin-top="0.3cm" fo:margin-bottom="0.6cm" style:contextual-spacing="false"/>
      <style:text-properties fo:color="#7a1f1f" loext:opacity="100%" style:font-name="Tahoma1" fo:font-family="Tahoma" style:font-style-name="Bold" style:font-family-generic="swiss" fo:font-size="16pt" fo:font-weight="bold" style:font-size-asian="18pt" style:font-weight-asian="bold" style:font-size-complex="18pt" style:font-weight-complex="600"/>
    </style:style>
    <style:style style:name="Heading_20_2" style:display-name="Heading 2" style:family="paragraph" style:parent-style-name="Heading" style:next-style-name="Text_20_body" style:default-outline-level="3" style:class="chapter">
      <style:paragraph-properties fo:margin-top="0.101cm" fo:margin-bottom="0.4cm" style:contextual-spacing="false"/>
      <style:text-properties fo:font-size="16pt" fo:font-weight="normal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4" style:class="chapter">
      <style:paragraph-properties fo:margin-top="0.101cm" fo:margin-bottom="0.4cm" style:contextual-spacing="false"/>
      <style:text-properties fo:font-size="12pt" fo:font-weight="bold" style:font-size-asian="14pt" style:font-weight-asian="bold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color="#999999" loext:opacity="100%" style:font-name="Patrick Hand1" fo:font-family="'Patrick Hand'" style:font-style-name="Regular" style:font-pitch="variable"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ook_20_Title" style:display-name="Book Title" style:family="paragraph" style:master-page-name="">
      <style:paragraph-properties fo:margin-left="0cm" fo:margin-right="0cm" fo:margin-top="0cm" fo:margin-bottom="0.6cm" style:contextual-spacing="false" fo:text-align="center" style:justify-single-word="false" fo:text-indent="0cm" style:auto-text-indent="false" style:page-number="auto" fo:break-before="auto" fo:break-after="auto" fo:keep-with-next="always"/>
      <style:text-properties fo:color="#729fcf" loext:opacity="100%" style:font-name="Tahoma" fo:font-family="Tahoma" fo:font-size="22pt" fo:font-weight="bold"/>
    </style:style>
    <style:style style:name="Behaviour" style:family="paragraph" style:parent-style-name="Panel_20_Heading" style:master-page-name="">
      <loext:graphic-properties draw:fill="solid" draw:fill-color="#b4c7dc"/>
      <style:paragraph-properties fo:margin-left="0.3cm" fo:margin-right="0.3cm" fo:margin-top="0.101cm" fo:margin-bottom="0.101cm" style:contextual-spacing="false" fo:text-indent="0cm" style:auto-text-indent="false" style:page-number="auto" fo:background-color="#b4c7dc" fo:padding-left="0.3cm" fo:padding-right="0.3cm" fo:padding-top="0.15cm" fo:padding-bottom="0.15cm" fo:border="1.5pt solid #5983b0" style:join-border="true">
        <style:tab-stops/>
      </style:paragraph-properties>
      <style:text-properties fo:color="#1565c0" loext:opacity="100%" style:font-name="Calibri" fo:font-family="Calibri" fo:font-size="11pt" fo:font-weight="normal"/>
    </style:style>
    <style:style style:name="Principle" style:family="paragraph" style:parent-style-name="Panel_20_Heading">
      <loext:graphic-properties draw:fill="solid" draw:fill-color="#81aca6"/>
      <style:paragraph-properties fo:background-color="#81aca6" fo:padding-left="0.3cm" fo:padding-right="0.3cm" fo:padding-top="0.199cm" fo:padding-bottom="0.15cm" fo:border="1.5pt solid #168253"/>
      <style:text-properties fo:color="#2e7d32" loext:opacity="100%" style:font-name="Calibri" fo:font-family="Calibri" fo:font-size="11pt" fo:font-weight="normal"/>
    </style:style>
    <style:style style:name="myNotes" style:family="paragraph">
      <loext:graphic-properties draw:fill="none" draw:fill-color="#ffde59"/>
      <style:paragraph-properties fo:margin-left="0cm" fo:margin-right="0cm" fo:margin-top="0cm" fo:margin-bottom="0cm" style:contextual-spacing="false" fo:text-indent="0cm" style:auto-text-indent="false" fo:background-color="transparent" fo:padding="0.3cm" fo:border="none" style:shadow="none"/>
      <style:text-properties fo:color="#2a6099" loext:opacity="100%" style:font-name="Patrick Hand" fo:font-family="'Patrick Hand'" style:font-style-name="Bold Italic" style:font-pitch="variable" fo:font-size="14pt" fo:font-style="normal" fo:font-weight="normal"/>
    </style:style>
    <style:style style:name="Warning" style:family="paragraph" style:parent-style-name="Panel_20_Heading">
      <loext:graphic-properties draw:fill="solid" draw:fill-color="#cccccc"/>
      <style:paragraph-properties fo:margin-top="0.199cm" fo:margin-bottom="0.199cm" style:contextual-spacing="false" fo:background-color="#cccccc" fo:padding-left="0.3cm" fo:padding-right="0.3cm" fo:padding-top="0.15cm" fo:padding-bottom="0.15cm" fo:border="1.5pt solid #666666"/>
      <style:text-properties fo:color="#666666" loext:opacity="100%" style:font-name="Calibri" fo:font-family="Calibri" fo:font-size="11pt" fo:font-weight="normal"/>
    </style:style>
    <style:style style:name="Tip" style:family="paragraph" style:parent-style-name="Panel_20_Heading">
      <loext:graphic-properties draw:fill="solid" draw:fill-color="#ffe994"/>
      <style:paragraph-properties fo:margin-top="0.199cm" fo:margin-bottom="0.199cm" style:contextual-spacing="false" fo:background-color="#ffe994" fo:padding-left="0.3cm" fo:padding-right="0.3cm" fo:padding-top="0.199cm" fo:padding-bottom="0.15cm" fo:border="1.5pt solid #8a6d00"/>
      <style:text-properties fo:color="#8a6d00" loext:opacity="100%" style:font-name="Calibri" fo:font-family="Calibri" fo:font-size="11pt" fo:font-weight="normal"/>
    </style:style>
    <style:style style:name="RevisionNote" style:family="paragraph" style:parent-style-name="Text_20_body">
      <style:paragraph-properties fo:margin-top="0.199cm" fo:margin-bottom="0cm" style:contextual-spacing="false"/>
      <style:text-properties fo:color="#c62828" loext:opacity="100%" style:font-name="Calibri" fo:font-family="Calibri" fo:font-size="10pt" fo:font-style="italic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Calibri1" fo:font-family="Calibri" style:font-style-name="Bold" style:font-family-generic="swiss" fo:font-size="12pt" fo:font-weight="normal" style:font-size-asian="16pt" style:font-weight-asian="bold" style:font-size-complex="16pt" style:font-weight-complex="600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style:font-name="Calibri1" fo:font-family="Calibri" style:font-style-name="Bold" style:font-family-generic="swiss" fo:font-size="14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margin-top="0.6cm" fo:margin-bottom="0.199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ahoma2" fo:font-family="Tahoma" style:font-style-name="Regular" style:font-family-generic="swiss" fo:font-size="14pt" fo:font-weight="bold"/>
    </style:style>
    <style:style style:name="Heading_20_4" style:display-name="Heading 4" style:family="paragraph" style:parent-style-name="Heading" style:next-style-name="Text_20_body" style:default-outline-level="5" style:class="chapter">
      <style:paragraph-properties fo:margin-top="0cm" fo:margin-bottom="0.3cm" style:contextual-spacing="false"/>
      <style:text-properties fo:font-size="12pt" fo:font-style="normal" fo:font-weight="normal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6" style:class="chapter">
      <style:paragraph-properties fo:margin-top="0cm" fo:margin-bottom="0.3cm" style:contextual-spacing="false"/>
      <style:text-properties fo:color="#000000" loext:opacity="100%" fo:font-size="12pt" fo:font-weight="normal" style:font-size-asian="12pt" style:font-weight-asian="bold" style:font-size-complex="12pt" style:font-weight-complex="600"/>
    </style:style>
    <style:style style:name="Heading_20_6" style:display-name="Heading 6" style:family="paragraph" style:parent-style-name="Heading" style:next-style-name="Text_20_body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99cm" fo:margin-bottom="0.101cm" style:contextual-spacing="false" fo:text-indent="0cm" style:auto-text-indent="false">
        <style:tab-stops>
          <style:tab-stop style:position="17cm" style:type="right"/>
        </style:tab-stops>
      </style:paragraph-properties>
      <style:text-properties fo:font-size="14pt"/>
    </style:style>
    <style:style style:name="Contents_20_3" style:display-name="Contents 3" style:family="paragraph" style:parent-style-name="Index" style:class="index">
      <style:paragraph-properties fo:margin-left="1cm" fo:margin-right="0cm" fo:margin-top="0.101cm" fo:margin-bottom="0.101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11pt" fo:font-weight="normal"/>
    </style:style>
    <style:style style:name="Contents_20_4" style:display-name="Contents 4" style:family="paragraph" style:parent-style-name="Index" style:class="index">
      <style:paragraph-properties fo:margin-left="1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nel_20_Heading" style:display-name="Panel Heading" style:family="paragraph" style:auto-update="true">
      <loext:graphic-properties draw:fill="solid" draw:fill-color="#729fcf"/>
      <style:paragraph-properties fo:margin-left="0.4cm" fo:margin-right="0.3cm" fo:margin-top="0.101cm" fo:margin-bottom="0.101cm" style:contextual-spacing="false" fo:text-indent="0cm" style:auto-text-indent="false" fo:background-color="#729fcf" fo:padding-left="0.199cm" fo:padding-right="0.199cm" fo:padding-top="0.15cm" fo:padding-bottom="0.15cm" fo:border="1.5pt solid #000000"/>
      <style:text-properties style:font-name="Tahoma2" fo:font-family="Tahoma" style:font-style-name="Regular" style:font-family-generic="swiss" fo:font-size="11pt" fo:font-weight="normal"/>
    </style:style>
    <style:style style:name="Analysis" style:family="paragraph" style:parent-style-name="Panel_20_Heading">
      <loext:graphic-properties draw:fill="solid" draw:fill-color="#e0c2cd"/>
      <style:paragraph-properties fo:margin-left="0.3cm" fo:margin-right="0.3cm" fo:margin-top="0.101cm" fo:margin-bottom="0.101cm" style:contextual-spacing="false" fo:text-indent="0cm" style:auto-text-indent="false" fo:background-color="#e0c2cd" fo:padding-left="0.3cm" fo:padding-right="0.3cm" fo:padding-top="0.199cm" fo:padding-bottom="0.15cm" fo:border="1.5pt solid #8d1d75"/>
      <style:text-properties fo:color="#8d1d75" loext:opacity="100%" fo:font-weight="normal"/>
    </style:style>
    <style:style style:name="Example" style:family="paragraph" style:parent-style-name="Panel_20_Heading">
      <loext:graphic-properties draw:fill="solid" draw:fill-color="#e8f2a1"/>
      <style:paragraph-properties fo:margin-top="0.101cm" fo:margin-bottom="0.101cm" style:contextual-spacing="false" fo:background-color="#e8f2a1" fo:padding-left="0.3cm" fo:padding-right="0.3cm" fo:padding-top="0.199cm" fo:padding-bottom="0.15cm" fo:border="1.5pt solid #468a1a"/>
      <style:text-properties fo:color="#468a1a" loext:opacity="100%" fo:font-weight="normal"/>
    </style:style>
    <style:style style:name="Book_20_Subtitle" style:display-name="Book Subtitle" style:family="paragraph" style:parent-style-name="Book_20_Title" style:master-page-name="">
      <style:paragraph-properties fo:margin-left="0cm" fo:margin-right="0cm" fo:margin-top="0cm" fo:margin-bottom="0.4cm" style:contextual-spacing="false" fo:text-indent="0cm" style:auto-text-indent="false" style:page-number="auto" fo:break-before="auto" fo:break-after="auto" fo:keep-with-next="auto"/>
      <style:text-properties fo:color="#729fcf" loext:opacity="100%" style:font-name="Tahoma" fo:font-family="Tahoma" fo:font-size="18pt" fo:font-weight="normal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fo:font-size="10pt"/>
    </style:style>
    <style:style style:name="Parking_20_Lot" style:display-name="Parking Lot" style:family="paragraph" style:parent-style-name="Panel_20_Heading">
      <loext:graphic-properties draw:fill="solid" draw:fill-color="#ffb66c"/>
      <style:paragraph-properties fo:background-color="#ffb66c" fo:padding-left="0.199cm" fo:padding-right="0.199cm" fo:padding-top="0.15cm" fo:padding-bottom="0.15cm" fo:border="1.5pt solid #ea7500"/>
      <style:text-properties fo:color="#ea7500" loext:opacity="100%"/>
    </style:style>
    <style:style style:name="Frame_20_contents" style:display-name="Frame contents" style:family="paragraph" style:parent-style-name="Standard" style:class="extra"/>
    <style:style style:name="Note_20_Title" style:display-name="Note Title" style:family="paragraph" style:parent-style-name="myNotes">
      <loext:graphic-properties draw:fill="none" draw:fill-color="#729fcf"/>
      <style:paragraph-properties fo:margin-left="0cm" fo:margin-right="0cm" fo:margin-top="0cm" fo:margin-bottom="0cm" style:contextual-spacing="true" fo:text-indent="0cm" style:auto-text-indent="false" fo:background-color="transparent" fo:padding="0.3cm" fo:border="none" style:join-border="false"/>
      <style:text-properties fo:font-weight="bold"/>
    </style:style>
    <style:style style:name="Note_20_Text" style:display-name="Note Text" style:family="paragraph" style:parent-style-name="Note_20_Title" style:auto-update="true" style:master-page-name="">
      <loext:graphic-properties draw:fill="none" draw:fill-color="#729fcf"/>
      <style:paragraph-properties fo:margin-top="0cm" fo:margin-bottom="0cm" style:contextual-spacing="true" fo:line-height="0.42cm" style:register-true="false" style:page-number="auto" fo:background-color="transparent">
        <style:tab-stops/>
      </style:paragraph-properties>
      <style:text-properties fo:font-weight="normal"/>
    </style:style>
    <style:style style:name="Appendix" style:family="paragraph" style:parent-style-name="Heading" style:next-style-name="Text_20_body" style:default-outline-level="1" style:list-style-name="" style:class="chapter" style:master-page-name="">
      <style:paragraph-properties fo:text-align="center" style:justify-single-word="false" style:page-number="auto" fo:break-before="auto" fo:break-after="auto"/>
      <style:text-properties fo:color="#729fcf" loext:opacity="100%" fo:font-size="24pt" fo:font-weight="bold" style:font-size-asian="16pt" style:font-weight-asian="bold" style:font-size-complex="16pt" style:font-weight-complex="600"/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default-outline-level="1" style:list-style-name="" style:class="chapter" style:master-page-name="">
      <style:paragraph-properties fo:text-align="center" style:justify-single-word="false" style:page-number="auto"/>
      <style:text-properties fo:color="#729fcf" loext:opacity="100%" fo:font-size="24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auto-update="true" style:class="chapter" style:master-page-name="">
      <style:paragraph-properties fo:margin-top="0.3cm" fo:margin-bottom="0.3cm" style:contextual-spacing="false" fo:text-align="center" style:justify-single-word="false" style:page-number="auto"/>
      <style:text-properties fo:color="#999999" loext:opacity="100%" fo:font-size="18pt" style:font-size-asian="18pt" style:font-size-complex="18pt"/>
    </style:style>
    <style:style style:name="Header_20_right" style:display-name="Header right" style:family="paragraph" style:parent-style-name="Header" style:class="extra">
      <style:paragraph-properties fo:text-align="righ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righ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Centre" style:display-name="Footer Centre" style:family="paragraph" style:parent-style-name="Footer">
      <style:paragraph-properties fo:text-align="center" style:justify-single-word="false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1" style:family="paragraph">
      <style:text-properties fo:font-size="18pt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Card" style:family="graphic">
      <style:graphic-properties svg:width="17cm" style:rel-width="100%" fo:min-height="0.041cm" text:anchor-type="paragraph" svg:x="0cm" svg:y="0cm" fo:margin-left="0.199cm" fo:margin-right="0cm" style:wrap="none" style:vertical-pos="from-top" style:vertical-rel="page-content" style:horizontal-pos="from-left" style:horizontal-rel="page-content" fo:background-color="#b4c7dc" style:background-transparency="0%" draw:fill="solid" draw:fill-color="#b4c7dc" draw:gradient-step-count="0" draw:opacity="100%" fo:padding-left="0.3cm" fo:padding-right="0.3cm" fo:padding-top="0.199cm" fo:padding-bottom="0.199cm" fo:border-left="2.01pt solid #000000" fo:border-right="none" fo:border-top="none" fo:border-bottom="none" draw:wrap-influence-on-position="once-concurrent" loext:allow-overlap="true" loext:rel-width-rel="paragraph">
        <style:columns fo:column-count="1" fo:column-gap="0cm"/>
      </style:graphic-properties>
    </style:style>
    <style:style style:name="Example" style:family="graphic" style:parent-style-name="Card">
      <style:graphic-properties svg:width="17cm" style:rel-width="100%" fo:min-height="0.041cm" text:anchor-type="paragraph" fo:background-color="#dde8cb" style:background-transparency="0%" draw:fill="solid" draw:fill-color="#dde8cb" draw:opacity="100%" fo:padding-left="0.3cm" fo:padding-right="0.3cm" fo:padding-top="0.199cm" fo:padding-bottom="0.199cm" fo:border-left="2.01pt solid #3faf46" fo:border-right="none" fo:border-top="none" fo:border-bottom="none" loext:rel-width-rel="paragraph"/>
    </style:style>
    <style:style style:name="Session_20_Summary" style:display-name="Session Summary" style:family="graphic" style:parent-style-name="Card">
      <style:graphic-properties svg:width="17cm" style:rel-width="100%" fo:min-height="0.041cm" text:anchor-type="paragraph" fo:margin-left="0cm" fo:margin-right="0cm" fo:background-color="#ffb66c" style:background-transparency="0%" draw:fill="solid" draw:fill-color="#ffb66c" draw:opacity="100%" fo:padding-left="0.3cm" fo:padding-right="0.3cm" fo:padding-top="0.199cm" fo:padding-bottom="0.199cm" fo:border-left="2.01pt solid #ff860d" fo:border-right="none" fo:border-top="none" fo:border-bottom="none" loext:rel-width-rel="paragraph"/>
    </style:style>
    <style:style style:name="Analysis" style:family="graphic" style:parent-style-name="Card">
      <style:graphic-properties fo:background-color="#e0c2cd" style:background-transparency="0%" draw:fill="solid" draw:fill-color="#e0c2cd" draw:opacity="100%" fo:padding-left="0.3cm" fo:padding-right="0.3cm" fo:padding-top="0.199cm" fo:padding-bottom="0.199cm" fo:border-left="2.01pt solid #8d1d75" fo:border-right="none" fo:border-top="none" fo:border-bottom="none"/>
    </style:style>
    <style:style style:name="Coaching_20_Point" style:display-name="Coaching Point" style:family="graphic" style:parent-style-name="Card">
      <style:graphic-properties svg:width="17cm" style:rel-width="100%" fo:min-height="0.041cm" text:anchor-type="paragraph" svg:x="0cm" svg:y="0cm" style:wrap="none" style:vertical-pos="from-top" style:vertical-rel="page-content" style:horizontal-pos="from-left" style:horizontal-rel="page-content" fo:background-color="#b3cac7" style:background-transparency="0%" draw:fill="solid" draw:fill-color="#b3cac7" draw:opacity="100%" fo:padding-left="0.4cm" fo:padding-right="0.4cm" fo:padding-top="0.199cm" fo:padding-bottom="0.199cm" fo:border-left="2.01pt solid #50938a" fo:border-right="none" fo:border-top="none" fo:border-bottom="none" draw:wrap-influence-on-position="once-concurrent" loext:allow-overlap="true" loext:rel-width-rel="paragraph"/>
    </style:style>
    <style:style style:name="Warning" style:family="graphic" style:parent-style-name="Card">
      <style:graphic-properties svg:width="17cm" style:rel-width="100%" fo:min-height="0.041cm" text:anchor-type="paragraph" fo:margin-left="0cm" fo:margin-right="0cm" fo:background-color="#cccccc" style:background-transparency="0%" draw:fill="solid" draw:fill-color="#cccccc" draw:opacity="100%" fo:padding-left="0.3cm" fo:padding-right="0.3cm" fo:padding-top="0.199cm" fo:padding-bottom="0.199cm" fo:border-left="2.01pt solid #000000" fo:border-right="none" fo:border-top="none" fo:border-bottom="none" loext:rel-width-rel="paragraph">
        <style:columns fo:column-count="1" fo:column-gap="0cm"/>
      </style:graphic-properties>
    </style:style>
    <style:style style:name="Tip" style:family="graphic" style:parent-style-name="Card">
      <style:graphic-properties svg:width="17cm" style:rel-width="100%" fo:min-height="0.041cm" text:anchor-type="paragraph" fo:background-color="#ffe994" style:background-transparency="0%" draw:fill="solid" draw:fill-color="#ffe994" draw:opacity="100%" fo:padding-left="0.3cm" fo:padding-right="0.3cm" fo:padding-top="0.199cm" fo:padding-bottom="0.199cm" fo:border-left="2.01pt solid #e8a202" fo:border-right="none" fo:border-top="none" fo:border-bottom="none" loext:rel-width-rel="paragraph"/>
    </style:style>
    <style:style style:name="My_20_Notes" style:display-name="My Notes" style:family="graphic" style:parent-style-name="Card">
      <style:graphic-properties svg:width="17cm" style:rel-width="100%" fo:min-height="0.041cm" text:anchor-type="paragraph" fo:background-color="#ffe994" style:background-transparency="0%" draw:fill="solid" draw:fill-color="#ffe994" draw:opacity="100%" fo:padding-left="0.3cm" fo:padding-right="0cm" fo:padding-top="0.199cm" fo:padding-bottom="0.199cm" fo:border-left="2.01pt solid #e8a202" fo:border-right="none" fo:border-top="none" fo:border-bottom="none" loext:rel-width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4T11:51:52.674230292</meta:creation-date>
    <dc:date>2026-07-14T13:07:44.111279792</dc:date>
    <meta:editing-duration>PT13M31S</meta:editing-duration>
    <meta:editing-cycles>3</meta:editing-cycles>
    <meta:generator>LibreOffice/26.2.4.2$Linux_X86_64 LibreOffice_project/0229ac93fcf0d7cbc6376066c6f35021cef002dc</meta:generator>
    <meta:document-statistic meta:table-count="0" meta:image-count="0" meta:object-count="0" meta:page-count="7" meta:paragraph-count="193" meta:word-count="1025" meta:character-count="5689" meta:non-whitespace-character-count="4797"/>
  </office:meta>
</office:document-meta>
</file>