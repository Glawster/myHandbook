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chitects Daughter" svg:font-family="'Architects Daughter'" style:font-adornments="Regular" style:font-pitch="variable"/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automatic-styles>
    <style:style style:name="P1" style:family="paragraph" style:parent-style-name="Title">
      <style:text-properties officeooo:rsid="0021131f" officeooo:paragraph-rsid="0021131f"/>
    </style:style>
    <style:style style:name="P2" style:family="paragraph" style:parent-style-name="H1">
      <style:text-properties officeooo:paragraph-rsid="0021131f"/>
    </style:style>
    <style:style style:name="P3" style:family="paragraph" style:parent-style-name="Heading_20_2">
      <style:text-properties officeooo:paragraph-rsid="0021131f"/>
    </style:style>
    <style:style style:name="P4" style:family="paragraph" style:parent-style-name="Heading_20_5" style:list-style-name="L1" style:master-page-name="">
      <loext:graphic-properties draw:fill="none"/>
      <style:paragraph-properties fo:margin-top="0cm" fo:margin-bottom="0.3cm" style:contextual-spacing="false" style:page-number="auto" fo:background-color="transparent" fo:keep-with-next="always">
        <style:tab-stops/>
      </style:paragraph-properties>
    </style:style>
    <style:style style:name="P5" style:family="paragraph" style:parent-style-name="Heading_20_5" style:list-style-name="L1">
      <loext:graphic-properties draw:fill="none"/>
      <style:paragraph-properties fo:margin-top="0cm" fo:margin-bottom="0.3cm" style:contextual-spacing="false" fo:background-color="transparent" fo:keep-with-next="always">
        <style:tab-stops/>
      </style:paragraph-properties>
    </style:style>
    <style:style style:name="P6" style:family="paragraph" style:parent-style-name="Heading_20_3">
      <style:text-properties officeooo:paragraph-rsid="0021131f"/>
    </style:style>
    <style:style style:name="P7" style:family="paragraph" style:parent-style-name="Text_20_body">
      <style:text-properties officeooo:paragraph-rsid="0021131f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21131f"/>
    </style:style>
    <style:style style:name="P9" style:family="paragraph" style:parent-style-name="Text_20_body" style:list-style-name="L2">
      <style:text-properties officeooo:paragraph-rsid="0021131f"/>
    </style:style>
    <style:style style:name="P10" style:family="paragraph" style:parent-style-name="Heading_20_3">
      <style:text-properties officeooo:paragraph-rsid="001ca0fa"/>
    </style:style>
    <style:style style:name="P11" style:family="paragraph" style:parent-style-name="Text_20_body">
      <style:text-properties officeooo:paragraph-rsid="001ca0fa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paragraph-rsid="0021131f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rsid="0019a97c" officeooo:paragraph-rsid="0021131f"/>
    </style:style>
    <style:style style:name="P14" style:family="paragraph" style:parent-style-name="Text_20_body" style:list-style-name="L3">
      <style:text-properties officeooo:paragraph-rsid="0021131f"/>
    </style:style>
    <style:style style:name="P15" style:family="paragraph" style:parent-style-name="Frame_20_contents">
      <style:text-properties officeooo:rsid="001c6b26" officeooo:paragraph-rsid="001c6b26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paragraph-rsid="0021131f"/>
    </style:style>
    <style:style style:name="P17" style:family="paragraph" style:parent-style-name="Text_20_body" style:list-style-name="L4">
      <style:text-properties officeooo:paragraph-rsid="0021131f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officeooo:paragraph-rsid="0021131f"/>
    </style:style>
    <style:style style:name="P19" style:family="paragraph" style:parent-style-name="Text_20_body" style:list-style-name="L5">
      <style:text-properties officeooo:paragraph-rsid="0021131f"/>
    </style:style>
    <style:style style:name="P20" style:family="paragraph" style:parent-style-name="Heading_20_1" style:list-style-name="">
      <style:text-properties officeooo:paragraph-rsid="0021131f"/>
    </style:style>
    <style:style style:name="P21" style:family="paragraph" style:parent-style-name="Text_20_body">
      <style:text-properties officeooo:paragraph-rsid="0016291d"/>
    </style:style>
    <style:style style:name="P22" style:family="paragraph" style:parent-style-name="Text_20_body" style:list-style-name="L6">
      <style:text-properties officeooo:paragraph-rsid="0016291d"/>
    </style:style>
    <style:style style:name="P23" style:family="paragraph" style:parent-style-name="Standard">
      <style:text-properties officeooo:paragraph-rsid="0021131f"/>
    </style:style>
    <style:style style:name="P24" style:family="paragraph" style:parent-style-name="H1">
      <style:text-properties officeooo:rsid="0018c748" officeooo:paragraph-rsid="0021131f"/>
    </style:style>
    <style:style style:name="P25" style:family="paragraph" style:parent-style-name="Standard">
      <style:text-properties officeooo:rsid="0018c748" officeooo:paragraph-rsid="0021131f"/>
    </style:style>
    <style:style style:name="P26" style:family="paragraph" style:parent-style-name="Standard">
      <style:text-properties officeooo:paragraph-rsid="0021131f"/>
    </style:style>
    <style:style style:name="P27" style:family="paragraph" style:parent-style-name="Heading_20_3">
      <style:text-properties officeooo:rsid="0018875e"/>
    </style:style>
    <style:style style:name="P28" style:family="paragraph" style:parent-style-name="Text_20_body">
      <style:text-properties officeooo:paragraph-rsid="0021131f"/>
    </style:style>
    <style:style style:name="P29" style:family="paragraph" style:parent-style-name="Heading_20_3">
      <style:text-properties officeooo:rsid="0018c748" officeooo:paragraph-rsid="0018c748"/>
    </style:style>
    <style:style style:name="P30" style:family="paragraph" style:parent-style-name="Text_20_body">
      <style:text-properties officeooo:paragraph-rsid="001e831e"/>
    </style:style>
    <style:style style:name="P31" style:family="paragraph" style:parent-style-name="Text_20_body">
      <style:text-properties officeooo:rsid="001c6b26" officeooo:paragraph-rsid="001c6b26"/>
    </style:style>
    <style:style style:name="P32" style:family="paragraph" style:parent-style-name="Standard">
      <style:text-properties officeooo:paragraph-rsid="001e831e"/>
    </style:style>
    <style:style style:name="P33" style:family="paragraph" style:parent-style-name="Standard">
      <style:text-properties officeooo:paragraph-rsid="0018c748"/>
    </style:style>
    <style:style style:name="P34" style:family="paragraph" style:parent-style-name="Standard">
      <style:text-properties officeooo:rsid="0018c748" officeooo:paragraph-rsid="0018c748"/>
    </style:style>
    <style:style style:name="P35" style:family="paragraph" style:parent-style-name="Text_20_body">
      <style:text-properties officeooo:paragraph-rsid="001696d5"/>
    </style:style>
    <style:style style:name="P36" style:family="paragraph" style:parent-style-name="Heading_20_4">
      <style:text-properties officeooo:paragraph-rsid="001696d5"/>
    </style:style>
    <style:style style:name="T1" style:family="text">
      <style:text-properties officeooo:rsid="001f0a9d"/>
    </style:style>
    <style:style style:name="T2" style:family="text">
      <style:text-properties officeooo:rsid="0019a97c"/>
    </style:style>
    <style:style style:name="T3" style:family="text">
      <style:text-properties officeooo:rsid="0021131f"/>
    </style:style>
    <style:style style:name="T4" style:family="text">
      <style:text-properties officeooo:rsid="001b4d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0a9d" style:font-weight-asian="bold" style:font-weight-complex="bold"/>
    </style:style>
    <style:style style:name="T7" style:family="text">
      <style:text-properties officeooo:rsid="001822c3"/>
    </style:style>
    <style:style style:name="T8" style:family="text">
      <style:text-properties officeooo:rsid="001d1c84"/>
    </style:style>
    <style:style style:name="T9" style:family="text">
      <style:text-properties officeooo:rsid="000eaadb"/>
    </style:style>
    <style:style style:name="T10" style:family="text">
      <style:text-properties fo:font-weight="bold" officeooo:rsid="0021131f" style:font-weight-asian="bold" style:font-weight-complex="bold"/>
    </style:style>
    <style:style style:name="fr1" style:family="graphic" style:parent-style-name="Coaching_20_Point">
      <style:graphic-properties style:run-through="foreground" style:vertical-pos="top" style:vertical-rel="paragraph" style:horizontal-pos="from-left" style:horizontal-rel="paragraph" loext:rel-width-rel="paragraph"/>
    </style:style>
    <style:style style:name="fr2" style:family="graphic" style:parent-style-name="Warning">
      <style:graphic-properties fo:margin-left="0cm" fo:margin-right="0cm" style:vertical-pos="from-top" style:vertical-rel="paragraph" style:horizontal-pos="from-left" style:horizontal-rel="paragraph" style:flow-with-text="true"/>
    </style:style>
    <style:style style:name="fr3" style:family="graphic" style:parent-style-name="Session_20_Summary">
      <style:graphic-properties style:vertical-pos="from-top" style:vertical-rel="paragraph" style:horizontal-pos="from-left" style:horizontal-rel="paragraph" loext:rel-width-rel="paragraph"/>
    </style:style>
    <style:style style:name="fr4" style:family="graphic" style:parent-style-name="My_20_Notes">
      <style:graphic-properties fo:margin-left="0cm" fo:margin-right="0cm" style:vertical-pos="from-top" style:vertical-rel="paragraph" style:horizontal-pos="from-left" style:horizontal-rel="paragraph" draw:fill-color="#ffe994" fo:padding-left="0.3cm" fo:padding-right="0cm" fo:padding-top="0.199cm" fo:padding-bottom="0.199cm" fo:border-left="2.01pt solid #e8a202" fo:border-right="none" fo:border-top="none" fo:border-bottom="none" draw:wrap-influence-on-position="once-concurrent" loext:allow-overlap="false" loext:rel-width-rel="paragraph"/>
    </style:style>
    <style:style style:name="fr5" style:family="graphic" style:parent-style-name="Analysis">
      <style:graphic-properties style:vertical-pos="from-top" style:vertical-rel="paragraph" style:horizontal-pos="from-left" style:horizontal-rel="paragraph" style:flow-with-text="true" loext:rel-width-rel="paragraph"/>
    </style:style>
    <style:style style:name="fr6" style:family="graphic" style:parent-style-name="Card">
      <style:graphic-properties fo:margin-left="0cm" fo:margin-right="0cm" style:vertical-pos="from-top" style:vertical-rel="paragraph" style:horizontal-pos="from-left" style:horizontal-rel="paragraph" fo:padding-left="0.3cm" fo:padding-right="0.3cm" fo:padding-top="0.199cm" fo:padding-bottom="0.199cm" fo:border-left="2.01pt solid #000000" fo:border-right="none" fo:border-top="none" fo:border-bottom="none" style:flow-with-text="false" loext:rel-width-rel="paragraph"/>
    </style:style>
    <style:style style:name="fr7" style:family="graphic" style:parent-style-name="Example">
      <style:graphic-properties style:vertical-pos="from-top" style:vertical-rel="paragraph" style:horizontal-pos="from-left" style:horizontal-rel="paragraph" style:flow-with-text="true" loext:rel-width-rel="paragraph"/>
    </style:style>
    <style:style style:name="fr8" style:family="graphic" style:parent-style-name="Tip">
      <style:graphic-properties style:vertical-pos="from-top" style:vertical-rel="paragraph" style:horizontal-pos="from-left" style:horizontal-rel="paragraph" loext:rel-width-rel="paragraph"/>
    </style:style>
    <style:style style:name="fr9" style:family="graphic" style:parent-style-name="My_20_Notes">
      <style:graphic-properties fo:margin-left="0cm" fo:margin-right="0cm" style:vertical-pos="from-top" style:vertical-rel="paragraph" style:horizontal-pos="from-left" style:horizontal-rel="paragraph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ssion Title</text:h>
      <text:h text:style-name="P2" text:outline-level="1"/>
      <text:h text:style-name="P3" text:outline-level="3"><draw:frame draw:style-name="fr1" draw:name="Frame12" text:anchor-type="paragraph" svg:x="-0.026cm" svg:width="17cm" style:rel-width="100%" draw:z-index="5"><draw:text-box fo:min-height="0.041cm"><text:h text:style-name="Heading_20_5" text:outline-level="6">Session 1</text:h><text:h text:style-name="Heading_20_5" text:outline-level="6">Duration <text:s/>60 minutes</text:h><text:h text:style-name="Heading_20_5" text:outline-level="6">Players 8-16</text:h><text:h text:style-name="Heading_20_5" text:outline-level="6">Equipment:</text:h><text:list text:style-name="L1"><text:list-item><text:h text:style-name="P4" text:outline-level="6">Balls, one each</text:h></text:list-item><text:list-item><text:h text:style-name="P5" text:outline-level="6">Cones, two each then four per rondo</text:h></text:list-item><text:list-item><text:h text:style-name="P5" text:outline-level="6">Bibs</text:h></text:list-item><text:list-item><text:h text:style-name="P5" text:outline-level="6">Mini Goals</text:h></text:list-item></text:list></draw:text-box></draw:frame><text:span text:style-name="T1"><text:line-break/></text:span>Welcome</text:h>
      <text:h text:style-name="P6" text:outline-level="4">Session Theme</text:h>
      <text:p text:style-name="P7">Simple Passing</text:p>
      <text:p text:style-name="P7">Key Phrase: Receive. Protect. Pass.</text:p>
      <text:h text:style-name="P6" text:outline-level="4">Objectives</text:h>
      <text:p text:style-name="P7">By the end of today's session players should be able to:</text:p>
      <text:list text:style-name="L2">
        <text:list-item>
          <text:p text:style-name="P8">Make a simple accurate pass. </text:p>
        </text:list-item>
        <text:list-item>
          <text:p text:style-name="P8">Receive the ball with control. </text:p>
        </text:list-item>
        <text:list-item>
          <text:p text:style-name="P9">Shield the ball while looking for the next pass. </text:p>
        </text:list-item>
      </text:list>
      <text:h text:style-name="P3" text:outline-level="3"><draw:frame draw:style-name="fr1" draw:name="Frame10" text:anchor-type="paragraph" svg:x="0cm" svg:width="17cm" style:rel-width="100%" draw:z-index="4"><draw:text-box fo:min-height="0.041cm"><text:h text:style-name="P10" text:outline-level="4">🎯 <text:span text:style-name="Strong_20_Emphasis">Coaching Point</text:span><text:span text:style-name="Strong_20_Emphasis"><text:span text:style-name="T1">s</text:span></text:span></text:h><text:p text:style-name="P11">Football is easier when your first touch gives you time.</text:p></draw:text-box></draw:frame><text:span text:style-name="Strong_20_Emphasis"><text:line-break/></text:span>Warm-up (10 minutes)</text:h>
      <text:h text:style-name="P6" text:outline-level="4">Ball Familiarisation</text:h>
      <text:p text:style-name="P7">Each player has a ball.</text:p>
      <text:p text:style-name="P7">Walking only.</text:p>
      <text:h text:style-name="P6" text:outline-level="4">Drills</text:h>
      <text:list text:style-name="L3">
        <text:list-item>
          <text:p text:style-name="P12">Toe taps </text:p>
        </text:list-item>
        <text:list-item>
          <text:p text:style-name="P12">Inside touches </text:p>
        </text:list-item>
        <text:list-item>
          <text:p text:style-name="P12">Outside touches </text:p>
        </text:list-item>
        <text:list-item>
          <text:p text:style-name="P13"><text:soft-page-break/>Sole control, draw the letter L both feet</text:p>
        </text:list-item>
        <text:list-item>
          <text:p text:style-name="P12">Gentle dribbling <text:span text:style-name="T2">(around two cones in a figure of eight)</text:span> </text:p>
        </text:list-item>
        <text:list-item>
          <text:p text:style-name="P12">Stop the ball with the sole </text:p>
        </text:list-item>
        <text:list-item>
          <text:p text:style-name="P14">Change direction every few metres </text:p>
        </text:list-item>
      </text:list>
      <text:h text:style-name="P3" text:outline-level="3"><draw:frame draw:style-name="fr1" draw:name="Frame9" text:anchor-type="paragraph" svg:x="-0.026cm" svg:width="17cm" style:rel-width="100%" draw:z-index="3"><draw:text-box fo:min-height="0.041cm"><text:h text:style-name="P10" text:outline-level="4">🎯 <text:span text:style-name="Strong_20_Emphasis">Coaching Point</text:span><text:span text:style-name="Strong_20_Emphasis"><text:span text:style-name="T1">s</text:span></text:span></text:h><text:p text:style-name="P11">Keep the ball close enough that you could stop it with one step.</text:p></draw:text-box></draw:frame><text:span text:style-name="Strong_20_Emphasis"><text:line-break/></text:span></text:h>
      <text:p text:style-name="Standard"><draw:frame draw:style-name="fr2" draw:name="Frame1" text:anchor-type="paragraph" svg:x="0cm" svg:y="0cm" svg:width="17.069cm" draw:z-index="14"><draw:text-box fo:min-height="1.951cm"><text:h text:style-name="Heading_20_3" text:outline-level="4">⚠ <text:span text:style-name="T3">Common Mistakes</text:span></text:h><text:p text:style-name="P15">some text</text:p></draw:text-box></draw:frame></text:p>
      <text:h text:style-name="P3" text:outline-level="3"><text:span text:style-name="Strong_20_Emphasis"><text:line-break/>…...</text:span></text:h>
      <text:h text:style-name="P3" text:outline-level="3"><text:span text:style-name="T4">Match Practice </text:span>(10 minutes)</text:h>
      <text:h text:style-name="P6" text:outline-level="4">4 v 4</text:h>
      <text:p text:style-name="P7">Rules:</text:p>
      <text:list text:style-name="L4">
        <text:list-item>
          <text:p text:style-name="P16">Walking only</text:p>
        </text:list-item>
        <text:list-item>
          <text:p text:style-name="P16"><text:span text:style-name="T4">Receive the ball with your first touch under control</text:span> </text:p>
        </text:list-item>
        <text:list-item>
          <text:p text:style-name="P16"><text:span text:style-name="T4">Give yourself a pat on the back </text:span>for receiving on the back foot</text:p>
        </text:list-item>
        <text:list-item>
          <text:p text:style-name="P17"><text:span text:style-name="T4">Also for </text:span>shielding successfully before passing</text:p>
        </text:list-item>
      </text:list>
      <text:p text:style-name="P7">This encourages players to use everything they've just practised.</text:p>
      <text:h text:style-name="P3" text:outline-level="3">Cool Down (5 minutes)</text:h>
      <text:p text:style-name="P7">Gentle walking.</text:p>
      <text:p text:style-name="P7">Light stretches.</text:p>
      <text:p text:style-name="P7">Ask:</text:p>
      <text:list text:style-name="L5">
        <text:list-item>
          <text:p text:style-name="P18">What was easiest? </text:p>
        </text:list-item>
        <text:list-item>
          <text:p text:style-name="P18">What was hardest? </text:p>
        </text:list-item>
        <text:list-item>
          <text:p text:style-name="P19">What will you practise this week? </text:p>
        </text:list-item>
      </text:list>
      <text:p text:style-name="P7"/>
      <text:h text:style-name="P20" text:outline-level="2"><draw:frame draw:style-name="fr3" draw:name="Frame28" text:anchor-type="paragraph" svg:x="0cm" svg:y="0cm" svg:width="17cm" style:rel-width="100%" draw:z-index="2"><draw:text-box fo:min-height="0.041cm"><text:h text:style-name="Heading_20_3" text:outline-level="4">📋 <text:span text:style-name="T5">S</text:span><text:span text:style-name="T6">ession Summary</text:span></text:h><text:p text:style-name="P21">By the end of the session players should:</text:p><text:list text:style-name="L6"><text:list-item><text:p text:style-name="P22"/></text:list-item></text:list></draw:text-box></draw:frame><text:soft-page-break/></text:h>
      <text:p text:style-name="P23"><draw:frame draw:style-name="fr4" draw:name="Frame27" text:anchor-type="paragraph" svg:x="0cm" svg:y="0cm" svg:width="17cm" style:rel-width="100%" draw:z-index="1"><draw:text-box fo:min-height="1.981cm"><text:p text:style-name="myNotes">📝 <text:span text:style-name="T7">While </text:span><text:span text:style-name="T8">coaching this session</text:span></text:p><text:p text:style-name="myNotes"/></draw:text-box></draw:frame></text:p>
      <text:h text:style-name="P24" text:outline-level="1"/>
      <text:h text:style-name="P25" text:outline-level="1"/>
      <text:h text:style-name="P26" text:outline-level="1"/>
      <text:h text:style-name="H1" text:outline-level="1"><draw:frame draw:style-name="fr1" draw:name="Frame3" text:anchor-type="paragraph" svg:x="-0.026cm" svg:width="17cm" style:rel-width="100%" draw:z-index="6"><draw:text-box fo:min-height="0.041cm"><text:h text:style-name="Heading_20_3" text:outline-level="4">🎯 C<text:span text:style-name="T3">oaching Points</text:span></text:h><text:p text:style-name="Text_20_body">Replace this text with the key coaching message.</text:p></draw:text-box></draw:frame><text:line-break/></text:h>
      <text:h text:style-name="H1" text:outline-level="1" text:is-list-header="true"><draw:frame draw:style-name="fr5" draw:name="Frame4" text:anchor-type="paragraph" svg:x="0.199cm" svg:y="0.667cm" svg:width="17cm" style:rel-width="100%" draw:z-index="7"><draw:text-box fo:min-height="0.041cm"><text:h text:style-name="P27" text:outline-level="4">🔍 A<text:span text:style-name="T3">nalysis</text:span></text:h><text:p text:style-name="Text_20_body">text</text:p></draw:text-box></draw:frame><draw:frame draw:style-name="fr6" draw:name="Frame5" text:anchor-type="paragraph" svg:x="0.053cm" svg:y="0.365cm" svg:width="17cm" style:rel-width="100%" draw:z-index="8"><draw:text-box fo:min-height="0.041cm"><text:h text:style-name="Heading_20_3" text:outline-level="4">⚽ <text:span text:style-name="T9">PRACTICE DRILL</text:span> </text:h><text:h text:style-name="Heading_20_4" text:outline-level="5">Objective </text:h><text:p text:style-name="Text_20_body">text</text:p><text:h text:style-name="Heading_20_4" text:outline-level="5">Equipment </text:h><text:p text:style-name="Text_20_body">text</text:p><text:h text:style-name="Heading_20_4" text:outline-level="5">Duration </text:h><text:p text:style-name="Text_20_body">text</text:p><text:h text:style-name="Heading_20_4" text:outline-level="5">Players</text:h><text:p text:style-name="Text_20_body">text</text:p><text:h text:style-name="Heading_20_4" text:outline-level="5">Instructions</text:h><text:p text:style-name="Text_20_body">text</text:p></draw:text-box></draw:frame><draw:frame draw:style-name="fr6" draw:name="Frame15" text:anchor-type="paragraph" svg:x="0.053cm" svg:y="0.365cm" svg:width="17cm" style:rel-width="100%" draw:z-index="9"><draw:text-box fo:min-height="0.041cm"><text:h text:style-name="Heading_20_3" text:outline-level="4">⚽ <text:span text:style-name="T9">P</text:span><text:span text:style-name="T3">ractice Drill</text:span></text:h><text:h text:style-name="Heading_20_4" text:outline-level="5">Objective </text:h><text:p text:style-name="Text_20_body">text</text:p><text:h text:style-name="Heading_20_4" text:outline-level="5">Equipment </text:h><text:p text:style-name="Text_20_body">text</text:p><text:h text:style-name="Heading_20_4" text:outline-level="5">Duration </text:h><text:p text:style-name="Text_20_body">text</text:p><text:h text:style-name="Heading_20_4" text:outline-level="5">Players</text:h><text:p text:style-name="Text_20_body">text</text:p><text:h text:style-name="Heading_20_4" text:outline-level="5">Instructions</text:h><text:p text:style-name="Text_20_body">text</text:p></draw:text-box></draw:frame></text:h>
      <text:h text:style-name="H1" text:outline-level="1"/>
      <text:p text:style-name="P28"><draw:frame draw:style-name="fr7" draw:name="Frame11" text:anchor-type="paragraph" svg:x="0.079cm" svg:y="3.246cm" svg:width="17cm" style:rel-width="100%" draw:z-index="0"><draw:text-box fo:min-height="0.041cm"><text:h text:style-name="P29" text:outline-level="4">E<text:span text:style-name="T3">xample</text:span></text:h><text:p text:style-name="Text_20_body">text</text:p></draw:text-box></draw:frame><text:line-break/><text:line-break/><text:line-break/></text:p>
      <text:p text:style-name="P30"><text:soft-page-break/><text:line-break/><text:line-break/></text:p>
      <text:p text:style-name="P30"/>
      <text:p text:style-name="P30"><draw:frame draw:style-name="fr8" draw:name="Frame13" text:anchor-type="paragraph" svg:x="0.132cm" svg:y="-0.282cm" svg:width="17cm" style:rel-width="100%" draw:z-index="10"><draw:text-box fo:min-height="1.799cm"><text:h text:style-name="Heading_20_3" text:outline-level="4">💡 Tip</text:h><text:p text:style-name="P31">text</text:p></draw:text-box></draw:frame></text:p>
      <text:p text:style-name="P30"/>
      <text:p text:style-name="Standard"><draw:frame draw:style-name="fr2" draw:name="Frame14" text:anchor-type="paragraph" svg:x="0.131cm" svg:y="0.351cm" svg:width="17.069cm" draw:z-index="11"><draw:text-box fo:min-height="1.951cm"><text:h text:style-name="Heading_20_3" text:outline-level="4">⚠ Warning</text:h><text:p text:style-name="P15">some text</text:p></draw:text-box></draw:frame></text:p>
      <text:p text:style-name="P32"/>
      <text:p text:style-name="Standard"/>
      <text:p text:style-name="Standard"/>
      <text:p text:style-name="Standard"><draw:frame draw:style-name="fr9" draw:name="Frame2" text:anchor-type="paragraph" svg:x="-0.039cm" svg:y="0.314cm" svg:width="17cm" style:rel-width="100%" draw:z-index="12"><draw:text-box fo:min-height="1.981cm"><text:p text:style-name="myNotes">📝 <text:span text:style-name="T8">My Notes</text:span></text:p></draw:text-box></draw:frame></text:p>
      <text:h text:style-name="P33" text:outline-level="1"/>
      <text:h text:style-name="P34" text:outline-level="1"><draw:frame draw:style-name="fr3" draw:name="Frame32" text:anchor-type="paragraph" svg:x="-0.039cm" svg:y="0.055cm" svg:width="17cm" style:rel-width="100%" draw:z-index="13"><draw:text-box fo:min-height="0.041cm"><text:h text:style-name="Heading_20_3" text:outline-level="4">📋 <text:span text:style-name="T5">S</text:span><text:span text:style-name="T10">ession Summary</text:span></text:h><text:h text:style-name="Heading_20_4" text:outline-level="5">Focus</text:h><text:p text:style-name="P35">Receiving</text:p><text:h text:style-name="P36" text:outline-level="5">Duration</text:h><text:p text:style-name="Text_20_body">60 minutes</text:p><text:h text:style-name="Heading_20_4" text:outline-level="5">Players </text:h><text:p text:style-name="Text_20_body">12 </text:p><text:h text:style-name="Heading_20_4" text:outline-level="5">Key Learning </text:h><text:p text:style-name="Text_20_body">Receiving with an open body shape. </text:p><text:h text:style-name="Heading_20_4" text:outline-level="5">Next Session </text:h><text:p text:style-name="Text_20_body">Turning under pressure.</text:p></draw:text-box></draw:frame></text:h>
      <text:h text:style-name="P33" text:outline-level="1"><text:soft-page-break/></text:h>
      <text:h text:style-name="P33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chitects Daughter" svg:font-family="'Architects Daughter'" style:font-adornments="Regular" style:font-pitch="variable"/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>
      <style:text-properties style:font-name="Calibri2" fo:font-family="Calibri" style:font-style-name="Regular" style:font-family-generic="swiss"/>
    </style:style>
    <style:style style:name="H1" style:family="paragraph">
      <style:text-properties fo:font-size="18pt" fo:font-weight="bold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7a1f1f" loext:opacity="100%" style:font-name="Tahoma2" fo:font-family="Tahoma" style:font-style-name="Regular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fo:font-size="11pt"/>
    </style:style>
    <style:style style:name="Heading_20_4" style:display-name="Heading 4" style:family="paragraph" style:parent-style-name="Heading" style:next-style-name="Text_20_body" style:default-outline-level="5" style:class="chapter">
      <style:paragraph-properties fo:margin-top="0cm" fo:margin-bottom="0.3cm" style:contextual-spacing="false"/>
      <style:text-properties fo:font-size="12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Book_20_Title" style:display-name="Book Title" style:family="paragraph" style:master-page-name="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ehaviour" style:family="paragraph" style:parent-style-name="Panel_20_Heading" style:master-page-name="">
      <loext:graphic-properties draw:fill="solid" draw:fill-color="#b4c7dc"/>
      <style:paragraph-properties fo:margin-left="0cm" fo:margin-right="0cm" fo:margin-top="0cm" fo:margin-bottom="0cm" style:contextual-spacing="false" fo:text-indent="0cm" style:auto-text-indent="false"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2a6099" loext:opacity="100%"/>
    </style:style>
    <style:style style:name="Principle" style:family="paragraph" style:parent-style-name="Panel_20_Heading">
      <loext:graphic-properties draw:fill="solid" draw:fill-color="#81aca6"/>
      <style:paragraph-properties fo:margin-top="0cm" fo:margin-bottom="0cm" style:contextual-spacing="false" fo:background-color="#81aca6" fo:padding-left="0.3cm" fo:padding-right="0.3cm" fo:padding-top="0.199cm" fo:padding-bottom="0.15cm" fo:border="1.5pt solid #168253"/>
      <style:text-properties fo:color="#ffffff" loext:opacity="100%" style:font-name="Tahoma2" fo:font-family="Tahoma" style:font-style-name="Regular" style:font-family-generic="swiss" fo:font-size="11pt" fo:font-weight="normal"/>
    </style:style>
    <style:style style:name="myNotes" style:family="paragraph" style:parent-style-name="Standard" style:master-page-name="">
      <loext:graphic-properties draw:fill="none" draw:fill-color="#ffde59"/>
      <style:paragraph-properties fo:margin-left="0cm" fo:margin-right="0cm" fo:margin-top="0cm" fo:margin-bottom="0cm" style:contextual-spacing="false" fo:text-indent="0cm" style:auto-text-indent="false" style:page-number="auto" fo:background-color="transparent" fo:padding="0.3cm" fo:border="none" style:shadow="none" fo:keep-with-next="always"/>
      <style:text-properties fo:color="#2a6099" loext:opacity="100%" style:font-name="Architects Daughter" fo:font-family="'Architects Daughter'" style:font-style-name="Regular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Tahoma2" fo:font-family="Tahoma" style:font-style-name="Regular" style:font-family-generic="swiss" fo:font-size="11pt" fo:font-weight="normal"/>
    </style:style>
    <style:style style:name="Tip" style:family="paragraph" style:parent-style-name="Panel_20_Heading">
      <loext:graphic-properties draw:fill="solid" draw:fill-color="#ffe994"/>
      <style:paragraph-properties fo:margin-top="0cm" fo:margin-bottom="0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Tahoma2" fo:font-family="Tahoma" style:font-style-name="Regular" style:font-family-generic="swiss" fo:font-size="11pt" fo:font-weight="normal"/>
    </style:style>
    <style:style style:name="RevisionNote" style:family="paragraph" style:parent-style-name="Text_20_body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Caption" style:family="paragraph" style:parent-style-name="Text_20_body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2" style:class="chapter">
      <style:paragraph-properties fo:margin-top="0.3cm" fo:margin-bottom="0.6cm" style:contextual-spacing="false"/>
      <style:text-properties fo:color="#7a1f1f" loext:opacity="100%" style:font-name="Tahoma1" fo:font-family="Tahoma" style:font-style-name="Bold" style:font-family-generic="swiss" fo:font-size="16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2" fo:font-family="Tahoma" style:font-style-name="Regular" style:font-family-generic="swiss" fo:font-size="14pt" fo:font-weight="bold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101cm" fo:margin-bottom="0.4cm" style:contextual-spacing="false"/>
      <style:text-properties fo:font-size="16pt" fo:font-weight="normal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4" style:class="chapter">
      <style:paragraph-properties fo:margin-top="0.101cm" fo:margin-bottom="0.4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5" style:display-name="Heading 5" style:family="paragraph" style:parent-style-name="Heading" style:next-style-name="Text_20_body" style:default-outline-level="6" style:class="chapter">
      <style:paragraph-properties fo:margin-top="0cm" fo:margin-bottom="0.3cm" style:contextual-spacing="false"/>
      <style:text-properties fo:color="#000000" loext:opacity="100%" fo:font-size="12pt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cm" fo:margin-right="0cm" fo:margin-top="0.101cm" fo:margin-bottom="0.101cm" style:contextual-spacing="false" fo:text-indent="0cm" style:auto-text-indent="false" fo:background-color="#729fcf" fo:padding="0cm" fo:border="1.5pt solid #000000"/>
      <style:text-properties style:font-name="Tahoma2" fo:font-family="Tahoma" style:font-style-name="Regular" style:font-family-generic="swiss" fo:font-size="11pt" fo:font-weight="normal"/>
    </style:style>
    <style:style style:name="Analysis" style:family="paragraph" style:parent-style-name="Panel_20_Heading">
      <loext:graphic-properties draw:fill="solid" draw:fill-color="#e0c2cd"/>
      <style:paragraph-properties fo:margin-left="0cm" fo:margin-right="0cm" fo:margin-top="0cm" fo:margin-bottom="0cm" style:contextual-spacing="false" fo:text-indent="0cm" style:auto-text-indent="false"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cm" fo:margin-bottom="0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 fo:break-before="auto" fo:break-after="auto"/>
      <style:text-properties fo:color="#729fcf" loext:opacity="100%" fo:font-size="24pt" fo:font-weight="bold" style:font-size-asian="16pt" style:font-weight-asian="bold" style:font-size-complex="16pt" style:font-weight-complex="600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/>
      <style:text-properties fo:color="#729fcf" loext:opacity="100%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.3cm" fo:margin-bottom="0.3cm" style:contextual-spacing="false" fo:text-align="center" style:justify-single-word="false" style:page-number="auto"/>
      <style:text-properties fo:color="#999999" loext:opacity="100%" fo:font-size="18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Centre" style:display-name="Footer Centre" style:family="paragraph" style:parent-style-name="Footer">
      <style:paragraph-properties fo:text-align="center" style:justify-single-word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999999" loext:opacity="100%" style:font-name="Patrick Hand" fo:font-family="'Patrick Hand'" style:font-style-name="Regular" style:font-pitch="variable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d" style:family="graphic">
      <style:graphic-properties svg:width="17cm" style:rel-width="100%" fo:min-height="0.041cm" text:anchor-type="paragraph" svg:x="0cm" svg:y="0cm" fo:margin-left="0.199cm" fo:margin-right="0cm" style:wrap="none" style:vertical-pos="from-top" style:vertical-rel="page-content" style:horizontal-pos="from-left" style:horizontal-rel="page-content" fo:background-color="#b4c7dc" style:background-transparency="0%" draw:fill="solid" draw:fill-color="#b4c7dc" draw:gradient-step-count="0" draw:opacity="100%" fo:padding-left="0.3cm" fo:padding-right="0.3cm" fo:padding-top="0.199cm" fo:padding-bottom="0.199cm" fo:border-left="2.01pt solid #000000" fo:border-right="none" fo:border-top="none" fo:border-bottom="none" draw:wrap-influence-on-position="once-concurrent" loext:allow-overlap="true" loext:rel-width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oaching_20_Point" style:display-name="Coaching Point" style:family="graphic" style:parent-style-name="Card">
      <style:graphic-properties svg:width="17cm" style:rel-width="100%" fo:min-height="0.041cm" text:anchor-type="paragraph" svg:x="0cm" svg:y="0cm" style:wrap="none" style:vertical-pos="from-top" style:vertical-rel="page-content" style:horizontal-pos="from-left" style:horizontal-rel="page-content" fo:background-color="#b3cac7" style:background-transparency="0%" draw:fill="solid" draw:fill-color="#b3cac7" draw:opacity="100%" fo:padding-left="0.4cm" fo:padding-right="0.4cm" fo:padding-top="0.199cm" fo:padding-bottom="0.199cm" fo:border-left="2.01pt solid #50938a" fo:border-right="none" fo:border-top="none" fo:border-bottom="none" draw:wrap-influence-on-position="once-concurrent" loext:allow-overlap="true" loext:rel-width-rel="paragraph"/>
    </style:style>
    <style:style style:name="Session_20_Summary" style:display-name="Session Summary" style:family="graphic" style:parent-style-name="Card">
      <style:graphic-properties svg:width="17cm" style:rel-width="100%" fo:min-height="0.041cm" text:anchor-type="paragraph" fo:margin-left="0cm" fo:margin-right="0cm" fo:background-color="#ffb66c" style:background-transparency="0%" draw:fill="solid" draw:fill-color="#ffb66c" draw:opacity="100%" fo:padding-left="0.3cm" fo:padding-right="0.3cm" fo:padding-top="0.199cm" fo:padding-bottom="0.199cm" fo:border-left="2.01pt solid #ff860d" fo:border-right="none" fo:border-top="none" fo:border-bottom="none" loext:rel-width-rel="paragraph"/>
    </style:style>
    <style:style style:name="Analysis" style:family="graphic" style:parent-style-name="Card">
      <style:graphic-properties fo:background-color="#e0c2cd" style:background-transparency="0%" draw:fill="solid" draw:fill-color="#e0c2cd" draw:opacity="100%" fo:padding-left="0.3cm" fo:padding-right="0.3cm" fo:padding-top="0.199cm" fo:padding-bottom="0.199cm" fo:border-left="2.01pt solid #8d1d75" fo:border-right="none" fo:border-top="none" fo:border-bottom="none"/>
    </style:style>
    <style:style style:name="Example" style:family="graphic" style:parent-style-name="Card">
      <style:graphic-properties svg:width="17cm" style:rel-width="100%" fo:min-height="0.041cm" text:anchor-type="paragraph" fo:background-color="#dde8cb" style:background-transparency="0%" draw:fill="solid" draw:fill-color="#dde8cb" draw:opacity="100%" fo:padding-left="0.3cm" fo:padding-right="0.3cm" fo:padding-top="0.199cm" fo:padding-bottom="0.199cm" fo:border-left="2.01pt solid #3faf46" fo:border-right="none" fo:border-top="none" fo:border-bottom="none" loext:rel-width-rel="paragraph"/>
    </style:style>
    <style:style style:name="Tip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.3cm" fo:padding-top="0.199cm" fo:padding-bottom="0.199cm" fo:border-left="2.01pt solid #e8a202" fo:border-right="none" fo:border-top="none" fo:border-bottom="none" loext:rel-width-rel="paragraph"/>
    </style:style>
    <style:style style:name="Warning" style:family="graphic" style:parent-style-name="Card">
      <style:graphic-properties svg:width="17cm" style:rel-width="100%" fo:min-height="0.041cm" text:anchor-type="paragraph" fo:background-color="#cccccc" style:background-transparency="0%" draw:fill="solid" draw:fill-color="#cccccc" draw:opacity="100%" fo:padding-left="0.3cm" fo:padding-right="0.3cm" fo:padding-top="0.199cm" fo:padding-bottom="0.199cm" fo:border-left="2.01pt solid #000000" fo:border-right="none" fo:border-top="none" fo:border-bottom="none" loext:rel-width-rel="paragraph"/>
    </style:style>
    <style:style style:name="My_20_Notes" style:display-name="My Notes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cm" fo:padding-top="0.199cm" fo:padding-bottom="0.199cm" fo:border-left="2.01pt solid #e8a202" fo:border-right="none" fo:border-top="none" fo:border-bottom="none" loext:rel-width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0229ac93fcf0d7cbc6376066c6f35021cef002dc</meta:generator>
    <dc:date>2026-07-17T09:18:42.918757447</dc:date>
    <meta:editing-duration>PT58M40S</meta:editing-duration>
    <meta:editing-cycles>11</meta:editing-cycles>
    <meta:document-statistic meta:table-count="0" meta:image-count="0" meta:object-count="0" meta:page-count="5" meta:paragraph-count="104" meta:word-count="328" meta:character-count="1799" meta:non-whitespace-character-count="1556"/>
  </office:meta>
</office:document-meta>
</file>