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adornments="Bold"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trick Hand" svg:font-family="'Patrick Hand'" style:font-adornments="Bold Italic" style:font-pitch="variable"/>
    <style:font-face style:name="Tahoma" svg:font-family="Tahoma"/>
    <style:font-face style:name="Tahoma1" svg:font-family="Tahoma" style:font-adornments="Regular" style:font-family-generic="swiss"/>
  </office:font-face-decls>
  <office:automatic-styles>
    <style:style style:name="Table1" style:family="table">
      <style:table-properties style:width="7.415cm" table:align="left"/>
    </style:style>
    <style:style style:name="Table1.A" style:family="table-column">
      <style:table-column-properties style:column-width="2.859cm"/>
    </style:style>
    <style:style style:name="Table1.B" style:family="table-column">
      <style:table-column-properties style:column-width="4.556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Chapter_20_Title" text:outline-level="2">Chapter 1 – The Fundamentals of Walking Football</text:h>
      <text:h text:style-name="Section_20_Title" text:outline-level="3">Introduction</text:h>
      <text:p text:style-name="Body_20_Text">Walking football is one of the fastest growing sports in the United Kingdom. Originally developed to allow older players to continue enjoying the game, it has become a sport in its own right, welcoming players of all ages and abilities.</text:p>
      <text:p text:style-name="Body_20_Text">Many new players arrive having never played organised football before. Others may not have played since school. Some, like the author, have knee problems or other injuries that make running difficult.</text:p>
      <text:p text:style-name="Body_20_Text">The good news is that walking football is not about speed.</text:p>
      <text:p text:style-name="Body_20_Text">Successful players rely on good decisions, simple techniques and teamwork rather than athletic ability. This handbook has been written to help new players build those skills one step at a time.</text:p>
      <text:p text:style-name="Horizontal_20_Line"/>
      <text:p text:style-name="Heading_20_1">What Makes Walking Football Different?</text:p>
      <text:p text:style-name="Text_20_body">At first glance, walking football looks very similar to the traditional game, but the absence of running changes almost everything.</text:p>
      <text:p text:style-name="Text_20_body">Without pace to escape defenders, players must rely on:</text:p>
      <text:list xml:id="list215149641" text:style-name="L1">
        <text:list-item>
          <text:p text:style-name="P2">Good first touches </text:p>
        </text:list-item>
        <text:list-item>
          <text:p text:style-name="P2">Accurate passing </text:p>
        </text:list-item>
        <text:list-item>
          <text:p text:style-name="P2">Intelligent movement </text:p>
        </text:list-item>
        <text:list-item>
          <text:p text:style-name="P2">Awareness of space </text:p>
        </text:list-item>
        <text:list-item>
          <text:p text:style-name="P2">Communication </text:p>
        </text:list-item>
        <text:list-item>
          <text:p text:style-name="P1">Patience </text:p>
        </text:list-item>
      </text:list>
      <text:p text:style-name="Text_20_body">The player who thinks quickest will often outperform the player who moves quickest.</text:p>
      <text:p text:style-name="Quotations"><text:span text:style-name="Strong_20_Emphasis">Coaching Point</text:span></text:p>
      <text:p text:style-name="Quotations">Walking football rewards good decisions more than physical ability.</text:p>
      <text:p text:style-name="Horizontal_20_Line"/>
      <text:p text:style-name="Heading_20_1">The Three Golden Rules</text:p>
      <text:p text:style-name="Text_20_body">Although every competition has its own rules, successful players nearly always follow three simple principles.</text:p>
      <text:p text:style-name="Heading_20_2">1. Control Before Speed</text:p>
      <text:p text:style-name="Text_20_body">Never rush your first touch.</text:p>
      <text:p text:style-name="Text_20_body">A controlled first touch gives you time to think, protects the ball and opens up passing opportunities.</text:p>
      <text:p text:style-name="Text_20_body"><text:soft-page-break/>A poor first touch usually invites pressure from defenders.</text:p>
      <text:p text:style-name="Horizontal_20_Line"/>
      <text:p text:style-name="Heading_20_2">2. Keep the Ball Moving</text:p>
      <text:p text:style-name="Text_20_body">Most attacks are built through simple passes.</text:p>
      <text:p text:style-name="Text_20_body">Many beginners try to dribble too much.</text:p>
      <text:p text:style-name="Text_20_body">Experienced players often need only one or two touches before finding a teammate.</text:p>
      <text:p text:style-name="Text_20_body">Remember:</text:p>
      <text:p text:style-name="Quotations"><text:span text:style-name="Strong_20_Emphasis">The ball always travels faster than a player can walk.</text:span></text:p>
      <text:p text:style-name="Horizontal_20_Line"/>
      <text:p text:style-name="Heading_20_2">3. Keep Looking Around</text:p>
      <text:p text:style-name="Text_20_body">The best players are constantly checking their surroundings.</text:p>
      <text:p text:style-name="Text_20_body">Before the ball arrives:</text:p>
      <text:list xml:id="list2860304753" text:style-name="L2">
        <text:list-item>
          <text:p text:style-name="P4">Look left. </text:p>
        </text:list-item>
        <text:list-item>
          <text:p text:style-name="P4">Look right. </text:p>
        </text:list-item>
        <text:list-item>
          <text:p text:style-name="P4">Identify teammates. </text:p>
        </text:list-item>
        <text:list-item>
          <text:p text:style-name="P4">Identify defenders. </text:p>
        </text:list-item>
        <text:list-item>
          <text:p text:style-name="P3">Decide what you will do before your first touch. </text:p>
        </text:list-item>
      </text:list>
      <text:p text:style-name="Text_20_body">This habit is known as <text:span text:style-name="Strong_20_Emphasis">scanning</text:span>, and it is one of the most valuable skills in football.</text:p>
      <text:p text:style-name="Horizontal_20_Line"/>
      <text:p text:style-name="Heading_20_1">The Beginner's Mindset</text:p>
      <text:p text:style-name="Text_20_body">Every player loses possession.</text:p>
      <text:p text:style-name="Text_20_body">Every player misplaces passes.</text:p>
      <text:p text:style-name="Text_20_body">Every player makes mistakes.</text:p>
      <text:p text:style-name="Text_20_body">Improvement comes through repetition rather than perfection.</text:p>
      <text:p text:style-name="Text_20_body">Aim to improve one small skill each week rather than trying to master everything at once.</text:p>
      <text:p text:style-name="Horizontal_20_Line"/>
      <text:p text:style-name="Heading_20_1">Your Training Priorities</text:p>
      <text:p text:style-name="Text_20_body">For new players, the order of importance is usually:</text:p>
      <table:table table:name="Table1" table:style-name="Table1">
        <table:table-column table:style-name="Table1.A"/>
        <table:table-column table:style-name="Table1.B"/>
        <table:table-header-rows>
          <table:table-row>
            <table:table-cell table:style-name="Table1.A1" office:value-type="string">
              <text:p text:style-name="Table_20_Heading">Priority</text:p>
            </table:table-cell>
            <table:table-cell table:style-name="Table1.A1" office:value-type="string">
              <text:p text:style-name="Table_20_Heading">Skill</text:p>
            </table:table-cell>
          </table:table-row>
        </table:table-header-rows>
        <table:table-row>
          <table:table-cell table:style-name="Table1.A1" office:value-type="string">
            <text:p text:style-name="Table_20_Contents">⭐⭐⭐⭐⭐</text:p>
          </table:table-cell>
          <table:table-cell table:style-name="Table1.A1" office:value-type="string">
            <text:p text:style-name="Table_20_Contents">First touch</text:p>
          </table:table-cell>
        </table:table-row>
        <table:table-row>
          <table:table-cell table:style-name="Table1.A1" office:value-type="string">
            <text:p text:style-name="Table_20_Contents">⭐⭐⭐⭐⭐</text:p>
          </table:table-cell>
          <table:table-cell table:style-name="Table1.A1" office:value-type="string">
            <text:p text:style-name="Table_20_Contents">Passing</text:p>
          </table:table-cell>
        </table:table-row>
        <text:soft-page-break/>
        <table:table-row>
          <table:table-cell table:style-name="Table1.A1" office:value-type="string">
            <text:p text:style-name="Table_20_Contents">⭐⭐⭐⭐⭐</text:p>
          </table:table-cell>
          <table:table-cell table:style-name="Table1.A1" office:value-type="string">
            <text:p text:style-name="Table_20_Contents">Awareness (Scanning)</text:p>
          </table:table-cell>
        </table:table-row>
        <table:table-row>
          <table:table-cell table:style-name="Table1.A1" office:value-type="string">
            <text:p text:style-name="Table_20_Contents">⭐⭐⭐⭐</text:p>
          </table:table-cell>
          <table:table-cell table:style-name="Table1.A1" office:value-type="string">
            <text:p text:style-name="Table_20_Contents">Ball control</text:p>
          </table:table-cell>
        </table:table-row>
        <table:table-row>
          <table:table-cell table:style-name="Table1.A1" office:value-type="string">
            <text:p text:style-name="Table_20_Contents">⭐⭐⭐⭐</text:p>
          </table:table-cell>
          <table:table-cell table:style-name="Table1.A1" office:value-type="string">
            <text:p text:style-name="Table_20_Contents">Receiving under pressure</text:p>
          </table:table-cell>
        </table:table-row>
        <table:table-row>
          <table:table-cell table:style-name="Table1.A1" office:value-type="string">
            <text:p text:style-name="Table_20_Contents">⭐⭐⭐</text:p>
          </table:table-cell>
          <table:table-cell table:style-name="Table1.A1" office:value-type="string">
            <text:p text:style-name="Table_20_Contents">Turning</text:p>
          </table:table-cell>
        </table:table-row>
        <table:table-row>
          <table:table-cell table:style-name="Table1.A1" office:value-type="string">
            <text:p text:style-name="Table_20_Contents">⭐⭐⭐</text:p>
          </table:table-cell>
          <table:table-cell table:style-name="Table1.A1" office:value-type="string">
            <text:p text:style-name="Table_20_Contents">Movement off the ball</text:p>
          </table:table-cell>
        </table:table-row>
        <table:table-row>
          <table:table-cell table:style-name="Table1.A1" office:value-type="string">
            <text:p text:style-name="Table_20_Contents">⭐⭐</text:p>
          </table:table-cell>
          <table:table-cell table:style-name="Table1.A1" office:value-type="string">
            <text:p text:style-name="Table_20_Contents">Shooting</text:p>
          </table:table-cell>
        </table:table-row>
        <table:table-row>
          <table:table-cell table:style-name="Table1.A1" office:value-type="string">
            <text:p text:style-name="Table_20_Contents">⭐</text:p>
          </table:table-cell>
          <table:table-cell table:style-name="Table1.A1" office:value-type="string">
            <text:p text:style-name="Table_20_Contents">Fancy skills</text:p>
          </table:table-cell>
        </table:table-row>
      </table:table>
      <text:p text:style-name="Text_20_body">Notice that dribbling is not at the top of the list.</text:p>
      <text:p text:style-name="Text_20_body">Most successful walking football players keep the game simple.</text:p>
      <text:p text:style-name="Horizontal_20_Line"/>
      <text:p text:style-name="Heading_20_1">Looking After Your Body</text:p>
      <text:p text:style-name="Text_20_body">Many players come to walking football because running has become uncomfortable due to age, injury or medical conditions.</text:p>
      <text:p text:style-name="Text_20_body">Good technique should never come at the expense of your joints.</text:p>
      <text:p text:style-name="Text_20_body">When changing direction:</text:p>
      <text:list xml:id="list565165348" text:style-name="L3">
        <text:list-item>
          <text:p text:style-name="P6">Avoid twisting on a planted foot. </text:p>
        </text:list-item>
        <text:list-item>
          <text:p text:style-name="P6">Use several small walking steps. </text:p>
        </text:list-item>
        <text:list-item>
          <text:p text:style-name="P6">Slow down before turning. </text:p>
        </text:list-item>
        <text:list-item>
          <text:p text:style-name="P5">Maintain your balance throughout the movement. </text:p>
        </text:list-item>
      </text:list>
      <text:p text:style-name="Text_20_body">Pain should never be ignored.</text:p>
      <text:p text:style-name="Text_20_body">Training little and often is far more effective than one long session followed by several days of recovery.</text:p>
      <text:p text:style-name="Quotations"><text:span text:style-name="Strong_20_Emphasis">Remember</text:span></text:p>
      <text:p text:style-name="Quotations">Walking football is a lifelong sport, not a sprint to improve as quickly as possible.</text:p>
      <text:p text:style-name="Horizontal_20_Line"/>
      <text:p text:style-name="Heading_20_1">What You'll Learn in This Handbook</text:p>
      <text:p text:style-name="Text_20_body">By working through the following chapters you will learn how to:</text:p>
      <text:list xml:id="list1193071908" text:style-name="L4">
        <text:list-item>
          <text:p text:style-name="P8">Control the ball with confidence. </text:p>
        </text:list-item>
        <text:list-item>
          <text:p text:style-name="P8">Pass accurately with both feet. </text:p>
        </text:list-item>
        <text:list-item>
          <text:p text:style-name="P8">Receive the ball under pressure. </text:p>
        </text:list-item>
        <text:list-item>
          <text:p text:style-name="P8">Turn safely and efficiently. </text:p>
        </text:list-item>
        <text:list-item>
          <text:p text:style-name="P8">Move into space. </text:p>
        </text:list-item>
        <text:list-item>
          <text:p text:style-name="P8">Defend effectively without running. </text:p>
        </text:list-item>
        <text:list-item>
          <text:p text:style-name="P8">Understand simple tactics. </text:p>
        </text:list-item>
        <text:list-item>
          <text:p text:style-name="P7">Continue improving through structured practice. </text:p>
        </text:list-item>
      </text:list>
      <text:p text:style-name="Text_20_body"><text:soft-page-break/>Each chapter introduces one skill at a time, with simple drills that can be practised at home or during club training sessions.</text:p>
      <text:p text:style-name="Horizontal_20_Line"/>
      <text:p text:style-name="Heading_20_2">Summary</text:p>
      <text:p text:style-name="Text_20_body">Walking football is a game of patience, technique and teamwork.</text:p>
      <text:p text:style-name="Text_20_body">The aim is not to perform spectacular tricks or outrun opponents. Instead, success comes from making good decisions, keeping possession and supporting your teammates.</text:p>
      <text:p text:style-name="Text_20_body">Master the fundamentals, and everything else becomes easier.</text:p>
      <text:p text:style-name="Horizontal_20_Line"/>
      <text:p text:style-name="Heading_20_2">Coaching Points</text:p>
      <text:list xml:id="list2948321927" text:style-name="L5">
        <text:list-item>
          <text:p text:style-name="P10">Think before you receive the ball. </text:p>
        </text:list-item>
        <text:list-item>
          <text:p text:style-name="P10">Control before speed. </text:p>
        </text:list-item>
        <text:list-item>
          <text:p text:style-name="P10">Keep the ball moving. </text:p>
        </text:list-item>
        <text:list-item>
          <text:p text:style-name="P10">Communicate with teammates. </text:p>
        </text:list-item>
        <text:list-item>
          <text:p text:style-name="P10">Scan the pitch regularly. </text:p>
        </text:list-item>
        <text:list-item>
          <text:p text:style-name="P10">Protect your joints with safe turning techniques. </text:p>
        </text:list-item>
        <text:list-item>
          <text:p text:style-name="P9">Practise little and ofte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adornments="Bold"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trick Hand" svg:font-family="'Patrick Hand'" style:font-adornments="Bold Italic" style:font-pitch="variable"/>
    <style:font-face style:name="Tahoma" svg:font-family="Tahoma"/>
    <style:font-face style:name="Tahoma1" svg:font-family="Tahoma"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ook_20_Title" style:display-name="Book Title" style:family="paragraph" style:master-page-name="">
      <style:paragraph-properties fo:margin-left="0cm" fo:margin-right="0cm" fo:margin-top="0cm" fo:margin-bottom="0.6cm" style:contextual-spacing="false" fo:text-align="center" style:justify-single-word="false" fo:text-indent="0cm" style:auto-text-indent="false" style:page-number="auto" fo:break-before="auto" fo:break-after="auto" fo:keep-with-next="always"/>
      <style:text-properties fo:color="#729fcf" loext:opacity="100%" style:font-name="Tahoma" fo:font-family="Tahoma" fo:font-size="22pt" fo:font-weight="bold"/>
    </style:style>
    <style:style style:name="Chapter_20_Title" style:display-name="Chapter Title" style:family="paragraph" style:next-style-name="Body_20_Text" style:auto-update="true" style:default-outline-level="2" style:list-style-name="" style:master-page-name="">
      <style:paragraph-properties fo:margin-left="0cm" fo:margin-right="0cm" fo:margin-top="0.3cm" fo:margin-bottom="0.6cm" style:contextual-spacing="true" fo:text-align="start" style:justify-single-word="false" fo:text-indent="0cm" style:auto-text-indent="false" style:page-number="auto" fo:break-before="auto" fo:break-after="auto" fo:keep-with-next="always">
        <style:tab-stops>
          <style:tab-stop style:position="1.111cm"/>
        </style:tab-stops>
      </style:paragraph-properties>
      <style:text-properties fo:color="#7a1f1f" loext:opacity="100%" style:font-name="Tahoma" fo:font-family="Tahoma" fo:font-size="16pt" fo:font-weight="bold"/>
    </style:style>
    <style:style style:name="Section_20_Title" style:display-name="Section Title" style:family="paragraph" style:parent-style-name="Chapter_20_Title" style:next-style-name="Body_20_Text" style:auto-update="true" style:default-outline-level="3" style:list-style-name="" style:master-page-name="">
      <style:paragraph-properties fo:margin-left="0cm" fo:margin-right="0cm" fo:margin-top="0cm" fo:margin-bottom="0.4cm" style:contextual-spacing="false" fo:text-indent="0cm" style:auto-text-indent="false" style:page-number="auto" fo:break-before="auto" fo:break-after="auto"/>
      <style:text-properties fo:color="#7a1f1f" loext:opacity="100%" style:font-name="Tahoma" fo:font-family="Tahoma" fo:font-size="14pt" fo:font-weight="normal"/>
    </style:style>
    <style:style style:name="Subsection_20_Title" style:display-name="Subsection Title" style:family="paragraph" style:parent-style-name="Section_20_Title" style:next-style-name="Body_20_Text" style:auto-update="true" style:default-outline-level="4" style:list-style-name="">
      <style:paragraph-properties fo:margin-left="0cm" fo:margin-right="0cm" fo:margin-top="0cm" fo:margin-bottom="0.4cm" style:contextual-spacing="false" fo:text-indent="0cm" style:auto-text-indent="false"/>
      <style:text-properties fo:color="#7a1f1f" loext:opacity="100%" style:font-name="Tahoma" fo:font-family="Tahoma" fo:font-size="12pt" fo:font-weight="normal" style:font-size-asian="16pt" style:font-weight-asian="normal" style:font-size-complex="16pt" style:font-weight-complex="normal"/>
    </style:style>
    <style:style style:name="Minor_20_Heading" style:display-name="Minor Heading" style:family="paragraph" style:parent-style-name="Subsection_20_Title" style:auto-update="true" style:default-outline-level="5" style:list-style-name="">
      <style:paragraph-properties fo:margin-top="0cm" fo:margin-bottom="0.3cm" style:contextual-spacing="false"/>
      <style:text-properties fo:color="#7a1f1f" loext:opacity="100%" style:font-name="Tahoma" fo:font-family="Tahoma" fo:font-size="11pt" style:font-size-asian="16pt" style:font-size-complex="16pt"/>
    </style:style>
    <style:style style:name="Body_20_Text" style:display-name="Body Text" style:family="paragraph">
      <style:paragraph-properties fo:margin-left="0cm" fo:margin-right="0cm" fo:margin-top="0.101cm" fo:margin-bottom="0.101cm" style:contextual-spacing="false" fo:text-indent="0cm" style:auto-text-indent="false"/>
      <style:text-properties style:font-name="Calibri" fo:font-family="Calibri" fo:font-size="11pt"/>
    </style:style>
    <style:style style:name="Quote" style:family="paragraph" style:parent-style-name="Body_20_Text">
      <style:paragraph-properties fo:text-align="center" style:justify-single-word="false"/>
      <style:text-properties fo:color="#555555" loext:opacity="100%" style:font-name="Calibri" fo:font-family="Calibri" fo:font-size="11pt" fo:font-style="italic"/>
    </style:style>
    <style:style style:name="FM_20_Behaviour" style:display-name="FM Behaviour" style:family="paragraph" style:parent-style-name="Panel_20_Heading" style:master-page-name="">
      <loext:graphic-properties draw:fill="solid" draw:fill-color="#b4c7dc"/>
      <style:paragraph-properties fo:margin-left="0.3cm" fo:margin-right="0.3cm" fo:margin-top="0.101cm" fo:margin-bottom="0.101cm" style:contextual-spacing="false" fo:text-indent="0cm" style:auto-text-indent="false" style:page-number="auto" fo:background-color="#b4c7dc" fo:padding-left="0.3cm" fo:padding-right="0.3cm" fo:padding-top="0.15cm" fo:padding-bottom="0.15cm" fo:border="1.5pt solid #5983b0" style:join-border="true">
        <style:tab-stops/>
      </style:paragraph-properties>
      <style:text-properties fo:color="#1565c0" loext:opacity="100%" style:font-name="Calibri" fo:font-family="Calibri" fo:font-size="11pt" fo:font-weight="normal"/>
    </style:style>
    <style:style style:name="Tactical_20_Principle" style:display-name="Tactical Principle" style:family="paragraph" style:parent-style-name="Panel_20_Heading">
      <loext:graphic-properties draw:fill="solid" draw:fill-color="#81aca6"/>
      <style:paragraph-properties fo:background-color="#81aca6" fo:padding-left="0.3cm" fo:padding-right="0.3cm" fo:padding-top="0.199cm" fo:padding-bottom="0.15cm" fo:border="1.5pt solid #168253"/>
      <style:text-properties fo:color="#2e7d32" loext:opacity="100%" style:font-name="Calibri" fo:font-family="Calibri" fo:font-size="11pt" fo:font-weight="normal"/>
    </style:style>
    <style:style style:name="Managers_20_Journal" style:display-name="Managers Journal" style:family="paragraph" style:parent-style-name="Panel_20_Heading">
      <loext:graphic-properties draw:fill="solid" draw:fill-color="#ffde59"/>
      <style:paragraph-properties fo:margin-left="0.3cm" fo:margin-right="0.3cm" fo:margin-top="0cm" fo:margin-bottom="0cm" style:contextual-spacing="false" fo:text-indent="0cm" style:auto-text-indent="false" fo:background-color="#ffde59" fo:padding="0.3cm" fo:border="1.5pt solid #2a6099" style:shadow="none"/>
      <style:text-properties fo:color="#2a6099" loext:opacity="100%" style:font-name="Patrick Hand" fo:font-family="'Patrick Hand'" style:font-style-name="Bold Italic" style:font-pitch="variable" fo:font-size="14pt" fo:font-style="normal" fo:font-weight="normal"/>
    </style:style>
    <style:style style:name="Warning" style:family="paragraph" style:parent-style-name="Panel_20_Heading">
      <loext:graphic-properties draw:fill="solid" draw:fill-color="#cccccc"/>
      <style:paragraph-properties fo:margin-top="0.199cm" fo:margin-bottom="0.199cm" style:contextual-spacing="false" fo:background-color="#cccccc" fo:padding-left="0.3cm" fo:padding-right="0.3cm" fo:padding-top="0.15cm" fo:padding-bottom="0.15cm" fo:border="1.5pt solid #666666"/>
      <style:text-properties fo:color="#666666" loext:opacity="100%" style:font-name="Calibri" fo:font-family="Calibri" fo:font-size="11pt" fo:font-weight="normal"/>
    </style:style>
    <style:style style:name="Match_20_Tip" style:display-name="Match Tip" style:family="paragraph" style:parent-style-name="Panel_20_Heading">
      <loext:graphic-properties draw:fill="solid" draw:fill-color="#ffe994"/>
      <style:paragraph-properties fo:margin-top="0.199cm" fo:margin-bottom="0.199cm" style:contextual-spacing="false" fo:background-color="#ffe994" fo:padding-left="0.3cm" fo:padding-right="0.3cm" fo:padding-top="0.199cm" fo:padding-bottom="0.15cm" fo:border="1.5pt solid #8a6d00"/>
      <style:text-properties fo:color="#8a6d00" loext:opacity="100%" style:font-name="Calibri" fo:font-family="Calibri" fo:font-size="11pt" fo:font-weight="normal"/>
    </style:style>
    <style:style style:name="RevisionNote" style:family="paragraph" style:parent-style-name="Body_20_Text">
      <style:paragraph-properties fo:margin-top="0.199cm" fo:margin-bottom="0cm" style:contextual-spacing="false"/>
      <style:text-properties fo:color="#c62828" loext:opacity="100%" style:font-name="Calibri" fo:font-family="Calibri" fo:font-size="10pt" fo:font-style="italic"/>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libri1" fo:font-family="Calibri" style:font-style-name="Bold" style:font-family-generic="swiss" fo:font-size="12pt" fo:font-weight="normal" style:font-size-asian="16pt" style:font-weight-asian="bold" style:font-size-complex="16pt" style:font-weight-complex="600"/>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text:number-lines="false" text:line-number="0"/>
      <style:text-properties style:font-name="Calibri1" fo:font-family="Calibri" style:font-style-name="Bold" style:font-family-generic="swiss" fo:font-size="14pt" fo:font-weight="bold" style:font-size-asian="16pt" style:font-weight-asian="bold" style:font-size-complex="16pt" style:font-weight-complex="600"/>
    </style:style>
    <style:style style:name="Contents_20_1" style:display-name="Contents 1" style:family="paragraph" style:class="index">
      <style:paragraph-properties fo:margin-left="0cm" fo:margin-right="0cm" fo:margin-top="0.6cm" fo:margin-bottom="0.199cm" style:contextual-spacing="false" fo:text-indent="0cm" style:auto-text-indent="false">
        <style:tab-stops>
          <style:tab-stop style:position="17cm" style:type="right" style:leader-style="dotted" style:leader-text="."/>
        </style:tab-stops>
      </style:paragraph-properties>
      <style:text-properties style:font-name="Tahoma1" fo:font-family="Tahoma" style:font-style-name="Regular" style:font-family-generic="swiss" fo:font-size="14pt" fo:font-weight="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Contents_20_1" style:class="index">
      <style:paragraph-properties fo:margin-left="0.499cm" fo:margin-right="0cm" fo:margin-top="0.199cm" fo:margin-bottom="0.101cm" style:contextual-spacing="false" fo:text-indent="0cm" style:auto-text-indent="false">
        <style:tab-stops>
          <style:tab-stop style:position="17cm" style:type="right"/>
        </style:tab-stops>
      </style:paragraph-properties>
      <style:text-properties fo:font-size="12pt"/>
    </style:style>
    <style:style style:name="Contents_20_3" style:display-name="Contents 3" style:family="paragraph" style:parent-style-name="Contents_20_2" style:class="index">
      <style:paragraph-properties fo:margin-left="1cm" fo:margin-right="0cm" fo:margin-top="0.101cm" fo:margin-bottom="0.101cm" style:contextual-spacing="false" fo:text-indent="0cm" style:auto-text-indent="false">
        <style:tab-stops>
          <style:tab-stop style:position="16cm" style:type="right" style:leader-style="dotted" style:leader-text="."/>
        </style:tab-stops>
      </style:paragraph-properties>
      <style:text-properties fo:font-size="11pt" fo:font-weight="normal"/>
    </style:style>
    <style:style style:name="Contents_20_4" style:display-name="Contents 4" style:family="paragraph" style:parent-style-name="Contents_20_3" style:class="index">
      <style:paragraph-properties fo:margin-left="1.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nel_20_Heading" style:display-name="Panel Heading" style:family="paragraph" style:auto-update="true">
      <loext:graphic-properties draw:fill="solid" draw:fill-color="#729fcf"/>
      <style:paragraph-properties fo:margin-left="0.4cm" fo:margin-right="0.3cm" fo:margin-top="0.101cm" fo:margin-bottom="0.101cm" style:contextual-spacing="false" fo:text-indent="0cm" style:auto-text-indent="false" fo:background-color="#729fcf" fo:padding-left="0.199cm" fo:padding-right="0.199cm" fo:padding-top="0.15cm" fo:padding-bottom="0.15cm" fo:border="1.5pt solid #000000"/>
      <style:text-properties style:font-name="Tahoma1" fo:font-family="Tahoma" style:font-style-name="Regular" style:font-family-generic="swiss" fo:font-size="11pt" fo:font-weight="normal"/>
    </style:style>
    <style:style style:name="Evidence" style:family="paragraph" style:parent-style-name="Panel_20_Heading">
      <loext:graphic-properties draw:fill="solid" draw:fill-color="#e0c2cd"/>
      <style:paragraph-properties fo:margin-left="0.3cm" fo:margin-right="0.3cm" fo:margin-top="0.101cm" fo:margin-bottom="0.101cm" style:contextual-spacing="false" fo:text-indent="0cm" style:auto-text-indent="false" fo:background-color="#e0c2cd" fo:padding-left="0.3cm" fo:padding-right="0.3cm" fo:padding-top="0.199cm" fo:padding-bottom="0.15cm" fo:border="1.5pt solid #8d1d75"/>
      <style:text-properties fo:color="#8d1d75" loext:opacity="100%" fo:font-weight="normal"/>
    </style:style>
    <style:style style:name="Example" style:family="paragraph" style:parent-style-name="Panel_20_Heading">
      <loext:graphic-properties draw:fill="solid" draw:fill-color="#e8f2a1"/>
      <style:paragraph-properties fo:margin-top="0.101cm" fo:margin-bottom="0.101cm" style:contextual-spacing="false" fo:background-color="#e8f2a1" fo:padding-left="0.3cm" fo:padding-right="0.3cm" fo:padding-top="0.199cm" fo:padding-bottom="0.15cm" fo:border="1.5pt solid #468a1a"/>
      <style:text-properties fo:color="#468a1a" loext:opacity="100%" fo:font-weight="normal"/>
    </style:style>
    <style:style style:name="Part_20_Title" style:display-name="Part Title" style:family="paragraph" style:parent-style-name="Book_20_Title" style:default-outline-level="1" style:list-style-name="" style:master-page-name="">
      <style:paragraph-properties fo:margin-top="2cm" fo:margin-bottom="1cm" style:contextual-spacing="false" style:page-number="auto" fo:break-before="auto" fo:break-after="auto" text:number-lines="false" text:line-number="0"/>
      <style:text-properties fo:font-size="24pt"/>
    </style:style>
    <style:style style:name="Part_20_Subtitle" style:display-name="Part Subtitle" style:family="paragraph" style:parent-style-name="Part_20_Title" style:default-outline-level="" style:list-style-name="" style:master-page-name="">
      <style:paragraph-properties fo:margin-top="0cm" fo:margin-bottom="1cm" style:contextual-spacing="false" style:page-number="auto" fo:break-before="auto" fo:break-after="auto"/>
      <style:text-properties fo:color="#999999" loext:opacity="100%" fo:font-size="18pt" fo:font-weight="normal"/>
    </style:style>
    <style:style style:name="Book_20_Subtitle" style:display-name="Book Subtitle" style:family="paragraph" style:parent-style-name="Book_20_Title" style:master-page-name="">
      <style:paragraph-properties fo:margin-left="0cm" fo:margin-right="0cm" fo:margin-top="0cm" fo:margin-bottom="0.4cm" style:contextual-spacing="false" fo:text-indent="0cm" style:auto-text-indent="false" style:page-number="auto" fo:break-before="auto" fo:break-after="auto" fo:keep-with-next="auto"/>
      <style:text-properties fo:color="#729fcf" loext:opacity="100%" style:font-name="Tahoma" fo:font-family="Tahoma" fo:font-size="18pt" fo:font-weight="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5" style:display-name="Contents 5" style:family="paragraph" style:parent-style-name="Contents_20_4" style:class="index">
      <style:paragraph-properties fo:margin-left="2.499cm" fo:margin-right="0cm" fo:text-indent="0cm" style:auto-text-indent="false">
        <style:tab-stops>
          <style:tab-stop style:position="15cm" style:type="right" style:leader-style="dotted" style:leader-text="."/>
        </style:tab-stops>
      </style:paragraph-properties>
      <style:text-properties fo:font-size="10pt"/>
    </style:style>
    <style:style style:name="Parking_20_Lot" style:display-name="Parking Lot" style:family="paragraph" style:parent-style-name="Panel_20_Heading">
      <loext:graphic-properties draw:fill="solid" draw:fill-color="#ffb66c"/>
      <style:paragraph-properties fo:background-color="#ffb66c" fo:padding-left="0.199cm" fo:padding-right="0.199cm" fo:padding-top="0.15cm" fo:padding-bottom="0.15cm" fo:border="1.5pt solid #ea7500"/>
      <style:text-properties fo:color="#ea7500" loext:opacity="100%"/>
    </style:style>
    <style:style style:name="Frame_20_contents" style:display-name="Frame contents" style:family="paragraph" style:parent-style-name="Standard" style:class="extra"/>
    <style:style style:name="MJ_20_Title" style:display-name="MJ Title" style:family="paragraph" style:parent-style-name="Managers_20_Journal">
      <loext:graphic-properties draw:fill="none" draw:fill-color="#729fcf"/>
      <style:paragraph-properties fo:margin-left="0cm" fo:margin-right="0cm" fo:margin-top="0cm" fo:margin-bottom="0cm" style:contextual-spacing="true" fo:text-indent="0cm" style:auto-text-indent="false" fo:background-color="transparent" fo:padding="0.3cm" fo:border="none" style:join-border="false"/>
      <style:text-properties fo:font-weight="bold"/>
    </style:style>
    <style:style style:name="MJ_20_Text" style:display-name="MJ Text" style:family="paragraph" style:parent-style-name="MJ_20_Title" style:auto-update="true" style:master-page-name="">
      <loext:graphic-properties draw:fill="none" draw:fill-color="#729fcf"/>
      <style:paragraph-properties fo:margin-top="0cm" fo:margin-bottom="0cm" style:contextual-spacing="true" fo:line-height="0.42cm" style:register-true="false" style:page-number="auto" fo:background-color="transparent">
        <style:tab-stops/>
      </style:paragraph-properties>
      <style:text-properties fo:font-weight="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09:00:48.178157637</meta:creation-date>
    <dc:date>2026-07-09T09:09:49.797538906</dc:date>
    <meta:editing-duration>PT9M1S</meta:editing-duration>
    <meta:editing-cycles>1</meta:editing-cycles>
    <meta:document-statistic meta:table-count="1" meta:image-count="0" meta:object-count="0" meta:page-count="4" meta:paragraph-count="104" meta:word-count="712" meta:character-count="4381" meta:non-whitespace-character-count="3773"/>
    <meta:generator>LibreOffice/7.3.7.2$Linux_X86_64 LibreOffice_project/30$Build-2</meta:generator>
  </office:meta>
</office:document-meta>
</file>